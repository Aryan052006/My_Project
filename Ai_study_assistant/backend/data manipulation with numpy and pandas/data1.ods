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meta.xml"/>
  <manifest:file-entry manifest:media-type="text/xml" manifest:full-path="content.xml"/>
  <manifest:file-entry manifest:media-type="text/xml" manifest:full-path="styles.xml"/>
</manifest:manifest>
</file>

<file path=content.xml><?xml version="1.0" encoding="utf-8"?>
<office:document-content xmlns:office="urn:oasis:names:tc:opendocument:xmlns:office:1.0" xmlns:svg="urn:oasis:names:tc:opendocument:xmlns:svg-compatible:1.0" xmlns:fo="urn:oasis:names:tc:opendocument:xmlns:xsl-fo-compatible:1.0" xmlns:draw="urn:oasis:names:tc:opendocument:xmlns:drawing:1.0" xmlns:script="urn:oasis:names:tc:opendocument:xmlns:script:1.0" xmlns:ooo="http://openoffice.org/2004/office" xmlns:number="urn:oasis:names:tc:opendocument:xmlns:datastyle:1.0" xmlns:form="urn:oasis:names:tc:opendocument:xmlns:form:1.0" xmlns:meta="urn:oasis:names:tc:opendocument:xmlns:meta:1.0" xmlns:style="urn:oasis:names:tc:opendocument:xmlns:style:1.0" xmlns:text="urn:oasis:names:tc:opendocument:xmlns:text:1.0" xmlns:config="urn:oasis:names:tc:opendocument:xmlns:config:1.0" xmlns:table="urn:oasis:names:tc:opendocument:xmlns:table:1.0" xmlns:xlink="http://www.w3.org/1999/xlink" xmlns:dc="http://purl.org/dc/elements/1.1/" office:version="1.2">
  <office:automatic-styles>
    <style:style style:family="table" style:name="ta0">
      <style:table-properties table:display="true"/>
    </style:style>
  </office:automatic-styles>
  <office:body>
    <office:spreadsheet>
      <table:table table:style-name="ta0">
        <table:table-column/>
        <table:table-column/>
        <table:table-column/>
        <table:table-column/>
        <table:table-column/>
        <table:table-column/>
        <table:table-column/>
        <table:table-column/>
        <table:table-column/>
        <table:table-column/>
        <table:table-column/>
        <table:table-row>
          <table:table-cell office:value-type="string">
            <text:p>conceptType</text:p>
          </table:table-cell>
          <table:table-cell office:value-type="string">
            <text:p>conceptUri</text:p>
          </table:table-cell>
          <table:table-cell office:value-type="string">
            <text:p>preferredLabel</text:p>
          </table:table-cell>
          <table:table-cell office:value-type="string">
            <text:p>altLabels</text:p>
          </table:table-cell>
          <table:table-cell office:value-type="string">
            <text:p>hiddenLabels</text:p>
          </table:table-cell>
          <table:table-cell office:value-type="string">
            <text:p>status</text:p>
          </table:table-cell>
          <table:table-cell office:value-type="string">
            <text:p>modifiedDate</text:p>
          </table:table-cell>
          <table:table-cell office:value-type="string">
            <text:p>scopeNote</text:p>
          </table:table-cell>
          <table:table-cell office:value-type="string">
            <text:p>inScheme</text:p>
          </table:table-cell>
          <table:table-cell office:value-type="string">
            <text:p>description</text:p>
          </table:table-cell>
          <table:table-cell office:value-type="string">
            <text:p>code</text:p>
          </table:table-cell>
        </table:table-row>
        <table:table-row>
          <table:table-cell office:value-type="string">
            <text:p>SkillGroup</text:p>
          </table:table-cell>
          <table:table-cell office:value-type="string">
            <text:p>http://data.europa.eu/esco/isced-f/00</text:p>
          </table:table-cell>
          <table:table-cell office:value-type="string">
            <text:p>generic programmes and qualifications</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office:value-type="string">
            <text:p>Generic programmes and qualifications are those providing fundamental and personal skills education which cover a broad range of subjects and do not emphasise or specialise in a particular broad or narrow field.<text:line-break/>This broad field should not be used as a residual category. Programmes and qualifications with a specific subject emphasis should be classified in broad fields 01 to 10. In particular, education at the tertiary level should only by way of exception be classified here.</text:p>
          </table:table-cell>
          <table:table-cell office:value-type="string">
            <text:p>00</text:p>
          </table:table-cell>
        </table:table-row>
        <table:table-row>
          <table:table-cell office:value-type="string">
            <text:p>SkillGroup</text:p>
          </table:table-cell>
          <table:table-cell office:value-type="string">
            <text:p>http://data.europa.eu/esco/isced-f/000</text:p>
          </table:table-cell>
          <table:table-cell office:value-type="string">
            <text:p>generic programmes and qualifications not further defined</text:p>
          </table:table-cell>
          <table:table-cell table:number-columns-repeated="2"/>
          <table:table-cell office:value-type="string">
            <text:p>released</text:p>
          </table:table-cell>
          <table:table-cell office:value-type="string">
            <text:p>2023-07-13T15:16:44.968Z</text:p>
          </table:table-cell>
          <table:table-cell/>
          <table:table-cell office:value-type="string">
            <text:p>http://data.europa.eu/esco/concept-scheme/skills<text:line-break/>http://data.europa.eu/esco/concept-scheme/skills-hierarchy<text:line-break/>http://data.europa.eu/esco/concept-scheme/isced-f</text:p>
          </table:table-cell>
          <table:table-cell/>
          <table:table-cell office:value-type="string">
            <text:p>000</text:p>
          </table:table-cell>
        </table:table-row>
        <table:table-row>
          <table:table-cell office:value-type="string">
            <text:p>SkillGroup</text:p>
          </table:table-cell>
          <table:table-cell office:value-type="string">
            <text:p>http://data.europa.eu/esco/isced-f/0000</text:p>
          </table:table-cell>
          <table:table-cell office:value-type="string">
            <text:p>generic programmes and qualifications not further defin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000</text:p>
          </table:table-cell>
        </table:table-row>
        <table:table-row>
          <table:table-cell office:value-type="string">
            <text:p>SkillGroup</text:p>
          </table:table-cell>
          <table:table-cell office:value-type="string">
            <text:p>http://data.europa.eu/esco/isced-f/001</text:p>
          </table:table-cell>
          <table:table-cell office:value-type="string">
            <text:p>basic programmes and qualifications</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01</text:p>
          </table:table-cell>
        </table:table-row>
        <table:table-row>
          <table:table-cell office:value-type="string">
            <text:p>SkillGroup</text:p>
          </table:table-cell>
          <table:table-cell office:value-type="string">
            <text:p>http://data.europa.eu/esco/isced-f/0011</text:p>
          </table:table-cell>
          <table:table-cell office:value-type="string">
            <text:p>basic programmes and qualifications</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office:value-type="string">
            <text:p>Basic programmes and qualifications are designed to provide participants with fundamental skills in reading, writing and arithmetic along with an elementary understanding of other subjects such as history, geography, natural science, social science, art and music, and in some cases religious instruction. These programmes and qualifications are normally offered at primary and lower secondary levels. Broad, non-specialised programmes at upper secondary level are also classified here even if there is some concentration on, for example, humanities, social science, natural science etc. Vocational programmes and qualifications are included here only by way of exception.<text:line-break/>Programmes and qualifications with the following main subject content are classified here:<text:line-break/>Basic programmes and qualifications<text:line-break/>Broad, generic (non-specialised) programmes and qualifications<text:line-break/>General programmes and qualifications with no specific subject emphasis<text:line-break/>Programmes and qualifications at primary level === Inclusions<text:line-break/>Basic programmes and qualifications at upper secondary level (in some countries at lower secondary level) with some emphasis on e.g. humanities, social sciences or natural sciences but still covering other fields of knowledge are included in this detailed field. In some countries such programmes or qualifications are offered on a modular basis and should also be classified here. === Exclusions<text:line-break/>Programmes that are considered as general in the programme orientation sense (non-vocational) but have a clear emphasis on a detailed, narrow or broad field are excluded from this detailed field and included in one of the broad fields 01-10, depending on the subject covered.</text:p>
          </table:table-cell>
          <table:table-cell office:value-type="string">
            <text:p>0011</text:p>
          </table:table-cell>
        </table:table-row>
        <table:table-row>
          <table:table-cell office:value-type="string">
            <text:p>SkillGroup</text:p>
          </table:table-cell>
          <table:table-cell office:value-type="string">
            <text:p>http://data.europa.eu/esco/isced-f/002</text:p>
          </table:table-cell>
          <table:table-cell office:value-type="string">
            <text:p>literacy and numeracy</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02</text:p>
          </table:table-cell>
        </table:table-row>
        <table:table-row>
          <table:table-cell office:value-type="string">
            <text:p>SkillGroup</text:p>
          </table:table-cell>
          <table:table-cell office:value-type="string">
            <text:p>http://data.europa.eu/esco/isced-f/0021</text:p>
          </table:table-cell>
          <table:table-cell office:value-type="string">
            <text:p>literacy and numeracy</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office:value-type="string">
            <text:p>Literacy and numeracy are programmes or qualifications arranged mainly for adults, designed to teach fundamental skills in reading, writing and arithmetic. The typical age range of participants can be used to distinguish between detailed field 0011 'Basic programmes and qualifications' and this detailed field.<text:line-break/>Programmes and qualifications with the following main content are classified here:<text:line-break/>Basic remedial programmes for youth or adults<text:line-break/>Literacy<text:line-break/>Numeracy.</text:p>
          </table:table-cell>
          <table:table-cell office:value-type="string">
            <text:p>0021</text:p>
          </table:table-cell>
        </table:table-row>
        <table:table-row>
          <table:table-cell office:value-type="string">
            <text:p>SkillGroup</text:p>
          </table:table-cell>
          <table:table-cell office:value-type="string">
            <text:p>http://data.europa.eu/esco/isced-f/003</text:p>
          </table:table-cell>
          <table:table-cell office:value-type="string">
            <text:p>personal skills and development</text:p>
          </table:table-cell>
          <table:table-cell table:number-columns-repeated="2"/>
          <table:table-cell office:value-type="string">
            <text:p>released</text:p>
          </table:table-cell>
          <table:table-cell office:value-type="string">
            <text:p>2023-07-04T13:43:35.384Z</text:p>
          </table:table-cell>
          <table:table-cell/>
          <table:table-cell office:value-type="string">
            <text:p>http://data.europa.eu/esco/concept-scheme/skills<text:line-break/>http://data.europa.eu/esco/concept-scheme/skills-hierarchy<text:line-break/>http://data.europa.eu/esco/concept-scheme/isced-f</text:p>
          </table:table-cell>
          <table:table-cell/>
          <table:table-cell office:value-type="string">
            <text:p>003</text:p>
          </table:table-cell>
        </table:table-row>
        <table:table-row>
          <table:table-cell office:value-type="string">
            <text:p>SkillGroup</text:p>
          </table:table-cell>
          <table:table-cell office:value-type="string">
            <text:p>http://data.europa.eu/esco/isced-f/0031</text:p>
          </table:table-cell>
          <table:table-cell office:value-type="string">
            <text:p>personal skills and development</text:p>
          </table:table-cell>
          <table:table-cell table:number-columns-repeated="2"/>
          <table:table-cell office:value-type="string">
            <text:p>released</text:p>
          </table:table-cell>
          <table:table-cell office:value-type="string">
            <text:p>2024-07-03T13:25:01.639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Personal skills are defined by reference to the effects on the individual's capacity (mental, social etc.). This detailed field covers personal skills programmes not included in 0011 'Basic programmes and qualifications' or 0021 'Literacy and numeracy', giving key competencies and transferable skills.<text:line-break/>Programmes and qualifications with the following main content are classified here:<text:line-break/>Argumentation and presentation<text:line-break/>Assertiveness training<text:line-break/>Communication skills<text:line-break/>Co-operation<text:line-break/>Development of behavioural capacities<text:line-break/>Development of mental skills<text:line-break/>Job-seeking programmes<text:line-break/>Parenting courses<text:line-break/>Public speaking<text:line-break/>Self-esteem skills<text:line-break/>Social competence<text:line-break/>Time management === Inclusions<text:line-break/>Education and training in leadership in the context of personal development is included here.<text:line-break/>Education and training related to the work place or to work assignments is included in this detailed field if it has more to do with personal development than work development. Personal skills courses can be taught at the workplace, but still be classified here based on their content.<text:line-break/>Programmes for people with special needs on how to cope with their daily life are included here === Exclusions<text:line-break/>Study of leadership in the context of management is excluded from this group and included in detailed field 0413 'Management and administration'.</text:p>
          </table:table-cell>
          <table:table-cell office:value-type="string">
            <text:p>0031</text:p>
          </table:table-cell>
        </table:table-row>
        <table:table-row>
          <table:table-cell office:value-type="string">
            <text:p>SkillGroup</text:p>
          </table:table-cell>
          <table:table-cell office:value-type="string">
            <text:p>http://data.europa.eu/esco/isced-f/009</text:p>
          </table:table-cell>
          <table:table-cell office:value-type="string">
            <text:p>generic programmes and qualifications not elsewhere classified</text:p>
          </table:table-cell>
          <table:table-cell table:number-columns-repeated="2"/>
          <table:table-cell office:value-type="string">
            <text:p>released</text:p>
          </table:table-cell>
          <table:table-cell office:value-type="string">
            <text:p>2023-10-30T10:21:59.843Z</text:p>
          </table:table-cell>
          <table:table-cell/>
          <table:table-cell office:value-type="string">
            <text:p>http://data.europa.eu/esco/concept-scheme/skills<text:line-break/>http://data.europa.eu/esco/concept-scheme/skills-hierarchy<text:line-break/>http://data.europa.eu/esco/concept-scheme/isced-f</text:p>
          </table:table-cell>
          <table:table-cell/>
          <table:table-cell office:value-type="string">
            <text:p>009</text:p>
          </table:table-cell>
        </table:table-row>
        <table:table-row>
          <table:table-cell office:value-type="string">
            <text:p>SkillGroup</text:p>
          </table:table-cell>
          <table:table-cell office:value-type="string">
            <text:p>http://data.europa.eu/esco/isced-f/0099</text:p>
          </table:table-cell>
          <table:table-cell office:value-type="string">
            <text:p>generic programmes and qualifications not elsewhere classified</text:p>
          </table:table-cell>
          <table:table-cell table:number-columns-repeated="2"/>
          <table:table-cell office:value-type="string">
            <text:p>released</text:p>
          </table:table-cell>
          <table:table-cell office:value-type="string">
            <text:p>2023-10-30T10:06:51.66Z</text:p>
          </table:table-cell>
          <table:table-cell/>
          <table:table-cell office:value-type="string">
            <text:p>http://data.europa.eu/esco/concept-scheme/skills<text:line-break/>http://data.europa.eu/esco/concept-scheme/skills-hierarchy<text:line-break/>http://data.europa.eu/esco/concept-scheme/isced-f</text:p>
          </table:table-cell>
          <table:table-cell/>
          <table:table-cell office:value-type="string">
            <text:p>0099</text:p>
          </table:table-cell>
        </table:table-row>
        <table:table-row>
          <table:table-cell office:value-type="string">
            <text:p>SkillGroup</text:p>
          </table:table-cell>
          <table:table-cell office:value-type="string">
            <text:p>http://data.europa.eu/esco/isced-f/01</text:p>
          </table:table-cell>
          <table:table-cell office:value-type="string">
            <text:p>education</text:p>
          </table:table-cell>
          <table:table-cell table:number-columns-repeated="2"/>
          <table:table-cell office:value-type="string">
            <text:p>released</text:p>
          </table:table-cell>
          <table:table-cell office:value-type="string">
            <text:p>2022-01-13T14:57:09.082Z</text:p>
          </table:table-cell>
          <table:table-cell/>
          <table:table-cell office:value-type="string">
            <text:p>http://data.europa.eu/esco/concept-scheme/skills<text:line-break/>http://data.europa.eu/esco/concept-scheme/skills-hierarchy<text:line-break/>http://data.europa.eu/esco/concept-scheme/isced-f</text:p>
          </table:table-cell>
          <table:table-cell/>
          <table:table-cell office:value-type="string">
            <text:p>01</text:p>
          </table:table-cell>
        </table:table-row>
        <table:table-row>
          <table:table-cell office:value-type="string">
            <text:p>SkillGroup</text:p>
          </table:table-cell>
          <table:table-cell office:value-type="string">
            <text:p>http://data.europa.eu/esco/isced-f/011</text:p>
          </table:table-cell>
          <table:table-cell office:value-type="string">
            <text:p>education</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11</text:p>
          </table:table-cell>
        </table:table-row>
        <table:table-row>
          <table:table-cell office:value-type="string">
            <text:p>SkillGroup</text:p>
          </table:table-cell>
          <table:table-cell office:value-type="string">
            <text:p>http://data.europa.eu/esco/isced-f/0110</text:p>
          </table:table-cell>
          <table:table-cell office:value-type="string">
            <text:p>education not further defin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110</text:p>
          </table:table-cell>
        </table:table-row>
        <table:table-row>
          <table:table-cell office:value-type="string">
            <text:p>SkillGroup</text:p>
          </table:table-cell>
          <table:table-cell office:value-type="string">
            <text:p>http://data.europa.eu/esco/isced-f/0111</text:p>
          </table:table-cell>
          <table:table-cell office:value-type="string">
            <text:p>education science</text:p>
          </table:table-cell>
          <table:table-cell table:number-columns-repeated="2"/>
          <table:table-cell office:value-type="string">
            <text:p>released</text:p>
          </table:table-cell>
          <table:table-cell office:value-type="string">
            <text:p>2023-07-04T13:29:46.06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Education science is the study of the learning process and the theories, methods and techniques of imparting knowledge to others.<text:line-break/>Programmes and qualifications with the following main content are classified here:<text:line-break/>Curriculum studies<text:line-break/>Didactics<text:line-break/>Educational assessment, testing and measurement<text:line-break/>Educational evaluation and research<text:line-break/>Paedagogical sciences === Exclusions<text:line-break/>Teacher training programmes which combine education science with the practice of teaching are excluded from this detailed field and included in one of the detailed fields for teacher training (0112-0114).</text:p>
          </table:table-cell>
          <table:table-cell office:value-type="string">
            <text:p>0111</text:p>
          </table:table-cell>
        </table:table-row>
        <table:table-row>
          <table:table-cell office:value-type="string">
            <text:p>SkillGroup</text:p>
          </table:table-cell>
          <table:table-cell office:value-type="string">
            <text:p>http://data.europa.eu/esco/isced-f/0112</text:p>
          </table:table-cell>
          <table:table-cell office:value-type="string">
            <text:p>training for pre-school teachers</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office:value-type="string">
            <text:p>Training for pre-school teachers is the study of the theories, methods and practice of teaching very young children up to 7 years of age within formal school settings at pre-primary or early childhood educational development levels.<text:line-break/>Programmes and qualifications with the following main content are classified here:<text:line-break/>Early childhood teaching (within formal school settings)<text:line-break/>Pre-primary teacher training === Exclusions<text:line-break/>Training in caring for children outside formal school settings is excluded from this detailed field and included in detailed field 0922 'Child care and youth services'..</text:p>
          </table:table-cell>
          <table:table-cell office:value-type="string">
            <text:p>0112</text:p>
          </table:table-cell>
        </table:table-row>
        <table:table-row>
          <table:table-cell office:value-type="string">
            <text:p>SkillGroup</text:p>
          </table:table-cell>
          <table:table-cell office:value-type="string">
            <text:p>http://data.europa.eu/esco/isced-f/0113</text:p>
          </table:table-cell>
          <table:table-cell office:value-type="string">
            <text:p>teacher training without subject specialisation</text:p>
          </table:table-cell>
          <table:table-cell table:number-columns-repeated="2"/>
          <table:table-cell office:value-type="string">
            <text:p>released</text:p>
          </table:table-cell>
          <table:table-cell office:value-type="string">
            <text:p>2023-07-04T10:20:46.297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Training for teachers without subject specialisation is the study of the theories, methods and practice of providing children between approximately 5 and 15 years of age with the fundamental skills in reading, writing and mathematics along with an elementary understanding of other subjects such as history, geography, social science etc. and laying the foundation for lifelong learning. Subject specialisation is stressed less than in detailed field 0114 'Teacher training with subject specialisation'. The study of teaching children with special needs is included in this detailed field, likewise the study of teaching adults fundamental reading and writing skills and teaching immigrants these types of skills in their home or first language.<text:line-break/>Programmes and qualifications with the following main content are classified here:<text:line-break/>Class teacher training<text:line-break/>Indigenous teacher training<text:line-break/>Primary teaching<text:line-break/>Teacher training for children with special needs === Inclusions<text:line-break/>The study of teaching adults basic literacy and numeracy skills is included here. Teacher's aide (teaching assistant) is also included here. === Exclusions<text:line-break/>Teacher training with subject specialisation even if intended for the teaching of children in primary or lower secondary education is excluded from this detailed field and included in detailed field 0114 'Teacher training with subject specialisation'.</text:p>
          </table:table-cell>
          <table:table-cell office:value-type="string">
            <text:p>0113</text:p>
          </table:table-cell>
        </table:table-row>
        <table:table-row>
          <table:table-cell office:value-type="string">
            <text:p>SkillGroup</text:p>
          </table:table-cell>
          <table:table-cell office:value-type="string">
            <text:p>http://data.europa.eu/esco/isced-f/0114</text:p>
          </table:table-cell>
          <table:table-cell office:value-type="string">
            <text:p>teacher training with subject specialisation</text:p>
          </table:table-cell>
          <table:table-cell table:number-columns-repeated="2"/>
          <table:table-cell office:value-type="string">
            <text:p>released</text:p>
          </table:table-cell>
          <table:table-cell office:value-type="string">
            <text:p>2023-10-30T10:21:08.01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Teacher training with subject specialisation is the study of the theories, methods and practice of teaching a specific subject, mostly at secondary or higher levels of education. Programmes and qualifications included in this detailed field often comprise both studies as well as the subject/subjects that are going to be taught.<text:line-break/>Programmes and qualifications with the following main content are classified here:<text:line-break/>Teacher training - arts and crafts<text:line-break/>Teacher training - commercial subjects<text:line-break/>Teacher training - music<text:line-break/>Teacher training - nursing<text:line-break/>Teacher training - physical training<text:line-break/>Teacher training - second languages<text:line-break/>Teacher training - specific theoretical subjects, e.g. English, mathematics, history<text:line-break/>Teacher training - technical subjects<text:line-break/>Teacher training - vocational subjects<text:line-break/>Training of driving instructors<text:line-break/>Training of trainers === Inclusions<text:line-break/>Teacher training courses for university teachers, instructors of work place and working life skills and in practical and artistic subjects are included here. === Exclusions<text:line-break/>Training of sports trainers is excluded from this detailed field and included in detailed field 1014 'Sports'.</text:p>
          </table:table-cell>
          <table:table-cell office:value-type="string">
            <text:p>0114</text:p>
          </table:table-cell>
        </table:table-row>
        <table:table-row>
          <table:table-cell office:value-type="string">
            <text:p>SkillGroup</text:p>
          </table:table-cell>
          <table:table-cell office:value-type="string">
            <text:p>http://data.europa.eu/esco/isced-f/0119</text:p>
          </table:table-cell>
          <table:table-cell office:value-type="string">
            <text:p>education not elsewhere classifi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119</text:p>
          </table:table-cell>
        </table:table-row>
        <table:table-row>
          <table:table-cell office:value-type="string">
            <text:p>SkillGroup</text:p>
          </table:table-cell>
          <table:table-cell office:value-type="string">
            <text:p>http://data.europa.eu/esco/isced-f/018</text:p>
          </table:table-cell>
          <table:table-cell office:value-type="string">
            <text:p>inter-disciplinary programmes and qualifications involving education</text:p>
          </table:table-cell>
          <table:table-cell table:number-columns-repeated="2"/>
          <table:table-cell office:value-type="string">
            <text:p>released</text:p>
          </table:table-cell>
          <table:table-cell office:value-type="string">
            <text:p>2022-01-13T14:49:36.928Z</text:p>
          </table:table-cell>
          <table:table-cell/>
          <table:table-cell office:value-type="string">
            <text:p>http://data.europa.eu/esco/concept-scheme/skills<text:line-break/>http://data.europa.eu/esco/concept-scheme/skills-hierarchy<text:line-break/>http://data.europa.eu/esco/concept-scheme/isced-f</text:p>
          </table:table-cell>
          <table:table-cell/>
          <table:table-cell office:value-type="string">
            <text:p>018</text:p>
          </table:table-cell>
        </table:table-row>
        <table:table-row>
          <table:table-cell office:value-type="string">
            <text:p>SkillGroup</text:p>
          </table:table-cell>
          <table:table-cell office:value-type="string">
            <text:p>http://data.europa.eu/esco/isced-f/0188</text:p>
          </table:table-cell>
          <table:table-cell office:value-type="string">
            <text:p>inter-disciplinary programmes and qualifications involving education</text:p>
          </table:table-cell>
          <table:table-cell table:number-columns-repeated="2"/>
          <table:table-cell office:value-type="string">
            <text:p>released</text:p>
          </table:table-cell>
          <table:table-cell office:value-type="string">
            <text:p>2022-01-13T14:56:35.789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Inter-disciplinary programmes and qualifications to which the greatest intended learning time is devoted to education are classified here.</text:p>
          </table:table-cell>
          <table:table-cell office:value-type="string">
            <text:p>0188</text:p>
          </table:table-cell>
        </table:table-row>
        <table:table-row>
          <table:table-cell office:value-type="string">
            <text:p>SkillGroup</text:p>
          </table:table-cell>
          <table:table-cell office:value-type="string">
            <text:p>http://data.europa.eu/esco/isced-f/02</text:p>
          </table:table-cell>
          <table:table-cell office:value-type="string">
            <text:p>arts and humanities</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2</text:p>
          </table:table-cell>
        </table:table-row>
        <table:table-row>
          <table:table-cell office:value-type="string">
            <text:p>SkillGroup</text:p>
          </table:table-cell>
          <table:table-cell office:value-type="string">
            <text:p>http://data.europa.eu/esco/isced-f/020</text:p>
          </table:table-cell>
          <table:table-cell office:value-type="string">
            <text:p>arts and humanities not further defin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20</text:p>
          </table:table-cell>
        </table:table-row>
        <table:table-row>
          <table:table-cell office:value-type="string">
            <text:p>SkillGroup</text:p>
          </table:table-cell>
          <table:table-cell office:value-type="string">
            <text:p>http://data.europa.eu/esco/isced-f/0200</text:p>
          </table:table-cell>
          <table:table-cell office:value-type="string">
            <text:p>arts and humanities not further defin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200</text:p>
          </table:table-cell>
        </table:table-row>
        <table:table-row>
          <table:table-cell office:value-type="string">
            <text:p>SkillGroup</text:p>
          </table:table-cell>
          <table:table-cell office:value-type="string">
            <text:p>http://data.europa.eu/esco/isced-f/021</text:p>
          </table:table-cell>
          <table:table-cell office:value-type="string">
            <text:p>arts</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21</text:p>
          </table:table-cell>
        </table:table-row>
        <table:table-row>
          <table:table-cell office:value-type="string">
            <text:p>SkillGroup</text:p>
          </table:table-cell>
          <table:table-cell office:value-type="string">
            <text:p>http://data.europa.eu/esco/isced-f/0210</text:p>
          </table:table-cell>
          <table:table-cell office:value-type="string">
            <text:p>arts not further defin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210</text:p>
          </table:table-cell>
        </table:table-row>
        <table:table-row>
          <table:table-cell office:value-type="string">
            <text:p>SkillGroup</text:p>
          </table:table-cell>
          <table:table-cell office:value-type="string">
            <text:p>http://data.europa.eu/esco/isced-f/0211</text:p>
          </table:table-cell>
          <table:table-cell office:value-type="string">
            <text:p>audio-visual techniques and media production</text:p>
          </table:table-cell>
          <table:table-cell table:number-columns-repeated="2"/>
          <table:table-cell office:value-type="string">
            <text:p>released</text:p>
          </table:table-cell>
          <table:table-cell office:value-type="string">
            <text:p>2023-07-11T10:40:32.985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Audio-visual techniques and media production is the study of techniques and skills to produce books or newspapers, radio or TV production, film or video production, recorded music production and graphic reproduction. It includes programmes and qualifications in methods of colour reproduction, photography and computer graphics. Study of combining pictures, words and decorations in the production of books, magazines, posters, adverts etc. is also included.<text:line-break/>Programmes and qualifications with the following main content are classified here:<text:line-break/>Animation<text:line-break/>Bookbinding<text:line-break/>Camera operating<text:line-break/>Compositing (printing)<text:line-break/>Computer game production<text:line-break/>Computer type-setting<text:line-break/>Film and video production<text:line-break/>Graphic design<text:line-break/>Graphic reproduction<text:line-break/>Illustration<text:line-break/>Interactive media design<text:line-break/>Media techniques<text:line-break/>Multimedia production<text:line-break/>Photography<text:line-break/>Pre-press operations<text:line-break/>Print finishing and binding<text:line-break/>Printing<text:line-break/>Publishing design, lay-out<text:line-break/>Radio and TV production<text:line-break/>Recorded music production<text:line-break/>Sound techniques<text:line-break/>Type-setting === Inclusions<text:line-break/>Desktop publishing and lay-out are included here. === Exclusions<text:line-break/>Programmes and qualifications in the use of specific software applications for desktop publishing and website development are excluded from this detailed field and included in detailed field 0611 'Computer use'.<text:line-break/>Study of journalism (wording and content of messages) is excluded from this detailed field and included in detailed field 0321 'Journalism and reporting'.</text:p>
          </table:table-cell>
          <table:table-cell office:value-type="string">
            <text:p>0211</text:p>
          </table:table-cell>
        </table:table-row>
        <table:table-row>
          <table:table-cell office:value-type="string">
            <text:p>SkillGroup</text:p>
          </table:table-cell>
          <table:table-cell office:value-type="string">
            <text:p>http://data.europa.eu/esco/isced-f/0212</text:p>
          </table:table-cell>
          <table:table-cell office:value-type="string">
            <text:p>fashion, interior and industrial design</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office:value-type="string">
            <text:p>Fashion, interior and industrial design is the study of creatively combining line, form and fabric in designing and constructing e.g. fashion garments, industrial products and interiors.<text:line-break/>Programmes and qualifications with the following main content are classified here:<text:line-break/>Costume design<text:line-break/>Design of industrial products<text:line-break/>Fashion design<text:line-break/>Interior architecture<text:line-break/>Interior design<text:line-break/>Stage designing<text:line-break/>Window dressing === Exclusions<text:line-break/>Study of Building design is excluded from this detailed field and included in detailed field 0731 'Architecture and town planning'.<text:line-break/>Study of Industrial design is excluded from this detailed field if emphasis is given to technical subjects and not to artistic design, and included in the appropriate detailed field under 071 'Engineering and engineering trades'.<text:line-break/>Publishing design and graphic design are excluded from this detailed field and included in detailed field 0211 'Audio-visual techniques and media production'.</text:p>
          </table:table-cell>
          <table:table-cell office:value-type="string">
            <text:p>0212</text:p>
          </table:table-cell>
        </table:table-row>
        <table:table-row>
          <table:table-cell office:value-type="string">
            <text:p>SkillGroup</text:p>
          </table:table-cell>
          <table:table-cell office:value-type="string">
            <text:p>http://data.europa.eu/esco/isced-f/0213</text:p>
          </table:table-cell>
          <table:table-cell office:value-type="string">
            <text:p>fine arts</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office:value-type="string">
            <text:p>Fine arts is the study of visual forms of creative expression, dealing with theory, history, techniques, performance and production in fine arts.<text:line-break/>Programmes and qualifications with the following main content are classified here:<text:line-break/>Art theory<text:line-break/>Calligraphy<text:line-break/>Etching<text:line-break/>Fine art printmaking<text:line-break/>History of art<text:line-break/>Painting<text:line-break/>Philosophy of art<text:line-break/>Sculpture === Exclusions<text:line-break/>Training in ceramics, pottery etc is excluded from this detailed field and included in detailed field 0214 'Handicrafts'.<text:line-break/>Study of architecture is excluded from this detailed field and included in detailed field 0731 'Architecture and town planning'.<text:line-break/>Teacher training in arts is excluded from this detailed field and included in detailed field 0114 'Teacher training with subject specialisation'.</text:p>
          </table:table-cell>
          <table:table-cell office:value-type="string">
            <text:p>0213</text:p>
          </table:table-cell>
        </table:table-row>
        <table:table-row>
          <table:table-cell office:value-type="string">
            <text:p>SkillGroup</text:p>
          </table:table-cell>
          <table:table-cell office:value-type="string">
            <text:p>http://data.europa.eu/esco/isced-f/0214</text:p>
          </table:table-cell>
          <table:table-cell office:value-type="string">
            <text:p>handicrafts</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office:value-type="string">
            <text:p>Handicrafts is the study of techniques and skills in a chosen craft, such as jewellery, pottery, weaving, woodcarving etc.<text:line-break/>Programmes and qualifications with the following main content are classified here:<text:line-break/>Ceramics<text:line-break/>Crafts, folk arts and artisan<text:line-break/>Decorative metal crafts<text:line-break/>Indigenous crafts<text:line-break/>Embroidery<text:line-break/>Floristry (flower arranging)<text:line-break/>Glass arts and craft<text:line-break/>Goldsmithing<text:line-break/>Jewellery<text:line-break/>Making of musical instruments (not industrial)<text:line-break/>Musical instruments (repairing and tuning)<text:line-break/>Silversmithing<text:line-break/>Stone carving (craft)<text:line-break/>Weaving (craft)<text:line-break/>Woodcarving === Exclusions<text:line-break/>Study of industrial (large scaled mechanised) production of pottery, woven materials, embroidery etc. is excluded from this field and included in one of the detailed fields under broad field 07 'Engineering, manufacturing and construction'.</text:p>
          </table:table-cell>
          <table:table-cell office:value-type="string">
            <text:p>0214</text:p>
          </table:table-cell>
        </table:table-row>
        <table:table-row>
          <table:table-cell office:value-type="string">
            <text:p>SkillGroup</text:p>
          </table:table-cell>
          <table:table-cell office:value-type="string">
            <text:p>http://data.europa.eu/esco/isced-f/0215</text:p>
          </table:table-cell>
          <table:table-cell office:value-type="string">
            <text:p>music and performing arts</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office:value-type="string">
            <text:p>Music and performing arts is the study of the principles and techniques associated with performance involving music, speech, movement, mime, characterisation, improvisation and stage craft.<text:line-break/>Programmes and qualifications with the following main content are classified here:<text:line-break/>Acting and directing<text:line-break/>Ballet<text:line-break/>Choreography<text:line-break/>Circus<text:line-break/>Composition (music)<text:line-break/>Conducting (music)<text:line-break/>Creative and performance art<text:line-break/>Dance<text:line-break/>Drama<text:line-break/>History of film and theatre<text:line-break/>History of music<text:line-break/>Music<text:line-break/>Music conducting<text:line-break/>Musicology<text:line-break/>Theatre/Theatre sciences === Inclusions<text:line-break/>Study of music and performing arts history and theory is included here. === Exclusions<text:line-break/>Teacher training in music and other performing arts is excluded from this detailed field and included in detailed field 0114 'Teacher training with subject specialisation'.<text:line-break/>022 Humanities (except languages).</text:p>
          </table:table-cell>
          <table:table-cell office:value-type="string">
            <text:p>0215</text:p>
          </table:table-cell>
        </table:table-row>
        <table:table-row>
          <table:table-cell office:value-type="string">
            <text:p>SkillGroup</text:p>
          </table:table-cell>
          <table:table-cell office:value-type="string">
            <text:p>http://data.europa.eu/esco/isced-f/0219</text:p>
          </table:table-cell>
          <table:table-cell office:value-type="string">
            <text:p>arts not elsewhere classified</text:p>
          </table:table-cell>
          <table:table-cell table:number-columns-repeated="2"/>
          <table:table-cell office:value-type="string">
            <text:p>released</text:p>
          </table:table-cell>
          <table:table-cell office:value-type="string">
            <text:p>2023-07-03T12:59:23.746Z</text:p>
          </table:table-cell>
          <table:table-cell/>
          <table:table-cell office:value-type="string">
            <text:p>http://data.europa.eu/esco/concept-scheme/skills<text:line-break/>http://data.europa.eu/esco/concept-scheme/skills-hierarchy<text:line-break/>http://data.europa.eu/esco/concept-scheme/isced-f</text:p>
          </table:table-cell>
          <table:table-cell/>
          <table:table-cell office:value-type="string">
            <text:p>0219</text:p>
          </table:table-cell>
        </table:table-row>
        <table:table-row>
          <table:table-cell office:value-type="string">
            <text:p>SkillGroup</text:p>
          </table:table-cell>
          <table:table-cell office:value-type="string">
            <text:p>http://data.europa.eu/esco/isced-f/022</text:p>
          </table:table-cell>
          <table:table-cell office:value-type="string">
            <text:p>humanities (except languages)</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22</text:p>
          </table:table-cell>
        </table:table-row>
        <table:table-row>
          <table:table-cell office:value-type="string">
            <text:p>SkillGroup</text:p>
          </table:table-cell>
          <table:table-cell office:value-type="string">
            <text:p>http://data.europa.eu/esco/isced-f/0220</text:p>
          </table:table-cell>
          <table:table-cell office:value-type="string">
            <text:p>humanities (except languages) not further defin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220</text:p>
          </table:table-cell>
        </table:table-row>
        <table:table-row>
          <table:table-cell office:value-type="string">
            <text:p>SkillGroup</text:p>
          </table:table-cell>
          <table:table-cell office:value-type="string">
            <text:p>http://data.europa.eu/esco/isced-f/0221</text:p>
          </table:table-cell>
          <table:table-cell office:value-type="string">
            <text:p>religion and theology</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office:value-type="string">
            <text:p>Religion and theology is the study of religious beliefs, concepts, symbols, expressions and texts of spirituality.<text:line-break/>Programmes and qualifications with the following main content are classified here:<text:line-break/>Religious history<text:line-break/>Study of sacred books<text:line-break/>Study of different religions<text:line-break/>Theology === Inclusions<text:line-break/>Included in this detailed field are programmes for children and young people, usually given in religious schools or seminars, in monasteries etc., aiming to develop an interest in the tenets of their religion and sufficient familiarity with its philosophy to assist in the propagation of their faith. === Exclusions<text:line-break/>Basic programmes given in religious schools, seminars etc. containing religious instruction but not emphasising it or leading to a religious vocation, are excluded from this detailed field and included in 0011 'Basic programmes and qualifications'. Islamic sharia programmes and qualifications are excluded from this detailed field and included in detailed field 0421 'Law'.</text:p>
          </table:table-cell>
          <table:table-cell office:value-type="string">
            <text:p>0221</text:p>
          </table:table-cell>
        </table:table-row>
        <table:table-row>
          <table:table-cell office:value-type="string">
            <text:p>SkillGroup</text:p>
          </table:table-cell>
          <table:table-cell office:value-type="string">
            <text:p>http://data.europa.eu/esco/isced-f/0222</text:p>
          </table:table-cell>
          <table:table-cell office:value-type="string">
            <text:p>history and archaeology</text:p>
          </table:table-cell>
          <table:table-cell table:number-columns-repeated="2"/>
          <table:table-cell office:value-type="string">
            <text:p>released</text:p>
          </table:table-cell>
          <table:table-cell office:value-type="string">
            <text:p>2023-10-27T15:38:51.741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History is the study of past events, especially the political, social and economic development of a country, a continent or the world. History of medicine is classified here, likewise the study of history of science and ideas. Archaeology is the study of ancient civilisations by scientific analysis of what is found in the ground.<text:line-break/>Programmes and qualifications with the following main content are classified here:<text:line-break/>Archaeology<text:line-break/>Cultural history<text:line-break/>Folklore studies<text:line-break/>History<text:line-break/>History of literature<text:line-break/>History of medicine<text:line-break/>History of science and ideas<text:line-break/>History of technology === Inclusions<text:line-break/>Restoration and preservation of artistic heritage are included here. === Exclusions<text:line-break/>Study of literature combined with study of a specific language is excluded from this detailed field and included in detailed field 0232 'Literature and linguistics'.<text:line-break/>Study of classical languages (Latin etc.) is excluded from this detailed field and included in detailed field 0231 'Language acquisition'.<text:line-break/>Study of History of art is excluded from this detailed field and included in detailed field 0213 'Fine arts'.<text:line-break/>Study of Music and performing arts history is excluded from this detailed field and included in detailed field 0215 'Music and performing arts'.<text:line-break/>Study of Economic history/history of economics is excluded from this detailed field and included in detailed field 0311 'Economics'.</text:p>
          </table:table-cell>
          <table:table-cell office:value-type="string">
            <text:p>0222</text:p>
          </table:table-cell>
        </table:table-row>
        <table:table-row>
          <table:table-cell office:value-type="string">
            <text:p>SkillGroup</text:p>
          </table:table-cell>
          <table:table-cell office:value-type="string">
            <text:p>http://data.europa.eu/esco/isced-f/0223</text:p>
          </table:table-cell>
          <table:table-cell office:value-type="string">
            <text:p>philosophy and ethics</text:p>
          </table:table-cell>
          <table:table-cell table:number-columns-repeated="2"/>
          <table:table-cell office:value-type="string">
            <text:p>released</text:p>
          </table:table-cell>
          <table:table-cell office:value-type="string">
            <text:p>2023-07-03T08:51:02.496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Philosophy and ethics is the study of philosophy, ethics and related subjects dealing with the conception of life.<text:line-break/>Programmes and qualifications with the following main content are classified here:<text:line-break/>Ethics<text:line-break/>Logic<text:line-break/>Morals<text:line-break/>Philosophy === Exclusions<text:line-break/>Study of religion is excluded from this detailed field and included in detailed field 0221 'Religion'.<text:line-break/>Study of Philosophy of arts is excluded from this detailed field and is included in detailed field 0213 'Fine arts'.</text:p>
          </table:table-cell>
          <table:table-cell office:value-type="string">
            <text:p>0223</text:p>
          </table:table-cell>
        </table:table-row>
        <table:table-row>
          <table:table-cell office:value-type="string">
            <text:p>SkillGroup</text:p>
          </table:table-cell>
          <table:table-cell office:value-type="string">
            <text:p>http://data.europa.eu/esco/isced-f/0228</text:p>
          </table:table-cell>
          <table:table-cell office:value-type="string">
            <text:p>inter-disciplinary programmes and qualifications involving humanities</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228</text:p>
          </table:table-cell>
        </table:table-row>
        <table:table-row>
          <table:table-cell office:value-type="string">
            <text:p>SkillGroup</text:p>
          </table:table-cell>
          <table:table-cell office:value-type="string">
            <text:p>http://data.europa.eu/esco/isced-f/0229</text:p>
          </table:table-cell>
          <table:table-cell office:value-type="string">
            <text:p>humanities (except languages) not elsewhere classifi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229</text:p>
          </table:table-cell>
        </table:table-row>
        <table:table-row>
          <table:table-cell office:value-type="string">
            <text:p>SkillGroup</text:p>
          </table:table-cell>
          <table:table-cell office:value-type="string">
            <text:p>http://data.europa.eu/esco/isced-f/023</text:p>
          </table:table-cell>
          <table:table-cell office:value-type="string">
            <text:p>languages</text:p>
          </table:table-cell>
          <table:table-cell table:number-columns-repeated="2"/>
          <table:table-cell office:value-type="string">
            <text:p>released</text:p>
          </table:table-cell>
          <table:table-cell office:value-type="string">
            <text:p>2023-07-14T08:12:16.726Z</text:p>
          </table:table-cell>
          <table:table-cell/>
          <table:table-cell office:value-type="string">
            <text:p>http://data.europa.eu/esco/concept-scheme/skills<text:line-break/>http://data.europa.eu/esco/concept-scheme/skills-hierarchy<text:line-break/>http://data.europa.eu/esco/concept-scheme/isced-f</text:p>
          </table:table-cell>
          <table:table-cell/>
          <table:table-cell office:value-type="string">
            <text:p>023</text:p>
          </table:table-cell>
        </table:table-row>
        <table:table-row>
          <table:table-cell office:value-type="string">
            <text:p>SkillGroup</text:p>
          </table:table-cell>
          <table:table-cell office:value-type="string">
            <text:p>http://data.europa.eu/esco/isced-f/0230</text:p>
          </table:table-cell>
          <table:table-cell office:value-type="string">
            <text:p>languages not further defined</text:p>
          </table:table-cell>
          <table:table-cell table:number-columns-repeated="2"/>
          <table:table-cell office:value-type="string">
            <text:p>released</text:p>
          </table:table-cell>
          <table:table-cell office:value-type="string">
            <text:p>2023-10-31T16:01:49.771Z</text:p>
          </table:table-cell>
          <table:table-cell/>
          <table:table-cell office:value-type="string">
            <text:p>http://data.europa.eu/esco/concept-scheme/skills<text:line-break/>http://data.europa.eu/esco/concept-scheme/skills-hierarchy<text:line-break/>http://data.europa.eu/esco/concept-scheme/isced-f</text:p>
          </table:table-cell>
          <table:table-cell/>
          <table:table-cell office:value-type="string">
            <text:p>0230</text:p>
          </table:table-cell>
        </table:table-row>
        <table:table-row>
          <table:table-cell office:value-type="string">
            <text:p>SkillGroup</text:p>
          </table:table-cell>
          <table:table-cell office:value-type="string">
            <text:p>http://data.europa.eu/esco/isced-f/0231</text:p>
          </table:table-cell>
          <table:table-cell office:value-type="string">
            <text:p>language acquisition</text:p>
          </table:table-cell>
          <table:table-cell table:number-columns-repeated="2"/>
          <table:table-cell office:value-type="string">
            <text:p>released</text:p>
          </table:table-cell>
          <table:table-cell office:value-type="string">
            <text:p>2024-02-15T09:52:45.02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Language acquisition is the study of the structure and composition of languages taught as second or foreign languages (i.e. that are intended for non-native or non-fluent speakers of the language). It includes the study of related cultures, literature, linguistics and phonetics if related to the specific language being acquired and forms part of the same programme or qualification. Classical or dead languages are included here as it is assumed there are no native speakers of the language and hence the manner of teaching and the content of the curriculum are more similar to the teaching of foreign languages.<text:line-break/>Programmes and qualifications with the following main content are classified here:<text:line-break/>Classical languages<text:line-break/>Exogenous languages<text:line-break/>Foreign languages<text:line-break/>Interpretation<text:line-break/>Phonetics<text:line-break/>Second languages, for example English as a second language<text:line-break/>Sign language<text:line-break/>Sign language interpreting<text:line-break/>Translation === Inclusions:<text:line-break/>Language and linguistics studies are included here if the linguistics are related to a specific language or languages being acquired and forming part of the same programme or qualification. Translation and interpretation are included here. === Exclusions:<text:line-break/>The study of the mother tongue or first language (i.e. that are intended for native, fluent or competent speakers of the language), even if this language is not a national language of the country of study (e.g. programmes for immigrants learning their mother tongue) are excluded from this detailed field and included in detailed field 0232 'Literature and linguistics'.</text:p>
          </table:table-cell>
          <table:table-cell office:value-type="string">
            <text:p>0231</text:p>
          </table:table-cell>
        </table:table-row>
        <table:table-row>
          <table:table-cell office:value-type="string">
            <text:p>SkillGroup</text:p>
          </table:table-cell>
          <table:table-cell office:value-type="string">
            <text:p>http://data.europa.eu/esco/isced-f/0232</text:p>
          </table:table-cell>
          <table:table-cell office:value-type="string">
            <text:p>literature and linguistics</text:p>
          </table:table-cell>
          <table:table-cell table:number-columns-repeated="2"/>
          <table:table-cell office:value-type="string">
            <text:p>released</text:p>
          </table:table-cell>
          <table:table-cell office:value-type="string">
            <text:p>2023-10-27T15:35:14.724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Literature and linguistics is here defined as the study of language(s) intended for native, fluent or competent speakers of the language. It includes the study of related literature and linguistics and may or may not include the structure and composition of the language.<text:line-break/>Programmes and qualifications with the following main content are classified here:<text:line-break/>Creative writing<text:line-break/>First language<text:line-break/>Indigenous languages<text:line-break/>Linguistics<text:line-break/>Literature<text:line-break/>'Mother tongue' languages<text:line-break/>Native first languages === Inclusions<text:line-break/>Languages taught as the first language ('mother tongue'), even if the language is not the national language of the country of study (e.g. programmes for immigrants in their home or first language) are included here. Local and regional languages are included here if they are first languages spoken by a significant minority in the country and are intended for at least competent speakers of the language.<text:line-break/>Study of comparative literature is included here. Study of general linguistics (not related to the study of a particular language) is included here. Study of literature in general (not combined with study of a special language) is included here. === Exclusions<text:line-break/>Language programmes are excluded from this detailed field if the language is taught as a foreign or a second language, and are then included in 0231 'Language acquisition'.<text:line-break/>Programmes in literacy and numeracy are excluded from this detailed field and included in detailed field 0021 'Literacy and numeracy'.<text:line-break/>Sign language programmes are excluded from this detailed field and included in detailed field 0231 'Language acquisition'.</text:p>
          </table:table-cell>
          <table:table-cell office:value-type="string">
            <text:p>0232</text:p>
          </table:table-cell>
        </table:table-row>
        <table:table-row>
          <table:table-cell office:value-type="string">
            <text:p>SkillGroup</text:p>
          </table:table-cell>
          <table:table-cell office:value-type="string">
            <text:p>http://data.europa.eu/esco/isced-f/0239</text:p>
          </table:table-cell>
          <table:table-cell office:value-type="string">
            <text:p>languages not elsewhere classifi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239</text:p>
          </table:table-cell>
        </table:table-row>
        <table:table-row>
          <table:table-cell office:value-type="string">
            <text:p>SkillGroup</text:p>
          </table:table-cell>
          <table:table-cell office:value-type="string">
            <text:p>http://data.europa.eu/esco/isced-f/028</text:p>
          </table:table-cell>
          <table:table-cell office:value-type="string">
            <text:p>inter-disciplinary programmes and qualifications involving arts and humanities</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28</text:p>
          </table:table-cell>
        </table:table-row>
        <table:table-row>
          <table:table-cell office:value-type="string">
            <text:p>SkillGroup</text:p>
          </table:table-cell>
          <table:table-cell office:value-type="string">
            <text:p>http://data.europa.eu/esco/isced-f/0288</text:p>
          </table:table-cell>
          <table:table-cell office:value-type="string">
            <text:p>inter-disciplinary programmes and qualifications involving arts and humanities</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office:value-type="string">
            <text:p>Inter-disciplinary programmes and qualifications to which the greatest intended learning time is devoted to arts and humanities are classified here.</text:p>
          </table:table-cell>
          <table:table-cell office:value-type="string">
            <text:p>0288</text:p>
          </table:table-cell>
        </table:table-row>
        <table:table-row>
          <table:table-cell office:value-type="string">
            <text:p>SkillGroup</text:p>
          </table:table-cell>
          <table:table-cell office:value-type="string">
            <text:p>http://data.europa.eu/esco/isced-f/029</text:p>
          </table:table-cell>
          <table:table-cell office:value-type="string">
            <text:p>arts and humanities not elsewhere classifi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29</text:p>
          </table:table-cell>
        </table:table-row>
        <table:table-row>
          <table:table-cell office:value-type="string">
            <text:p>SkillGroup</text:p>
          </table:table-cell>
          <table:table-cell office:value-type="string">
            <text:p>http://data.europa.eu/esco/isced-f/0299</text:p>
          </table:table-cell>
          <table:table-cell office:value-type="string">
            <text:p>arts and humanities not elsewhere classifi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299</text:p>
          </table:table-cell>
        </table:table-row>
        <table:table-row>
          <table:table-cell office:value-type="string">
            <text:p>SkillGroup</text:p>
          </table:table-cell>
          <table:table-cell office:value-type="string">
            <text:p>http://data.europa.eu/esco/isced-f/03</text:p>
          </table:table-cell>
          <table:table-cell office:value-type="string">
            <text:p>social sciences, journalism and information</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3</text:p>
          </table:table-cell>
        </table:table-row>
        <table:table-row>
          <table:table-cell office:value-type="string">
            <text:p>SkillGroup</text:p>
          </table:table-cell>
          <table:table-cell office:value-type="string">
            <text:p>http://data.europa.eu/esco/isced-f/030</text:p>
          </table:table-cell>
          <table:table-cell office:value-type="string">
            <text:p>social sciences, journalism and information not further defin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30</text:p>
          </table:table-cell>
        </table:table-row>
        <table:table-row>
          <table:table-cell office:value-type="string">
            <text:p>SkillGroup</text:p>
          </table:table-cell>
          <table:table-cell office:value-type="string">
            <text:p>http://data.europa.eu/esco/isced-f/0300</text:p>
          </table:table-cell>
          <table:table-cell office:value-type="string">
            <text:p>social sciences, journalism and information not further defin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300</text:p>
          </table:table-cell>
        </table:table-row>
        <table:table-row>
          <table:table-cell office:value-type="string">
            <text:p>SkillGroup</text:p>
          </table:table-cell>
          <table:table-cell office:value-type="string">
            <text:p>http://data.europa.eu/esco/isced-f/031</text:p>
          </table:table-cell>
          <table:table-cell office:value-type="string">
            <text:p>social and behavioural sciences</text:p>
          </table:table-cell>
          <table:table-cell table:number-columns-repeated="2"/>
          <table:table-cell office:value-type="string">
            <text:p>released</text:p>
          </table:table-cell>
          <table:table-cell office:value-type="string">
            <text:p>2023-06-30T10:03:57.744Z</text:p>
          </table:table-cell>
          <table:table-cell/>
          <table:table-cell office:value-type="string">
            <text:p>http://data.europa.eu/esco/concept-scheme/skills<text:line-break/>http://data.europa.eu/esco/concept-scheme/skills-hierarchy<text:line-break/>http://data.europa.eu/esco/concept-scheme/isced-f</text:p>
          </table:table-cell>
          <table:table-cell/>
          <table:table-cell office:value-type="string">
            <text:p>031</text:p>
          </table:table-cell>
        </table:table-row>
        <table:table-row>
          <table:table-cell office:value-type="string">
            <text:p>SkillGroup</text:p>
          </table:table-cell>
          <table:table-cell office:value-type="string">
            <text:p>http://data.europa.eu/esco/isced-f/0310</text:p>
          </table:table-cell>
          <table:table-cell office:value-type="string">
            <text:p>social and behavioural sciences not further defin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310</text:p>
          </table:table-cell>
        </table:table-row>
        <table:table-row>
          <table:table-cell office:value-type="string">
            <text:p>SkillGroup</text:p>
          </table:table-cell>
          <table:table-cell office:value-type="string">
            <text:p>http://data.europa.eu/esco/isced-f/0311</text:p>
          </table:table-cell>
          <table:table-cell office:value-type="string">
            <text:p>economics</text:p>
          </table:table-cell>
          <table:table-cell table:number-columns-repeated="2"/>
          <table:table-cell office:value-type="string">
            <text:p>released</text:p>
          </table:table-cell>
          <table:table-cell office:value-type="string">
            <text:p>2023-07-03T12:57:32.51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Economics is the study of economic policy, economic theory and economic decisionmaking.<text:line-break/>Programmes and qualifications with the following main content are classified here:<text:line-break/>Econometrics<text:line-break/>Economic history<text:line-break/>Economics<text:line-break/>Political economics === Exclusions<text:line-break/>Study of economics where emphasis is given to business studies is excluded from this detailed field and classified under 041 'Business and administration'. Study of home economics is excluded from this detailed field and included in the detailed field 1011 'Domestic services'.</text:p>
          </table:table-cell>
          <table:table-cell office:value-type="string">
            <text:p>0311</text:p>
          </table:table-cell>
        </table:table-row>
        <table:table-row>
          <table:table-cell office:value-type="string">
            <text:p>SkillGroup</text:p>
          </table:table-cell>
          <table:table-cell office:value-type="string">
            <text:p>http://data.europa.eu/esco/isced-f/0312</text:p>
          </table:table-cell>
          <table:table-cell office:value-type="string">
            <text:p>political sciences and civics</text:p>
          </table:table-cell>
          <table:table-cell table:number-columns-repeated="2"/>
          <table:table-cell office:value-type="string">
            <text:p>released</text:p>
          </table:table-cell>
          <table:table-cell office:value-type="string">
            <text:p>2024-01-29T16:20:43.56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Political sciences and civics is the study of government and political principles or practice. The study of the rights and duties of the citizens are included here.<text:line-break/>Programmes and qualifications with the following main content are classified here:<text:line-break/>Civics<text:line-break/>Human rights<text:line-break/>International relations<text:line-break/>Peace and conflict studies<text:line-break/>Political history<text:line-break/>Political science<text:line-break/>Public policy studies === Exclusions<text:line-break/>Study of political economics is excluded from this detailed field and included in the detailed field 0311 'Economics'.</text:p>
          </table:table-cell>
          <table:table-cell office:value-type="string">
            <text:p>0312</text:p>
          </table:table-cell>
        </table:table-row>
        <table:table-row>
          <table:table-cell office:value-type="string">
            <text:p>SkillGroup</text:p>
          </table:table-cell>
          <table:table-cell office:value-type="string">
            <text:p>http://data.europa.eu/esco/isced-f/0313</text:p>
          </table:table-cell>
          <table:table-cell office:value-type="string">
            <text:p>psychology</text:p>
          </table:table-cell>
          <table:table-cell table:number-columns-repeated="2"/>
          <table:table-cell office:value-type="string">
            <text:p>released</text:p>
          </table:table-cell>
          <table:table-cell office:value-type="string">
            <text:p>2023-07-03T12:46:46.382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Psychology is the study of the human mind and behaviour as a result of individual differences, experience and environment.<text:line-break/>Programmes and qualifications with the following main content are classified here:<text:line-break/>Cognitive science<text:line-break/>Psychoanalysis<text:line-break/>Psychology<text:line-break/>Psychotherapy.</text:p>
          </table:table-cell>
          <table:table-cell office:value-type="string">
            <text:p>0313</text:p>
          </table:table-cell>
        </table:table-row>
        <table:table-row>
          <table:table-cell office:value-type="string">
            <text:p>SkillGroup</text:p>
          </table:table-cell>
          <table:table-cell office:value-type="string">
            <text:p>http://data.europa.eu/esco/isced-f/0314</text:p>
          </table:table-cell>
          <table:table-cell office:value-type="string">
            <text:p>sociology and cultural studies</text:p>
          </table:table-cell>
          <table:table-cell table:number-columns-repeated="2"/>
          <table:table-cell office:value-type="string">
            <text:p>released</text:p>
          </table:table-cell>
          <table:table-cell office:value-type="string">
            <text:p>2023-07-04T12:56:24.33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Sociology and cultural studies is the study of human beings and the way they behave in groups and in relation to society. The study of ethnology and social anthropology are included here, likewise the study of human and social geography.<text:line-break/>Programmes and qualifications with the following main content are classified here:<text:line-break/>Criminology<text:line-break/>Cultural geography<text:line-break/>Cultural studies<text:line-break/>Demography/population studies<text:line-break/>Ethnology<text:line-break/>Gender studies<text:line-break/>Social anthropology<text:line-break/>Sociology === Exclusions<text:line-break/>Social welfare where emphasis is given to practical social work is excluded from this detailed field and included in detailed field 0923 'Social work and counselling'.<text:line-break/>Physical geography is excluded from this detailed field and included in detailed field 0532 'Earth science'.</text:p>
          </table:table-cell>
          <table:table-cell office:value-type="string">
            <text:p>0314</text:p>
          </table:table-cell>
        </table:table-row>
        <table:table-row>
          <table:table-cell office:value-type="string">
            <text:p>SkillGroup</text:p>
          </table:table-cell>
          <table:table-cell office:value-type="string">
            <text:p>http://data.europa.eu/esco/isced-f/0319</text:p>
          </table:table-cell>
          <table:table-cell office:value-type="string">
            <text:p>social and behavioural sciences not elsewhere classified</text:p>
          </table:table-cell>
          <table:table-cell table:number-columns-repeated="2"/>
          <table:table-cell office:value-type="string">
            <text:p>released</text:p>
          </table:table-cell>
          <table:table-cell office:value-type="string">
            <text:p>2025-02-19T14:42:49.746Z</text:p>
          </table:table-cell>
          <table:table-cell/>
          <table:table-cell office:value-type="string">
            <text:p>http://data.europa.eu/esco/concept-scheme/skills<text:line-break/>http://data.europa.eu/esco/concept-scheme/skills-hierarchy<text:line-break/>http://data.europa.eu/esco/concept-scheme/isced-f</text:p>
          </table:table-cell>
          <table:table-cell/>
          <table:table-cell office:value-type="string">
            <text:p>0319</text:p>
          </table:table-cell>
        </table:table-row>
        <table:table-row>
          <table:table-cell office:value-type="string">
            <text:p>SkillGroup</text:p>
          </table:table-cell>
          <table:table-cell office:value-type="string">
            <text:p>http://data.europa.eu/esco/isced-f/032</text:p>
          </table:table-cell>
          <table:table-cell office:value-type="string">
            <text:p>journalism and information</text:p>
          </table:table-cell>
          <table:table-cell table:number-columns-repeated="2"/>
          <table:table-cell office:value-type="string">
            <text:p>released</text:p>
          </table:table-cell>
          <table:table-cell office:value-type="string">
            <text:p>2023-07-03T07:24:08.118Z</text:p>
          </table:table-cell>
          <table:table-cell/>
          <table:table-cell office:value-type="string">
            <text:p>http://data.europa.eu/esco/concept-scheme/skills<text:line-break/>http://data.europa.eu/esco/concept-scheme/skills-hierarchy<text:line-break/>http://data.europa.eu/esco/concept-scheme/isced-f</text:p>
          </table:table-cell>
          <table:table-cell/>
          <table:table-cell office:value-type="string">
            <text:p>032</text:p>
          </table:table-cell>
        </table:table-row>
        <table:table-row>
          <table:table-cell office:value-type="string">
            <text:p>SkillGroup</text:p>
          </table:table-cell>
          <table:table-cell office:value-type="string">
            <text:p>http://data.europa.eu/esco/isced-f/0320</text:p>
          </table:table-cell>
          <table:table-cell office:value-type="string">
            <text:p>journalism and information not further defin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320</text:p>
          </table:table-cell>
        </table:table-row>
        <table:table-row>
          <table:table-cell office:value-type="string">
            <text:p>SkillGroup</text:p>
          </table:table-cell>
          <table:table-cell office:value-type="string">
            <text:p>http://data.europa.eu/esco/isced-f/0321</text:p>
          </table:table-cell>
          <table:table-cell office:value-type="string">
            <text:p>journalism and reporting</text:p>
          </table:table-cell>
          <table:table-cell table:number-columns-repeated="2"/>
          <table:table-cell office:value-type="string">
            <text:p>released</text:p>
          </table:table-cell>
          <table:table-cell office:value-type="string">
            <text:p>2023-07-03T07:23:44.668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Journalism and reporting is the study of the theory and practices of journalism/reporting as part of the field of mass communication. Journalism and reporting is about the wording and content of messages. It comprises news reporting, writing commentaries and feature stories of public interest etc.<text:line-break/>Programmes and qualifications with the following main content are classified here:<text:line-break/>Broadcast journalism<text:line-break/>Editing<text:line-break/>Information (wording and content)<text:line-break/>Journalism<text:line-break/>Mass communication (wording and content)<text:line-break/>News reporting === Exclusions<text:line-break/>Study of techniques for mass communication (e.g. printing and radio/TV production) is excluded from this detailed field and included in detailed field 0211 'Audio-visual techniques and media production'.<text:line-break/>Study of lay-out and publishing design is excluded from this detailed field and included in detailed field 0211 'Audio-visual techniques and media production'.<text:line-break/>Study of public relations is excluded from this detailed field and included in detailed field 0414 'Marketing and advertising'.</text:p>
          </table:table-cell>
          <table:table-cell office:value-type="string">
            <text:p>0321</text:p>
          </table:table-cell>
        </table:table-row>
        <table:table-row>
          <table:table-cell office:value-type="string">
            <text:p>SkillGroup</text:p>
          </table:table-cell>
          <table:table-cell office:value-type="string">
            <text:p>http://data.europa.eu/esco/isced-f/0322</text:p>
          </table:table-cell>
          <table:table-cell office:value-type="string">
            <text:p>library, information and archival studies</text:p>
          </table:table-cell>
          <table:table-cell table:number-columns-repeated="2"/>
          <table:table-cell office:value-type="string">
            <text:p>released</text:p>
          </table:table-cell>
          <table:table-cell office:value-type="string">
            <text:p>2023-10-27T15:38:41.87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Library, information and archival studies is the study of the methods of selecting, acquiring, organizing and storing collections of information, and facilitating the use of information. Museum and library studies are included here.<text:line-break/>Programmes and qualifications with the following main content are classified here:<text:line-break/>Archival sciences<text:line-break/>Curatorial studies<text:line-break/>Documentation<text:line-break/>Information science<text:line-break/>Library studies<text:line-break/>Museum documentation<text:line-break/>Museum studies<text:line-break/>Museology === Exclusions<text:line-break/>Restoration and preservation of artistic heritage are excluded from this field and included in field 0222 'History and archaeology'.</text:p>
          </table:table-cell>
          <table:table-cell office:value-type="string">
            <text:p>0322</text:p>
          </table:table-cell>
        </table:table-row>
        <table:table-row>
          <table:table-cell office:value-type="string">
            <text:p>SkillGroup</text:p>
          </table:table-cell>
          <table:table-cell office:value-type="string">
            <text:p>http://data.europa.eu/esco/isced-f/0329</text:p>
          </table:table-cell>
          <table:table-cell office:value-type="string">
            <text:p>journalism and information not elsewhere classifi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329</text:p>
          </table:table-cell>
        </table:table-row>
        <table:table-row>
          <table:table-cell office:value-type="string">
            <text:p>SkillGroup</text:p>
          </table:table-cell>
          <table:table-cell office:value-type="string">
            <text:p>http://data.europa.eu/esco/isced-f/038</text:p>
          </table:table-cell>
          <table:table-cell office:value-type="string">
            <text:p>inter-disciplinary programmes and qualifications involving social sciences, journalism and information</text:p>
          </table:table-cell>
          <table:table-cell table:number-columns-repeated="2"/>
          <table:table-cell office:value-type="string">
            <text:p>released</text:p>
          </table:table-cell>
          <table:table-cell office:value-type="string">
            <text:p>2023-06-29T13:50:39.809Z</text:p>
          </table:table-cell>
          <table:table-cell/>
          <table:table-cell office:value-type="string">
            <text:p>http://data.europa.eu/esco/concept-scheme/skills<text:line-break/>http://data.europa.eu/esco/concept-scheme/skills-hierarchy<text:line-break/>http://data.europa.eu/esco/concept-scheme/isced-f</text:p>
          </table:table-cell>
          <table:table-cell/>
          <table:table-cell office:value-type="string">
            <text:p>038</text:p>
          </table:table-cell>
        </table:table-row>
        <table:table-row>
          <table:table-cell office:value-type="string">
            <text:p>SkillGroup</text:p>
          </table:table-cell>
          <table:table-cell office:value-type="string">
            <text:p>http://data.europa.eu/esco/isced-f/0388</text:p>
          </table:table-cell>
          <table:table-cell office:value-type="string">
            <text:p>inter-disciplinary programmes and qualifications involving social sciences, journalism and information</text:p>
          </table:table-cell>
          <table:table-cell table:number-columns-repeated="2"/>
          <table:table-cell office:value-type="string">
            <text:p>released</text:p>
          </table:table-cell>
          <table:table-cell office:value-type="string">
            <text:p>2023-07-04T08:43:11.281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Inter-disciplinary programmes and qualifications to which the greatest intended learning time is devoted to social sciences, journalism and information are classified here.</text:p>
          </table:table-cell>
          <table:table-cell office:value-type="string">
            <text:p>0388</text:p>
          </table:table-cell>
        </table:table-row>
        <table:table-row>
          <table:table-cell office:value-type="string">
            <text:p>SkillGroup</text:p>
          </table:table-cell>
          <table:table-cell office:value-type="string">
            <text:p>http://data.europa.eu/esco/isced-f/039</text:p>
          </table:table-cell>
          <table:table-cell office:value-type="string">
            <text:p>social sciences, journalism and information not elsewhere classifi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39</text:p>
          </table:table-cell>
        </table:table-row>
        <table:table-row>
          <table:table-cell office:value-type="string">
            <text:p>SkillGroup</text:p>
          </table:table-cell>
          <table:table-cell office:value-type="string">
            <text:p>http://data.europa.eu/esco/isced-f/0399</text:p>
          </table:table-cell>
          <table:table-cell office:value-type="string">
            <text:p>social sciences, journalism and information not elsewhere classifi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399</text:p>
          </table:table-cell>
        </table:table-row>
        <table:table-row>
          <table:table-cell office:value-type="string">
            <text:p>SkillGroup</text:p>
          </table:table-cell>
          <table:table-cell office:value-type="string">
            <text:p>http://data.europa.eu/esco/isced-f/04</text:p>
          </table:table-cell>
          <table:table-cell office:value-type="string">
            <text:p>business, administration and law</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4</text:p>
          </table:table-cell>
        </table:table-row>
        <table:table-row>
          <table:table-cell office:value-type="string">
            <text:p>SkillGroup</text:p>
          </table:table-cell>
          <table:table-cell office:value-type="string">
            <text:p>http://data.europa.eu/esco/isced-f/040</text:p>
          </table:table-cell>
          <table:table-cell office:value-type="string">
            <text:p>business, administration and law not further defined</text:p>
          </table:table-cell>
          <table:table-cell table:number-columns-repeated="2"/>
          <table:table-cell office:value-type="string">
            <text:p>released</text:p>
          </table:table-cell>
          <table:table-cell office:value-type="string">
            <text:p>2020-12-10T13:24:05.932Z</text:p>
          </table:table-cell>
          <table:table-cell/>
          <table:table-cell office:value-type="string">
            <text:p>http://data.europa.eu/esco/concept-scheme/skills<text:line-break/>http://data.europa.eu/esco/concept-scheme/skills-hierarchy<text:line-break/>http://data.europa.eu/esco/concept-scheme/isced-f</text:p>
          </table:table-cell>
          <table:table-cell/>
          <table:table-cell office:value-type="string">
            <text:p>040</text:p>
          </table:table-cell>
        </table:table-row>
        <table:table-row>
          <table:table-cell office:value-type="string">
            <text:p>SkillGroup</text:p>
          </table:table-cell>
          <table:table-cell office:value-type="string">
            <text:p>http://data.europa.eu/esco/isced-f/0400</text:p>
          </table:table-cell>
          <table:table-cell office:value-type="string">
            <text:p>business, administration and law not further defin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400</text:p>
          </table:table-cell>
        </table:table-row>
        <table:table-row>
          <table:table-cell office:value-type="string">
            <text:p>SkillGroup</text:p>
          </table:table-cell>
          <table:table-cell office:value-type="string">
            <text:p>http://data.europa.eu/esco/isced-f/041</text:p>
          </table:table-cell>
          <table:table-cell office:value-type="string">
            <text:p>business and administration</text:p>
          </table:table-cell>
          <table:table-cell table:number-columns-repeated="2"/>
          <table:table-cell office:value-type="string">
            <text:p>released</text:p>
          </table:table-cell>
          <table:table-cell office:value-type="string">
            <text:p>2023-07-05T08:34:34.635Z</text:p>
          </table:table-cell>
          <table:table-cell/>
          <table:table-cell office:value-type="string">
            <text:p>http://data.europa.eu/esco/concept-scheme/skills<text:line-break/>http://data.europa.eu/esco/concept-scheme/skills-hierarchy<text:line-break/>http://data.europa.eu/esco/concept-scheme/isced-f</text:p>
          </table:table-cell>
          <table:table-cell/>
          <table:table-cell office:value-type="string">
            <text:p>041</text:p>
          </table:table-cell>
        </table:table-row>
        <table:table-row>
          <table:table-cell office:value-type="string">
            <text:p>SkillGroup</text:p>
          </table:table-cell>
          <table:table-cell office:value-type="string">
            <text:p>http://data.europa.eu/esco/isced-f/0410</text:p>
          </table:table-cell>
          <table:table-cell office:value-type="string">
            <text:p>business and administration not further defined</text:p>
          </table:table-cell>
          <table:table-cell table:number-columns-repeated="2"/>
          <table:table-cell office:value-type="string">
            <text:p>released</text:p>
          </table:table-cell>
          <table:table-cell office:value-type="string">
            <text:p>2023-06-20T14:39:25.865Z</text:p>
          </table:table-cell>
          <table:table-cell/>
          <table:table-cell office:value-type="string">
            <text:p>http://data.europa.eu/esco/concept-scheme/skills<text:line-break/>http://data.europa.eu/esco/concept-scheme/skills-hierarchy<text:line-break/>http://data.europa.eu/esco/concept-scheme/isced-f</text:p>
          </table:table-cell>
          <table:table-cell/>
          <table:table-cell office:value-type="string">
            <text:p>0410</text:p>
          </table:table-cell>
        </table:table-row>
        <table:table-row>
          <table:table-cell office:value-type="string">
            <text:p>SkillGroup</text:p>
          </table:table-cell>
          <table:table-cell office:value-type="string">
            <text:p>http://data.europa.eu/esco/isced-f/0411</text:p>
          </table:table-cell>
          <table:table-cell office:value-type="string">
            <text:p>accounting and taxation</text:p>
          </table:table-cell>
          <table:table-cell table:number-columns-repeated="2"/>
          <table:table-cell office:value-type="string">
            <text:p>released</text:p>
          </table:table-cell>
          <table:table-cell office:value-type="string">
            <text:p>2023-02-17T13:32:34.671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Accounting and taxation is the study of maintaining, auditing and recording financial transactions.<text:line-break/>Programmes and qualifications with the following main content are classified here:<text:line-break/>Accounting<text:line-break/>Auditing<text:line-break/>Bookkeeping<text:line-break/>Tax accounting<text:line-break/>Tax management === Exclusions<text:line-break/>Study of tax laws is excluded from this detailed field and included in detailed field 0421 'Law'.</text:p>
          </table:table-cell>
          <table:table-cell office:value-type="string">
            <text:p>0411</text:p>
          </table:table-cell>
        </table:table-row>
        <table:table-row>
          <table:table-cell office:value-type="string">
            <text:p>SkillGroup</text:p>
          </table:table-cell>
          <table:table-cell office:value-type="string">
            <text:p>http://data.europa.eu/esco/isced-f/0412</text:p>
          </table:table-cell>
          <table:table-cell office:value-type="string">
            <text:p>finance, banking and insurance</text:p>
          </table:table-cell>
          <table:table-cell table:number-columns-repeated="2"/>
          <table:table-cell office:value-type="string">
            <text:p>released</text:p>
          </table:table-cell>
          <table:table-cell office:value-type="string">
            <text:p>2023-07-04T12:47:27.353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Finance, banking and insurance is the study of planning, directing, organizing and controlling financial activities and services. It includes the control and monitoring of the financial resources of organizations, institutions and individuals, and the provision of financial services at the corporate and individual level.<text:line-break/>Programmes and qualifications with the following main content are classified here:<text:line-break/>Bank teller studies<text:line-break/>Banking and finance<text:line-break/>Finance theory<text:line-break/>Insurance<text:line-break/>Investment analysis<text:line-break/>Investments and securities<text:line-break/>Pension insurance<text:line-break/>Social insurance<text:line-break/>Stock-broking === Exclusions<text:line-break/>Study of actuarial science is excluded from this detailed field and included in detailed field 0542 'Statistics'.</text:p>
          </table:table-cell>
          <table:table-cell office:value-type="string">
            <text:p>0412</text:p>
          </table:table-cell>
        </table:table-row>
        <table:table-row>
          <table:table-cell office:value-type="string">
            <text:p>SkillGroup</text:p>
          </table:table-cell>
          <table:table-cell office:value-type="string">
            <text:p>http://data.europa.eu/esco/isced-f/0413</text:p>
          </table:table-cell>
          <table:table-cell office:value-type="string">
            <text:p>management and administration</text:p>
          </table:table-cell>
          <table:table-cell table:number-columns-repeated="2"/>
          <table:table-cell office:value-type="string">
            <text:p>released</text:p>
          </table:table-cell>
          <table:table-cell office:value-type="string">
            <text:p>2023-07-04T08:25:45.675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Management and administration is the study of planning, directing and operating the functions and activities of organizations and institutions. Programmes in management also including administration, economics, finance etc. are included here if emphasis is given to management and administration.<text:line-break/>Programmes and qualifications with the following main content are classified here:<text:line-break/>Administration<text:line-break/>Educational management<text:line-break/>Employment management<text:line-break/>Entrepreneurship<text:line-break/>Health administration<text:line-break/>Logistic management<text:line-break/>Management science<text:line-break/>Office management<text:line-break/>Organizational theory and behaviour<text:line-break/>Personnel administration<text:line-break/>Personnel management<text:line-break/>'Start your own business' courses<text:line-break/>Supply change management<text:line-break/>Training management === Inclusions:<text:line-break/>Study of leadership in the context of management is included here. === Exclusions:<text:line-break/>Training in leadership in the context of personal development is excluded from this detailed field and included in detailed field 0031 'Personal skills'.<text:line-break/>Study of administration in the meaning of office work is excluded from this detailed field and included in detailed field 0415 'Secretarial and office work'.</text:p>
          </table:table-cell>
          <table:table-cell office:value-type="string">
            <text:p>0413</text:p>
          </table:table-cell>
        </table:table-row>
        <table:table-row>
          <table:table-cell office:value-type="string">
            <text:p>SkillGroup</text:p>
          </table:table-cell>
          <table:table-cell office:value-type="string">
            <text:p>http://data.europa.eu/esco/isced-f/0414</text:p>
          </table:table-cell>
          <table:table-cell office:value-type="string">
            <text:p>marketing and advertising</text:p>
          </table:table-cell>
          <table:table-cell table:number-columns-repeated="2"/>
          <table:table-cell office:value-type="string">
            <text:p>released</text:p>
          </table:table-cell>
          <table:table-cell office:value-type="string">
            <text:p>2023-07-04T06:58:16.398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Marketing and advertising is the study of promoting the exchange processes of goods and services between organizations and/or individuals, and the study of consumer behaviour and requirements. It includes the study of the role of product development, pricing, distribution, promotion and sales in order to maximise business performance.<text:line-break/>Programmes and qualifications with the following main content are classified here:<text:line-break/>Advertising<text:line-break/>Consumer behaviour<text:line-break/>Market research<text:line-break/>Marketing<text:line-break/>Merchandising<text:line-break/>Public relations.</text:p>
          </table:table-cell>
          <table:table-cell office:value-type="string">
            <text:p>0414</text:p>
          </table:table-cell>
        </table:table-row>
        <table:table-row>
          <table:table-cell office:value-type="string">
            <text:p>SkillGroup</text:p>
          </table:table-cell>
          <table:table-cell office:value-type="string">
            <text:p>http://data.europa.eu/esco/isced-f/0415</text:p>
          </table:table-cell>
          <table:table-cell office:value-type="string">
            <text:p>secretarial and office work</text:p>
          </table:table-cell>
          <table:table-cell table:number-columns-repeated="2"/>
          <table:table-cell office:value-type="string">
            <text:p>released</text:p>
          </table:table-cell>
          <table:table-cell office:value-type="string">
            <text:p>2021-04-14T10:07:44.809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Secretarial and office work is the study of administrative procedures and practices, office technology and clerical, shorthand and keyboard skills. Specialised secretarial programmes (bilingual, medical, law, accounting etc) are included if the programme has secretarial work as its objective, rather than work as specialised assistants.<text:line-break/>Programmes and qualifications with the following main content are classified here:<text:line-break/>Administrative and secretarial services<text:line-break/>Clerical programmes<text:line-break/>Data entry<text:line-break/>Foreign language secretary programmes<text:line-break/>Keyboard skills<text:line-break/>Legal secretary programmes<text:line-break/>Medical secretary programmes<text:line-break/>Operation of office equipment<text:line-break/>Receptionist training<text:line-break/>Secretarial programmes<text:line-break/>Shorthand<text:line-break/>Switchboard operating<text:line-break/>Typing === Inclusions<text:line-break/>Broad secretarial programmes comprising among other things computer courses are included here. === Exclusions<text:line-break/>Separate programmes or qualifications in using a specific computer software are excluded from this detailed field and included under detailed field 0611 'Computer use'.<text:line-break/>Office management is excluded from this detailed field and included in detailed field 0413 'Management and administration'.<text:line-break/>Hotel receptionist programmes are excluded from this detailed field and included in detailed field 1013 'Hotel, restaurant and catering'.</text:p>
          </table:table-cell>
          <table:table-cell office:value-type="string">
            <text:p>0415</text:p>
          </table:table-cell>
        </table:table-row>
        <table:table-row>
          <table:table-cell office:value-type="string">
            <text:p>SkillGroup</text:p>
          </table:table-cell>
          <table:table-cell office:value-type="string">
            <text:p>http://data.europa.eu/esco/isced-f/0416</text:p>
          </table:table-cell>
          <table:table-cell office:value-type="string">
            <text:p>wholesale and retail sales</text:p>
          </table:table-cell>
          <table:table-cell table:number-columns-repeated="2"/>
          <table:table-cell office:value-type="string">
            <text:p>released</text:p>
          </table:table-cell>
          <table:table-cell office:value-type="string">
            <text:p>2023-07-04T10:39:53.648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Wholesale and retail sales is the study of buying and selling goods and services, including stock management, pricing practices, loss prevention, sales systems and procedures. It includes the study of the workings and current trends of the wholesale and retail industries. Selling of buildings and properties is also included.<text:line-break/>Programmes and qualifications with the following main content are classified here:<text:line-break/>Auctioneering<text:line-break/>Consumer services<text:line-break/>Demonstration techniques<text:line-break/>Purchasing<text:line-break/>Real-estate business<text:line-break/>Retailing<text:line-break/>Stock-keeping<text:line-break/>Ware-housing<text:line-break/>Wholesaling === Inclusions<text:line-break/>Study of buying and selling buildings and properties is included here.</text:p>
          </table:table-cell>
          <table:table-cell office:value-type="string">
            <text:p>0416</text:p>
          </table:table-cell>
        </table:table-row>
        <table:table-row>
          <table:table-cell office:value-type="string">
            <text:p>SkillGroup</text:p>
          </table:table-cell>
          <table:table-cell office:value-type="string">
            <text:p>http://data.europa.eu/esco/isced-f/0417</text:p>
          </table:table-cell>
          <table:table-cell office:value-type="string">
            <text:p>work skills</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office:value-type="string">
            <text:p>Work skills is the study of the structure and function of working life. It comprises programmes, mainly given as staff training, related to the working place and to work assignments.<text:line-break/>Programmes and qualifications with the following main content are classified here:<text:line-break/>Clients' needs<text:line-break/>Company knowledge<text:line-break/>Customer service training<text:line-break/>'Introduction to work' courses<text:line-break/>Organization at work<text:line-break/>Quality assurance<text:line-break/>Trade union courses (general)<text:line-break/>Work development === Inclusions<text:line-break/>Staff training related to the work place or work assignments is included here. === Exclusions<text:line-break/>Training related to the work place or work assignments is excluded from this detailed field if it has more to do with personal development than work development and is included in detailed field 0031 'Personal skills'.<text:line-break/>Staff training which can be classified to any other field is excluded from this detailed field and included in the appropriate field (e.g. quality courses should, if technical, be included in the detailed fields under 071 'Engineering and engineering trades'.)<text:line-break/>Programmes in work environment should be included in detailed field 1022 'Occupational health and safety'.<text:line-break/>Programmes, mostly at tertiary level, dealing with working life in general in terms of the labour market, the social partners, industrial psychology etc. are excluded from this detailed field and included in the detailed fields under 031 'Social and behaviour sciences'.</text:p>
          </table:table-cell>
          <table:table-cell office:value-type="string">
            <text:p>0417</text:p>
          </table:table-cell>
        </table:table-row>
        <table:table-row>
          <table:table-cell office:value-type="string">
            <text:p>SkillGroup</text:p>
          </table:table-cell>
          <table:table-cell office:value-type="string">
            <text:p>http://data.europa.eu/esco/isced-f/0419</text:p>
          </table:table-cell>
          <table:table-cell office:value-type="string">
            <text:p>business and administration not elsewhere classified</text:p>
          </table:table-cell>
          <table:table-cell table:number-columns-repeated="2"/>
          <table:table-cell office:value-type="string">
            <text:p>released</text:p>
          </table:table-cell>
          <table:table-cell office:value-type="string">
            <text:p>2022-06-07T12:48:05.343Z</text:p>
          </table:table-cell>
          <table:table-cell/>
          <table:table-cell office:value-type="string">
            <text:p>http://data.europa.eu/esco/concept-scheme/skills<text:line-break/>http://data.europa.eu/esco/concept-scheme/skills-hierarchy<text:line-break/>http://data.europa.eu/esco/concept-scheme/isced-f</text:p>
          </table:table-cell>
          <table:table-cell/>
          <table:table-cell office:value-type="string">
            <text:p>0419</text:p>
          </table:table-cell>
        </table:table-row>
        <table:table-row>
          <table:table-cell office:value-type="string">
            <text:p>SkillGroup</text:p>
          </table:table-cell>
          <table:table-cell office:value-type="string">
            <text:p>http://data.europa.eu/esco/isced-f/042</text:p>
          </table:table-cell>
          <table:table-cell office:value-type="string">
            <text:p>law</text:p>
          </table:table-cell>
          <table:table-cell table:number-columns-repeated="2"/>
          <table:table-cell office:value-type="string">
            <text:p>released</text:p>
          </table:table-cell>
          <table:table-cell office:value-type="string">
            <text:p>2023-07-05T16:08:11.463Z</text:p>
          </table:table-cell>
          <table:table-cell/>
          <table:table-cell office:value-type="string">
            <text:p>http://data.europa.eu/esco/concept-scheme/skills<text:line-break/>http://data.europa.eu/esco/concept-scheme/skills-hierarchy<text:line-break/>http://data.europa.eu/esco/concept-scheme/isced-f</text:p>
          </table:table-cell>
          <table:table-cell/>
          <table:table-cell office:value-type="string">
            <text:p>042</text:p>
          </table:table-cell>
        </table:table-row>
        <table:table-row>
          <table:table-cell office:value-type="string">
            <text:p>SkillGroup</text:p>
          </table:table-cell>
          <table:table-cell office:value-type="string">
            <text:p>http://data.europa.eu/esco/isced-f/0421</text:p>
          </table:table-cell>
          <table:table-cell office:value-type="string">
            <text:p>law</text:p>
          </table:table-cell>
          <table:table-cell table:number-columns-repeated="2"/>
          <table:table-cell office:value-type="string">
            <text:p>released</text:p>
          </table:table-cell>
          <table:table-cell office:value-type="string">
            <text:p>2023-07-05T07:04:55.853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Law is the study of the principles and procedures for formally maintaining social order, including training for legal professions such as advocate or training for the judicial bench.<text:line-break/>Programmes and qualifications with the following main content are classified here:<text:line-break/>Commercial law<text:line-break/>Criminal justice studies<text:line-break/>History of law<text:line-break/>Indigenous law<text:line-break/>Jurisprudence<text:line-break/>Labour law<text:line-break/>Legal practice<text:line-break/>Notary/Notary's practise<text:line-break/>Paralegal studies === Exclusions<text:line-break/>Court reporting programmes and legal secretary programmes are excluded from this detailed field and included in detailed field 0415 'Secretarial and office work'.<text:line-break/>Police studies are excluded from this detailed field and included in detailed field 1032 'Protection of persons and property'.</text:p>
          </table:table-cell>
          <table:table-cell office:value-type="string">
            <text:p>0421</text:p>
          </table:table-cell>
        </table:table-row>
        <table:table-row>
          <table:table-cell office:value-type="string">
            <text:p>SkillGroup</text:p>
          </table:table-cell>
          <table:table-cell office:value-type="string">
            <text:p>http://data.europa.eu/esco/isced-f/048</text:p>
          </table:table-cell>
          <table:table-cell office:value-type="string">
            <text:p>inter-disciplinary programmes and qualifications involving business, administration and law</text:p>
          </table:table-cell>
          <table:table-cell table:number-columns-repeated="2"/>
          <table:table-cell office:value-type="string">
            <text:p>released</text:p>
          </table:table-cell>
          <table:table-cell office:value-type="string">
            <text:p>2023-10-30T09:05:29.607Z</text:p>
          </table:table-cell>
          <table:table-cell/>
          <table:table-cell office:value-type="string">
            <text:p>http://data.europa.eu/esco/concept-scheme/skills<text:line-break/>http://data.europa.eu/esco/concept-scheme/skills-hierarchy<text:line-break/>http://data.europa.eu/esco/concept-scheme/isced-f</text:p>
          </table:table-cell>
          <table:table-cell/>
          <table:table-cell office:value-type="string">
            <text:p>048</text:p>
          </table:table-cell>
        </table:table-row>
        <table:table-row>
          <table:table-cell office:value-type="string">
            <text:p>SkillGroup</text:p>
          </table:table-cell>
          <table:table-cell office:value-type="string">
            <text:p>http://data.europa.eu/esco/isced-f/0488</text:p>
          </table:table-cell>
          <table:table-cell office:value-type="string">
            <text:p>inter-disciplinary programmes and qualifications involving business, administration and law</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office:value-type="string">
            <text:p>Inter-disciplinary programmes and qualifications to which the greatest intended learning time is devoted to business, administration and law are classified here. === Inclusions<text:line-break/>Study of business and administration where emphasis is not given towards any of the detailed fields under 041 is included in this field. === Exclusions<text:line-break/>Business programmes where emphasis is given to any of the detailed fields under 041 'Business and administration' (management, administration, marketing etc.) should be classified according to the specialisation.</text:p>
          </table:table-cell>
          <table:table-cell office:value-type="string">
            <text:p>0488</text:p>
          </table:table-cell>
        </table:table-row>
        <table:table-row>
          <table:table-cell office:value-type="string">
            <text:p>SkillGroup</text:p>
          </table:table-cell>
          <table:table-cell office:value-type="string">
            <text:p>http://data.europa.eu/esco/isced-f/049</text:p>
          </table:table-cell>
          <table:table-cell office:value-type="string">
            <text:p>business, administration and law not elsewhere classified</text:p>
          </table:table-cell>
          <table:table-cell table:number-columns-repeated="2"/>
          <table:table-cell office:value-type="string">
            <text:p>released</text:p>
          </table:table-cell>
          <table:table-cell office:value-type="string">
            <text:p>2022-06-07T12:45:17.113Z</text:p>
          </table:table-cell>
          <table:table-cell/>
          <table:table-cell office:value-type="string">
            <text:p>http://data.europa.eu/esco/concept-scheme/skills<text:line-break/>http://data.europa.eu/esco/concept-scheme/skills-hierarchy<text:line-break/>http://data.europa.eu/esco/concept-scheme/isced-f</text:p>
          </table:table-cell>
          <table:table-cell/>
          <table:table-cell office:value-type="string">
            <text:p>049</text:p>
          </table:table-cell>
        </table:table-row>
        <table:table-row>
          <table:table-cell office:value-type="string">
            <text:p>SkillGroup</text:p>
          </table:table-cell>
          <table:table-cell office:value-type="string">
            <text:p>http://data.europa.eu/esco/isced-f/0499</text:p>
          </table:table-cell>
          <table:table-cell office:value-type="string">
            <text:p>business, administration and law not elsewhere classifi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499</text:p>
          </table:table-cell>
        </table:table-row>
        <table:table-row>
          <table:table-cell office:value-type="string">
            <text:p>SkillGroup</text:p>
          </table:table-cell>
          <table:table-cell office:value-type="string">
            <text:p>http://data.europa.eu/esco/isced-f/05</text:p>
          </table:table-cell>
          <table:table-cell office:value-type="string">
            <text:p>natural sciences, mathematics and statistics</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5</text:p>
          </table:table-cell>
        </table:table-row>
        <table:table-row>
          <table:table-cell office:value-type="string">
            <text:p>SkillGroup</text:p>
          </table:table-cell>
          <table:table-cell office:value-type="string">
            <text:p>http://data.europa.eu/esco/isced-f/050</text:p>
          </table:table-cell>
          <table:table-cell office:value-type="string">
            <text:p>natural sciences, mathematics and statistics not further defin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50</text:p>
          </table:table-cell>
        </table:table-row>
        <table:table-row>
          <table:table-cell office:value-type="string">
            <text:p>SkillGroup</text:p>
          </table:table-cell>
          <table:table-cell office:value-type="string">
            <text:p>http://data.europa.eu/esco/isced-f/0500</text:p>
          </table:table-cell>
          <table:table-cell office:value-type="string">
            <text:p>natural sciences, mathematics and statistics not further defin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500</text:p>
          </table:table-cell>
        </table:table-row>
        <table:table-row>
          <table:table-cell office:value-type="string">
            <text:p>SkillGroup</text:p>
          </table:table-cell>
          <table:table-cell office:value-type="string">
            <text:p>http://data.europa.eu/esco/isced-f/051</text:p>
          </table:table-cell>
          <table:table-cell office:value-type="string">
            <text:p>biological and related sciences</text:p>
          </table:table-cell>
          <table:table-cell table:number-columns-repeated="2"/>
          <table:table-cell office:value-type="string">
            <text:p>released</text:p>
          </table:table-cell>
          <table:table-cell office:value-type="string">
            <text:p>2023-06-30T12:14:05.574Z</text:p>
          </table:table-cell>
          <table:table-cell/>
          <table:table-cell office:value-type="string">
            <text:p>http://data.europa.eu/esco/concept-scheme/skills<text:line-break/>http://data.europa.eu/esco/concept-scheme/skills-hierarchy<text:line-break/>http://data.europa.eu/esco/concept-scheme/isced-f</text:p>
          </table:table-cell>
          <table:table-cell/>
          <table:table-cell office:value-type="string">
            <text:p>051</text:p>
          </table:table-cell>
        </table:table-row>
        <table:table-row>
          <table:table-cell office:value-type="string">
            <text:p>SkillGroup</text:p>
          </table:table-cell>
          <table:table-cell office:value-type="string">
            <text:p>http://data.europa.eu/esco/isced-f/0510</text:p>
          </table:table-cell>
          <table:table-cell office:value-type="string">
            <text:p>biological and related sciences not further defin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510</text:p>
          </table:table-cell>
        </table:table-row>
        <table:table-row>
          <table:table-cell office:value-type="string">
            <text:p>SkillGroup</text:p>
          </table:table-cell>
          <table:table-cell office:value-type="string">
            <text:p>http://data.europa.eu/esco/isced-f/0511</text:p>
          </table:table-cell>
          <table:table-cell office:value-type="string">
            <text:p>biology</text:p>
          </table:table-cell>
          <table:table-cell table:number-columns-repeated="2"/>
          <table:table-cell office:value-type="string">
            <text:p>released</text:p>
          </table:table-cell>
          <table:table-cell office:value-type="string">
            <text:p>2023-10-27T15:46:55.213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Biology is the study of the structure, function, reproduction, growth, evolution and behaviour of all living organisms.<text:line-break/>Programmes and qualifications with the following main content are classified here:<text:line-break/>Biology<text:line-break/>Botany<text:line-break/>Cell biology<text:line-break/>Entomology<text:line-break/>Genetics<text:line-break/>Mycology<text:line-break/>Zoology === Exclusions<text:line-break/>Study of environmental sciences, which is the study of the relation between living organisms and the environment, is excluded from this detailed field and included in detailed field 0521 'Environmental sciences'. Study of chemical processes in living organisms (biochemistry, toxicology, pharmacology etc.) is excluded from this detailed field and included in detailed field 0512 'Biochemistry'.</text:p>
          </table:table-cell>
          <table:table-cell office:value-type="string">
            <text:p>0511</text:p>
          </table:table-cell>
        </table:table-row>
        <table:table-row>
          <table:table-cell office:value-type="string">
            <text:p>SkillGroup</text:p>
          </table:table-cell>
          <table:table-cell office:value-type="string">
            <text:p>http://data.europa.eu/esco/isced-f/0512</text:p>
          </table:table-cell>
          <table:table-cell office:value-type="string">
            <text:p>biochemistry</text:p>
          </table:table-cell>
          <table:table-cell table:number-columns-repeated="2"/>
          <table:table-cell office:value-type="string">
            <text:p>released</text:p>
          </table:table-cell>
          <table:table-cell office:value-type="string">
            <text:p>2023-06-30T09:19:04.893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Biochemistry, sometimes called Biological chemistry, is the study of the chemistry of living organisms, including but not limited to, living matter.<text:line-break/>Programmes and qualifications with the following main content are classified here:<text:line-break/>Biological chemistry<text:line-break/>Cell technology<text:line-break/>Forensic sciences<text:line-break/>Genetic code (DNA, RNA) studies<text:line-break/>Genetic engineering<text:line-break/>Pharmacology<text:line-break/>Tissue culture technology<text:line-break/>Toxicology<text:line-break/>Virology === Inclusions<text:line-break/>Biotechnology is included here.</text:p>
          </table:table-cell>
          <table:table-cell office:value-type="string">
            <text:p>0512</text:p>
          </table:table-cell>
        </table:table-row>
        <table:table-row>
          <table:table-cell office:value-type="string">
            <text:p>SkillGroup</text:p>
          </table:table-cell>
          <table:table-cell office:value-type="string">
            <text:p>http://data.europa.eu/esco/isced-f/0519</text:p>
          </table:table-cell>
          <table:table-cell office:value-type="string">
            <text:p>biological and related sciences not elsewhere classifi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519</text:p>
          </table:table-cell>
        </table:table-row>
        <table:table-row>
          <table:table-cell office:value-type="string">
            <text:p>SkillGroup</text:p>
          </table:table-cell>
          <table:table-cell office:value-type="string">
            <text:p>http://data.europa.eu/esco/isced-f/052</text:p>
          </table:table-cell>
          <table:table-cell office:value-type="string">
            <text:p>environment</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52</text:p>
          </table:table-cell>
        </table:table-row>
        <table:table-row>
          <table:table-cell office:value-type="string">
            <text:p>SkillGroup</text:p>
          </table:table-cell>
          <table:table-cell office:value-type="string">
            <text:p>http://data.europa.eu/esco/isced-f/0520</text:p>
          </table:table-cell>
          <table:table-cell office:value-type="string">
            <text:p>environment not further defin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520</text:p>
          </table:table-cell>
        </table:table-row>
        <table:table-row>
          <table:table-cell office:value-type="string">
            <text:p>SkillGroup</text:p>
          </table:table-cell>
          <table:table-cell office:value-type="string">
            <text:p>http://data.europa.eu/esco/isced-f/0521</text:p>
          </table:table-cell>
          <table:table-cell office:value-type="string">
            <text:p>environmental sciences</text:p>
          </table:table-cell>
          <table:table-cell table:number-columns-repeated="2"/>
          <table:table-cell office:value-type="string">
            <text:p>released</text:p>
          </table:table-cell>
          <table:table-cell office:value-type="string">
            <text:p>2023-07-04T07:18:15.885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Environmental sciences are the study of organisms in relation to one another and to the environment.<text:line-break/>Programmes and qualifications with the following main content are classified here:<text:line-break/>Ecology<text:line-break/>Environmental science === Exclusions<text:line-break/>The study of biology and toxicology are excluded from this detailed field and included under narrow field 051 'Biological and related sciences'.</text:p>
          </table:table-cell>
          <table:table-cell office:value-type="string">
            <text:p>0521</text:p>
          </table:table-cell>
        </table:table-row>
        <table:table-row>
          <table:table-cell office:value-type="string">
            <text:p>SkillGroup</text:p>
          </table:table-cell>
          <table:table-cell office:value-type="string">
            <text:p>http://data.europa.eu/esco/isced-f/0522</text:p>
          </table:table-cell>
          <table:table-cell office:value-type="string">
            <text:p>natural environments and wildlife</text:p>
          </table:table-cell>
          <table:table-cell table:number-columns-repeated="2"/>
          <table:table-cell office:value-type="string">
            <text:p>released</text:p>
          </table:table-cell>
          <table:table-cell office:value-type="string">
            <text:p>2023-06-20T15:39:26.442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Natural environments and wildlife is the study of the relationships between living organisms in natural environments in order to protect nature and wildlife. It includes the study of establishing and maintaining national parks in order to preserve their original natural state.<text:line-break/>Programmes and qualifications with the following main content are classified here:<text:line-break/>National parks and wildlife management<text:line-break/>Nature conservation<text:line-break/>Wildlife === Exclusions<text:line-break/>Study of agriculture, horticulture and forestry are excluded from this detailed field and included in some of the detailed fields under 08 'Agriculture, forestry, fisheries and veterinary'.<text:line-break/>Study of hunting and trapping is excluded from this detailed field and included in detailed field 0821 'Forestry'.</text:p>
          </table:table-cell>
          <table:table-cell office:value-type="string">
            <text:p>0522</text:p>
          </table:table-cell>
        </table:table-row>
        <table:table-row>
          <table:table-cell office:value-type="string">
            <text:p>SkillGroup</text:p>
          </table:table-cell>
          <table:table-cell office:value-type="string">
            <text:p>http://data.europa.eu/esco/isced-f/0529</text:p>
          </table:table-cell>
          <table:table-cell office:value-type="string">
            <text:p>environment not elsewhere classifi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529</text:p>
          </table:table-cell>
        </table:table-row>
        <table:table-row>
          <table:table-cell office:value-type="string">
            <text:p>SkillGroup</text:p>
          </table:table-cell>
          <table:table-cell office:value-type="string">
            <text:p>http://data.europa.eu/esco/isced-f/053</text:p>
          </table:table-cell>
          <table:table-cell office:value-type="string">
            <text:p>physical sciences</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53</text:p>
          </table:table-cell>
        </table:table-row>
        <table:table-row>
          <table:table-cell office:value-type="string">
            <text:p>SkillGroup</text:p>
          </table:table-cell>
          <table:table-cell office:value-type="string">
            <text:p>http://data.europa.eu/esco/isced-f/0530</text:p>
          </table:table-cell>
          <table:table-cell office:value-type="string">
            <text:p>physical sciences not further defin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530</text:p>
          </table:table-cell>
        </table:table-row>
        <table:table-row>
          <table:table-cell office:value-type="string">
            <text:p>SkillGroup</text:p>
          </table:table-cell>
          <table:table-cell office:value-type="string">
            <text:p>http://data.europa.eu/esco/isced-f/0531</text:p>
          </table:table-cell>
          <table:table-cell office:value-type="string">
            <text:p>chemistry</text:p>
          </table:table-cell>
          <table:table-cell table:number-columns-repeated="2"/>
          <table:table-cell office:value-type="string">
            <text:p>released</text:p>
          </table:table-cell>
          <table:table-cell office:value-type="string">
            <text:p>2023-07-03T08:37:32.521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Chemistry is the study of substances and their elements and how they react when combined.<text:line-break/>Programmes and qualifications with the following main content are classified here:<text:line-break/>Inorganic chemistry<text:line-break/>Organic chemistry<text:line-break/>Physical chemistry === Exclusions<text:line-break/>Biochemistry is excluded from this detailed field and included in detailed field 0512 'Biochemistry'.</text:p>
          </table:table-cell>
          <table:table-cell office:value-type="string">
            <text:p>0531</text:p>
          </table:table-cell>
        </table:table-row>
        <table:table-row>
          <table:table-cell office:value-type="string">
            <text:p>SkillGroup</text:p>
          </table:table-cell>
          <table:table-cell office:value-type="string">
            <text:p>http://data.europa.eu/esco/isced-f/0532</text:p>
          </table:table-cell>
          <table:table-cell office:value-type="string">
            <text:p>earth sciences</text:p>
          </table:table-cell>
          <table:table-cell table:number-columns-repeated="2"/>
          <table:table-cell office:value-type="string">
            <text:p>released</text:p>
          </table:table-cell>
          <table:table-cell office:value-type="string">
            <text:p>2023-07-05T08:44:07.574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Earth sciences is the study of the composition and structure of earth including the hydrosphere and the atmosphere.<text:line-break/>Programmes and qualifications with the following main content are classified here:<text:line-break/>Climate research<text:line-break/>Earth science<text:line-break/>Geodesy<text:line-break/>Geography (physical)<text:line-break/>Geology<text:line-break/>Geomatics<text:line-break/>Geospatial technology<text:line-break/>Meteorology<text:line-break/>Oceanography<text:line-break/>Seismology === Exclusions<text:line-break/>Social geography is excluded from this detailed field and included in detailed field 0314 'Sociology and cultural studies'. Soil science is excluded from this detailed field and included in detailed field 0811 'Crop and livestock production'.</text:p>
          </table:table-cell>
          <table:table-cell office:value-type="string">
            <text:p>0532</text:p>
          </table:table-cell>
        </table:table-row>
        <table:table-row>
          <table:table-cell office:value-type="string">
            <text:p>SkillGroup</text:p>
          </table:table-cell>
          <table:table-cell office:value-type="string">
            <text:p>http://data.europa.eu/esco/isced-f/0533</text:p>
          </table:table-cell>
          <table:table-cell office:value-type="string">
            <text:p>physics</text:p>
          </table:table-cell>
          <table:table-cell table:number-columns-repeated="2"/>
          <table:table-cell office:value-type="string">
            <text:p>released</text:p>
          </table:table-cell>
          <table:table-cell office:value-type="string">
            <text:p>2025-01-29T11:06:12.495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Physics is the study of properties and interactions of matter and energy. It includes the study of astronomy and space science.<text:line-break/>Programmes and qualifications with the following main content are classified here:<text:line-break/>Astronomy<text:line-break/>Astrophysics<text:line-break/>Chemical physics<text:line-break/>Medical physics<text:line-break/>Optics<text:line-break/>Physics<text:line-break/>Space science === Exclusions<text:line-break/>Opticians' practice is excluded from this detailed field and included in detailed field 0914 'Medical diagnostic and treatment technology'.</text:p>
          </table:table-cell>
          <table:table-cell office:value-type="string">
            <text:p>0533</text:p>
          </table:table-cell>
        </table:table-row>
        <table:table-row>
          <table:table-cell office:value-type="string">
            <text:p>SkillGroup</text:p>
          </table:table-cell>
          <table:table-cell office:value-type="string">
            <text:p>http://data.europa.eu/esco/isced-f/0539</text:p>
          </table:table-cell>
          <table:table-cell office:value-type="string">
            <text:p>physical sciences not elsewhere classifi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539</text:p>
          </table:table-cell>
        </table:table-row>
        <table:table-row>
          <table:table-cell office:value-type="string">
            <text:p>SkillGroup</text:p>
          </table:table-cell>
          <table:table-cell office:value-type="string">
            <text:p>http://data.europa.eu/esco/isced-f/054</text:p>
          </table:table-cell>
          <table:table-cell office:value-type="string">
            <text:p>mathematics and statistics</text:p>
          </table:table-cell>
          <table:table-cell table:number-columns-repeated="2"/>
          <table:table-cell office:value-type="string">
            <text:p>released</text:p>
          </table:table-cell>
          <table:table-cell office:value-type="string">
            <text:p>2023-07-06T08:50:16.696Z</text:p>
          </table:table-cell>
          <table:table-cell/>
          <table:table-cell office:value-type="string">
            <text:p>http://data.europa.eu/esco/concept-scheme/skills<text:line-break/>http://data.europa.eu/esco/concept-scheme/skills-hierarchy<text:line-break/>http://data.europa.eu/esco/concept-scheme/isced-f</text:p>
          </table:table-cell>
          <table:table-cell/>
          <table:table-cell office:value-type="string">
            <text:p>054</text:p>
          </table:table-cell>
        </table:table-row>
        <table:table-row>
          <table:table-cell office:value-type="string">
            <text:p>SkillGroup</text:p>
          </table:table-cell>
          <table:table-cell office:value-type="string">
            <text:p>http://data.europa.eu/esco/isced-f/0540</text:p>
          </table:table-cell>
          <table:table-cell office:value-type="string">
            <text:p>mathematics and statistics not further defined</text:p>
          </table:table-cell>
          <table:table-cell table:number-columns-repeated="2"/>
          <table:table-cell office:value-type="string">
            <text:p>released</text:p>
          </table:table-cell>
          <table:table-cell office:value-type="string">
            <text:p>2023-07-05T15:10:32.277Z</text:p>
          </table:table-cell>
          <table:table-cell/>
          <table:table-cell office:value-type="string">
            <text:p>http://data.europa.eu/esco/concept-scheme/skills<text:line-break/>http://data.europa.eu/esco/concept-scheme/skills-hierarchy<text:line-break/>http://data.europa.eu/esco/concept-scheme/isced-f</text:p>
          </table:table-cell>
          <table:table-cell/>
          <table:table-cell office:value-type="string">
            <text:p>0540</text:p>
          </table:table-cell>
        </table:table-row>
        <table:table-row>
          <table:table-cell office:value-type="string">
            <text:p>SkillGroup</text:p>
          </table:table-cell>
          <table:table-cell office:value-type="string">
            <text:p>http://data.europa.eu/esco/isced-f/0541</text:p>
          </table:table-cell>
          <table:table-cell office:value-type="string">
            <text:p>mathematics</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office:value-type="string">
            <text:p>Mathematics is the study of abstract deductive systems. It includes algebra, arithmetic, geometry, real and complex analysis and pure and applied mathematics.<text:line-break/>Programmes and qualifications with the following main content are classified here:<text:line-break/>Algebra<text:line-break/>Geometry<text:line-break/>Mathematics<text:line-break/>Numerical analysis<text:line-break/>Operational research.</text:p>
          </table:table-cell>
          <table:table-cell office:value-type="string">
            <text:p>0541</text:p>
          </table:table-cell>
        </table:table-row>
        <table:table-row>
          <table:table-cell office:value-type="string">
            <text:p>SkillGroup</text:p>
          </table:table-cell>
          <table:table-cell office:value-type="string">
            <text:p>http://data.europa.eu/esco/isced-f/0542</text:p>
          </table:table-cell>
          <table:table-cell office:value-type="string">
            <text:p>statistics</text:p>
          </table:table-cell>
          <table:table-cell table:number-columns-repeated="2"/>
          <table:table-cell office:value-type="string">
            <text:p>released</text:p>
          </table:table-cell>
          <table:table-cell office:value-type="string">
            <text:p>2023-10-30T10:14:10.981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Statistics is the study of collecting, describing, arranging and analysing numerical data. The study of probability theory and actuarial science is included.<text:line-break/>Programmes and qualifications with the following main content are classified here:<text:line-break/>Actuarial science<text:line-break/>Probability theory<text:line-break/>Statistics, applied<text:line-break/>Survey design<text:line-break/>Survey sampling === Inclusions<text:line-break/>Study of mathematical (theoretical) statistics is included here. === Exclusions<text:line-break/>Demography/population studies is excluded from this detailed field and included in detailed field 0314 'Sociology and cultural studies'.</text:p>
          </table:table-cell>
          <table:table-cell office:value-type="string">
            <text:p>0542</text:p>
          </table:table-cell>
        </table:table-row>
        <table:table-row>
          <table:table-cell office:value-type="string">
            <text:p>SkillGroup</text:p>
          </table:table-cell>
          <table:table-cell office:value-type="string">
            <text:p>http://data.europa.eu/esco/isced-f/058</text:p>
          </table:table-cell>
          <table:table-cell office:value-type="string">
            <text:p>inter-disciplinary programmes and qualifications involving natural sciences, mathematics and statistics</text:p>
          </table:table-cell>
          <table:table-cell table:number-columns-repeated="2"/>
          <table:table-cell office:value-type="string">
            <text:p>released</text:p>
          </table:table-cell>
          <table:table-cell office:value-type="string">
            <text:p>2023-10-27T15:47:05.331Z</text:p>
          </table:table-cell>
          <table:table-cell/>
          <table:table-cell office:value-type="string">
            <text:p>http://data.europa.eu/esco/concept-scheme/skills<text:line-break/>http://data.europa.eu/esco/concept-scheme/skills-hierarchy<text:line-break/>http://data.europa.eu/esco/concept-scheme/isced-f</text:p>
          </table:table-cell>
          <table:table-cell/>
          <table:table-cell office:value-type="string">
            <text:p>058</text:p>
          </table:table-cell>
        </table:table-row>
        <table:table-row>
          <table:table-cell office:value-type="string">
            <text:p>SkillGroup</text:p>
          </table:table-cell>
          <table:table-cell office:value-type="string">
            <text:p>http://data.europa.eu/esco/isced-f/0588</text:p>
          </table:table-cell>
          <table:table-cell office:value-type="string">
            <text:p>inter-disciplinary programmes and qualifications involving natural sciences, mathematics and statistics</text:p>
          </table:table-cell>
          <table:table-cell table:number-columns-repeated="2"/>
          <table:table-cell office:value-type="string">
            <text:p>released</text:p>
          </table:table-cell>
          <table:table-cell office:value-type="string">
            <text:p>2023-10-30T10:14:26.898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Inter-disciplinary or broad programmes and qualifications to which the greatest intended learning time is devoted to natural sciences, mathematics and statistics are classified here.</text:p>
          </table:table-cell>
          <table:table-cell office:value-type="string">
            <text:p>0588</text:p>
          </table:table-cell>
        </table:table-row>
        <table:table-row>
          <table:table-cell office:value-type="string">
            <text:p>SkillGroup</text:p>
          </table:table-cell>
          <table:table-cell office:value-type="string">
            <text:p>http://data.europa.eu/esco/isced-f/059</text:p>
          </table:table-cell>
          <table:table-cell office:value-type="string">
            <text:p>natural sciences, mathematics and statistics not elsewhere classifi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59</text:p>
          </table:table-cell>
        </table:table-row>
        <table:table-row>
          <table:table-cell office:value-type="string">
            <text:p>SkillGroup</text:p>
          </table:table-cell>
          <table:table-cell office:value-type="string">
            <text:p>http://data.europa.eu/esco/isced-f/0599</text:p>
          </table:table-cell>
          <table:table-cell office:value-type="string">
            <text:p>natural sciences, mathematics and statistics not elsewhere classifi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599</text:p>
          </table:table-cell>
        </table:table-row>
        <table:table-row>
          <table:table-cell office:value-type="string">
            <text:p>SkillGroup</text:p>
          </table:table-cell>
          <table:table-cell office:value-type="string">
            <text:p>http://data.europa.eu/esco/isced-f/06</text:p>
          </table:table-cell>
          <table:table-cell office:value-type="string">
            <text:p>information and communication technologies (icts)</text:p>
          </table:table-cell>
          <table:table-cell table:number-columns-repeated="2"/>
          <table:table-cell office:value-type="string">
            <text:p>released</text:p>
          </table:table-cell>
          <table:table-cell office:value-type="string">
            <text:p>2021-08-30T14:57:56.832Z</text:p>
          </table:table-cell>
          <table:table-cell/>
          <table:table-cell office:value-type="string">
            <text:p>http://data.europa.eu/esco/concept-scheme/skills<text:line-break/>http://data.europa.eu/esco/concept-scheme/skills-hierarchy<text:line-break/>http://data.europa.eu/esco/concept-scheme/isced-f</text:p>
          </table:table-cell>
          <table:table-cell/>
          <table:table-cell office:value-type="string">
            <text:p>06</text:p>
          </table:table-cell>
        </table:table-row>
        <table:table-row>
          <table:table-cell office:value-type="string">
            <text:p>SkillGroup</text:p>
          </table:table-cell>
          <table:table-cell office:value-type="string">
            <text:p>http://data.europa.eu/esco/isced-f/061</text:p>
          </table:table-cell>
          <table:table-cell office:value-type="string">
            <text:p>information and communication technologies (icts)</text:p>
          </table:table-cell>
          <table:table-cell table:number-columns-repeated="2"/>
          <table:table-cell office:value-type="string">
            <text:p>released</text:p>
          </table:table-cell>
          <table:table-cell office:value-type="string">
            <text:p>2021-08-30T14:53:01.939Z</text:p>
          </table:table-cell>
          <table:table-cell/>
          <table:table-cell office:value-type="string">
            <text:p>http://data.europa.eu/esco/concept-scheme/skills<text:line-break/>http://data.europa.eu/esco/concept-scheme/skills-hierarchy<text:line-break/>http://data.europa.eu/esco/concept-scheme/isced-f</text:p>
          </table:table-cell>
          <table:table-cell/>
          <table:table-cell office:value-type="string">
            <text:p>061</text:p>
          </table:table-cell>
        </table:table-row>
        <table:table-row>
          <table:table-cell office:value-type="string">
            <text:p>SkillGroup</text:p>
          </table:table-cell>
          <table:table-cell office:value-type="string">
            <text:p>http://data.europa.eu/esco/isced-f/0610</text:p>
          </table:table-cell>
          <table:table-cell office:value-type="string">
            <text:p>information and communication technologies (icts) not further defin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610</text:p>
          </table:table-cell>
        </table:table-row>
        <table:table-row>
          <table:table-cell office:value-type="string">
            <text:p>SkillGroup</text:p>
          </table:table-cell>
          <table:table-cell office:value-type="string">
            <text:p>http://data.europa.eu/esco/isced-f/0611</text:p>
          </table:table-cell>
          <table:table-cell office:value-type="string">
            <text:p>computer use</text:p>
          </table:table-cell>
          <table:table-cell table:number-columns-repeated="2"/>
          <table:table-cell office:value-type="string">
            <text:p>released</text:p>
          </table:table-cell>
          <table:table-cell office:value-type="string">
            <text:p>2023-07-06T09:57:34.775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Computer use is the study of using computers and computer software and applications for different purposes. These programmes are generally of short duration.<text:line-break/>Programmes and qualifications with the following main content are classified here:<text:line-break/>Computer use<text:line-break/>Use of software for calculating (spread sheets)<text:line-break/>Use of software for data processing<text:line-break/>Use of software for desk top publishing<text:line-break/>Use of software for word processing<text:line-break/>Use of Internet.</text:p>
          </table:table-cell>
          <table:table-cell office:value-type="string">
            <text:p>0611</text:p>
          </table:table-cell>
        </table:table-row>
        <table:table-row>
          <table:table-cell office:value-type="string">
            <text:p>SkillGroup</text:p>
          </table:table-cell>
          <table:table-cell office:value-type="string">
            <text:p>http://data.europa.eu/esco/isced-f/0612</text:p>
          </table:table-cell>
          <table:table-cell office:value-type="string">
            <text:p>database and network design and administration</text:p>
          </table:table-cell>
          <table:table-cell table:number-columns-repeated="2"/>
          <table:table-cell office:value-type="string">
            <text:p>released</text:p>
          </table:table-cell>
          <table:table-cell office:value-type="string">
            <text:p>2023-10-20T09:49:49.879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Database and network design and administration is the study of the design, maintenance and integration of software applications. Computer media applications are included.<text:line-break/>Programmes and qualifications with the following main content are classified here:<text:line-break/>Computer administration and management<text:line-break/>Computer media applications<text:line-break/>Computer network installation and maintenance<text:line-break/>Database administrator studies<text:line-break/>Information technology administration<text:line-break/>Information technology security<text:line-break/>Network administration<text:line-break/>Network design<text:line-break/>Web design.</text:p>
          </table:table-cell>
          <table:table-cell office:value-type="string">
            <text:p>0612</text:p>
          </table:table-cell>
        </table:table-row>
        <table:table-row>
          <table:table-cell office:value-type="string">
            <text:p>SkillGroup</text:p>
          </table:table-cell>
          <table:table-cell office:value-type="string">
            <text:p>http://data.europa.eu/esco/isced-f/0613</text:p>
          </table:table-cell>
          <table:table-cell office:value-type="string">
            <text:p>software and applications development and analysis</text:p>
          </table:table-cell>
          <table:table-cell table:number-columns-repeated="2"/>
          <table:table-cell office:value-type="string">
            <text:p>released</text:p>
          </table:table-cell>
          <table:table-cell office:value-type="string">
            <text:p>2023-07-11T10:47:11.805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Software and applications development and analysis is the study of the design and development of computer systems and computing environments.<text:line-break/>Programmes and qualifications with the following main content are classified here:<text:line-break/>Computer programming<text:line-break/>Computer science<text:line-break/>Computer systems analysis<text:line-break/>Computer systems design<text:line-break/>Informatics<text:line-break/>Operating systems<text:line-break/>Programming languages development<text:line-break/>Software development<text:line-break/>Software programming === Exclusions<text:line-break/>Computer engineering (hardware) is excluded from this detailed field and included in detailed field 0714 'Electronics and automation'.<text:line-break/>Programmes and qualifications in using computer applications are excluded from this detailed field and included in detailed field 0611 'Computer use'. Database and network design and administration is excluded from this detailed field and included in detailed field 0612 'Database and network design and administration'.</text:p>
          </table:table-cell>
          <table:table-cell office:value-type="string">
            <text:p>0613</text:p>
          </table:table-cell>
        </table:table-row>
        <table:table-row>
          <table:table-cell office:value-type="string">
            <text:p>SkillGroup</text:p>
          </table:table-cell>
          <table:table-cell office:value-type="string">
            <text:p>http://data.europa.eu/esco/isced-f/0619</text:p>
          </table:table-cell>
          <table:table-cell office:value-type="string">
            <text:p>information and communication technologies not elsewhere classified</text:p>
          </table:table-cell>
          <table:table-cell table:number-columns-repeated="2"/>
          <table:table-cell office:value-type="string">
            <text:p>released</text:p>
          </table:table-cell>
          <table:table-cell office:value-type="string">
            <text:p>2023-10-20T10:01:42.693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Information technology studies not fitting in the detailed fields are classified here:<text:line-break/>Artificial intelligence.</text:p>
          </table:table-cell>
          <table:table-cell office:value-type="string">
            <text:p>0619</text:p>
          </table:table-cell>
        </table:table-row>
        <table:table-row>
          <table:table-cell office:value-type="string">
            <text:p>SkillGroup</text:p>
          </table:table-cell>
          <table:table-cell office:value-type="string">
            <text:p>http://data.europa.eu/esco/isced-f/068</text:p>
          </table:table-cell>
          <table:table-cell office:value-type="string">
            <text:p>inter-disciplinary programmes and qualifications involving information and communication technologies (icts)</text:p>
          </table:table-cell>
          <table:table-cell table:number-columns-repeated="2"/>
          <table:table-cell office:value-type="string">
            <text:p>released</text:p>
          </table:table-cell>
          <table:table-cell office:value-type="string">
            <text:p>2023-07-06T09:54:36.209Z</text:p>
          </table:table-cell>
          <table:table-cell/>
          <table:table-cell office:value-type="string">
            <text:p>http://data.europa.eu/esco/concept-scheme/skills<text:line-break/>http://data.europa.eu/esco/concept-scheme/skills-hierarchy<text:line-break/>http://data.europa.eu/esco/concept-scheme/isced-f</text:p>
          </table:table-cell>
          <table:table-cell/>
          <table:table-cell office:value-type="string">
            <text:p>068</text:p>
          </table:table-cell>
        </table:table-row>
        <table:table-row>
          <table:table-cell office:value-type="string">
            <text:p>SkillGroup</text:p>
          </table:table-cell>
          <table:table-cell office:value-type="string">
            <text:p>http://data.europa.eu/esco/isced-f/0688</text:p>
          </table:table-cell>
          <table:table-cell office:value-type="string">
            <text:p>inter-disciplinary programmes and qualifications involving information and communication technologies (icts)</text:p>
          </table:table-cell>
          <table:table-cell table:number-columns-repeated="2"/>
          <table:table-cell office:value-type="string">
            <text:p>released</text:p>
          </table:table-cell>
          <table:table-cell office:value-type="string">
            <text:p>2023-07-03T14:47:33.378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Inter-disciplinary programmes and qualifications to which the greatest intended learning time is devoted to information and communication technologies (ICTs) are classified here.</text:p>
          </table:table-cell>
          <table:table-cell office:value-type="string">
            <text:p>0688</text:p>
          </table:table-cell>
        </table:table-row>
        <table:table-row>
          <table:table-cell office:value-type="string">
            <text:p>SkillGroup</text:p>
          </table:table-cell>
          <table:table-cell office:value-type="string">
            <text:p>http://data.europa.eu/esco/isced-f/07</text:p>
          </table:table-cell>
          <table:table-cell office:value-type="string">
            <text:p>engineering, manufacturing and construction</text:p>
          </table:table-cell>
          <table:table-cell table:number-columns-repeated="2"/>
          <table:table-cell office:value-type="string">
            <text:p>released</text:p>
          </table:table-cell>
          <table:table-cell office:value-type="string">
            <text:p>2022-01-13T15:06:40.148Z</text:p>
          </table:table-cell>
          <table:table-cell/>
          <table:table-cell office:value-type="string">
            <text:p>http://data.europa.eu/esco/concept-scheme/skills<text:line-break/>http://data.europa.eu/esco/concept-scheme/skills-hierarchy<text:line-break/>http://data.europa.eu/esco/concept-scheme/isced-f</text:p>
          </table:table-cell>
          <table:table-cell/>
          <table:table-cell office:value-type="string">
            <text:p>07</text:p>
          </table:table-cell>
        </table:table-row>
        <table:table-row>
          <table:table-cell office:value-type="string">
            <text:p>SkillGroup</text:p>
          </table:table-cell>
          <table:table-cell office:value-type="string">
            <text:p>http://data.europa.eu/esco/isced-f/070</text:p>
          </table:table-cell>
          <table:table-cell office:value-type="string">
            <text:p>engineering, manufacturing and construction not further defin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70</text:p>
          </table:table-cell>
        </table:table-row>
        <table:table-row>
          <table:table-cell office:value-type="string">
            <text:p>SkillGroup</text:p>
          </table:table-cell>
          <table:table-cell office:value-type="string">
            <text:p>http://data.europa.eu/esco/isced-f/0700</text:p>
          </table:table-cell>
          <table:table-cell office:value-type="string">
            <text:p>engineering, manufacturing and construction not further defin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700</text:p>
          </table:table-cell>
        </table:table-row>
        <table:table-row>
          <table:table-cell office:value-type="string">
            <text:p>SkillGroup</text:p>
          </table:table-cell>
          <table:table-cell office:value-type="string">
            <text:p>http://data.europa.eu/esco/isced-f/071</text:p>
          </table:table-cell>
          <table:table-cell office:value-type="string">
            <text:p>engineering and engineering trades</text:p>
          </table:table-cell>
          <table:table-cell table:number-columns-repeated="2"/>
          <table:table-cell office:value-type="string">
            <text:p>released</text:p>
          </table:table-cell>
          <table:table-cell office:value-type="string">
            <text:p>2023-07-05T08:57:22.584Z</text:p>
          </table:table-cell>
          <table:table-cell/>
          <table:table-cell office:value-type="string">
            <text:p>http://data.europa.eu/esco/concept-scheme/skills<text:line-break/>http://data.europa.eu/esco/concept-scheme/skills-hierarchy<text:line-break/>http://data.europa.eu/esco/concept-scheme/isced-f</text:p>
          </table:table-cell>
          <table:table-cell/>
          <table:table-cell office:value-type="string">
            <text:p>071</text:p>
          </table:table-cell>
        </table:table-row>
        <table:table-row>
          <table:table-cell office:value-type="string">
            <text:p>SkillGroup</text:p>
          </table:table-cell>
          <table:table-cell office:value-type="string">
            <text:p>http://data.europa.eu/esco/isced-f/0710</text:p>
          </table:table-cell>
          <table:table-cell office:value-type="string">
            <text:p>engineering and engineering trades not further defined</text:p>
          </table:table-cell>
          <table:table-cell table:number-columns-repeated="2"/>
          <table:table-cell office:value-type="string">
            <text:p>released</text:p>
          </table:table-cell>
          <table:table-cell office:value-type="string">
            <text:p>2024-01-29T16:12:44.504Z</text:p>
          </table:table-cell>
          <table:table-cell/>
          <table:table-cell office:value-type="string">
            <text:p>http://data.europa.eu/esco/concept-scheme/skills<text:line-break/>http://data.europa.eu/esco/concept-scheme/skills-hierarchy<text:line-break/>http://data.europa.eu/esco/concept-scheme/isced-f</text:p>
          </table:table-cell>
          <table:table-cell/>
          <table:table-cell office:value-type="string">
            <text:p>0710</text:p>
          </table:table-cell>
        </table:table-row>
        <table:table-row>
          <table:table-cell office:value-type="string">
            <text:p>SkillGroup</text:p>
          </table:table-cell>
          <table:table-cell office:value-type="string">
            <text:p>http://data.europa.eu/esco/isced-f/0711</text:p>
          </table:table-cell>
          <table:table-cell office:value-type="string">
            <text:p>chemical engineering and processes</text:p>
          </table:table-cell>
          <table:table-cell table:number-columns-repeated="2"/>
          <table:table-cell office:value-type="string">
            <text:p>released</text:p>
          </table:table-cell>
          <table:table-cell office:value-type="string">
            <text:p>2024-01-29T17:05:57.588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Chemical engineering and processes is the study of planning, designing, and developing products and processes where chemical and physical changes occur. It includes designing chemical plants and control systems.<text:line-break/>Programmes and qualifications with the following main content are classified here:<text:line-break/>Chemical engineering<text:line-break/>Chemical process engineering<text:line-break/>Laboratory technology<text:line-break/>Oil/gas/petrochemicals processing<text:line-break/>Plant and machine operation (processing)<text:line-break/>Process technology === Inclusions<text:line-break/>Laboratory technology is included here if emphasis is not given to a specific application. === Exclusions<text:line-break/>Laboratory technology is excluded from this detailed field if emphasis is given to a specific application (biological, medical, etc.) and is included under the appropriate detailed field (0914 etc.). Biotechnology is excluded from this detailed field and included in detailed field 0512 'Biochemistry'.<text:line-break/>Programmes and qualifications with emphasis on the production of a specific material are excluded from this detailed field (e.g. studies with emphasis on paper processing should be included in detailed field 0722 'Materials (glass, paper, plastic, wood)'.</text:p>
          </table:table-cell>
          <table:table-cell office:value-type="string">
            <text:p>0711</text:p>
          </table:table-cell>
        </table:table-row>
        <table:table-row>
          <table:table-cell office:value-type="string">
            <text:p>SkillGroup</text:p>
          </table:table-cell>
          <table:table-cell office:value-type="string">
            <text:p>http://data.europa.eu/esco/isced-f/0712</text:p>
          </table:table-cell>
          <table:table-cell office:value-type="string">
            <text:p>environmental protection technology</text:p>
          </table:table-cell>
          <table:table-cell table:number-columns-repeated="2"/>
          <table:table-cell office:value-type="string">
            <text:p>released</text:p>
          </table:table-cell>
          <table:table-cell office:value-type="string">
            <text:p>2023-07-05T08:23:25.85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Environmental protection technology is the study of processes in order to minimise discharge and waste and avoid pollution. It includes programmes dealing with control of water, air, soil etc.<text:line-break/>Programmes and qualifications with the following main content are classified here:<text:line-break/>Air pollution control<text:line-break/>Ecological technology<text:line-break/>Energy efficiency<text:line-break/>Environmental engineering<text:line-break/>Industrial discharge control<text:line-break/>Noise pollution control<text:line-break/>Recycling<text:line-break/>Water pollution control === Exclusions<text:line-break/>Programmes and qualifications dealing with hygienic standards in food, water etc. are excluded from this detailed field and included in detailed field 1021 'Community sanitation'.<text:line-break/>Construction related to waste and water management is excluded from this detailed field and included in detailed field 0732 'Building and civil engineering'.</text:p>
          </table:table-cell>
          <table:table-cell office:value-type="string">
            <text:p>0712</text:p>
          </table:table-cell>
        </table:table-row>
        <table:table-row>
          <table:table-cell office:value-type="string">
            <text:p>SkillGroup</text:p>
          </table:table-cell>
          <table:table-cell office:value-type="string">
            <text:p>http://data.europa.eu/esco/isced-f/0713</text:p>
          </table:table-cell>
          <table:table-cell office:value-type="string">
            <text:p>electricity and energy</text:p>
          </table:table-cell>
          <table:table-cell table:number-columns-repeated="2"/>
          <table:table-cell office:value-type="string">
            <text:p>released</text:p>
          </table:table-cell>
          <table:table-cell office:value-type="string">
            <text:p>2024-01-30T15:25:24.149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Electricity and energy is the study of installing, maintaining, repairing and diagnosing faults in electrical wiring and related equipment in domestic, commercial and industrial establishments. Installation and maintenance of overhead and underground electrical power distribution networks is included. Energy is the study of energy generation.<text:line-break/>Programmes and qualifications with the following main content are classified here:<text:line-break/>Air-conditioning trades<text:line-break/>Climate engineering<text:line-break/>Electrical appliances repairing<text:line-break/>Electrical engineering<text:line-break/>Electrical fitting<text:line-break/>Electrical power generation<text:line-break/>Electrical trades<text:line-break/>Energy studies<text:line-break/>Gas distribution<text:line-break/>Heating trades<text:line-break/>Nuclear, hydraulic and thermal energy<text:line-break/>Power line installation and maintenance<text:line-break/>Power production<text:line-break/>Refrigeration<text:line-break/>Solar power<text:line-break/>Wind turbines === Inclusions<text:line-break/>The study of installing, diagnosing faults in and repairing heating, air-conditioning and refrigeration equipment is included here. === Exclusions<text:line-break/>Study of vehicle electrical systems is excluded from this detailed field and included in detailed field 0716 'Motor vehicles, ships and aircraft'.</text:p>
          </table:table-cell>
          <table:table-cell office:value-type="string">
            <text:p>0713</text:p>
          </table:table-cell>
        </table:table-row>
        <table:table-row>
          <table:table-cell office:value-type="string">
            <text:p>SkillGroup</text:p>
          </table:table-cell>
          <table:table-cell office:value-type="string">
            <text:p>http://data.europa.eu/esco/isced-f/0714</text:p>
          </table:table-cell>
          <table:table-cell office:value-type="string">
            <text:p>electronics and automation</text:p>
          </table:table-cell>
          <table:table-cell table:number-columns-repeated="2"/>
          <table:table-cell office:value-type="string">
            <text:p>released</text:p>
          </table:table-cell>
          <table:table-cell office:value-type="string">
            <text:p>2023-07-05T15:43:39.362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Electronics and automation is the study of planning, designing, developing maintaining and monitoring electronic equipment, machinery and systems. It includes designing computers and equipment for communication.<text:line-break/>Programmes and qualifications with the following main content are classified here:<text:line-break/>Broadcasting electronics<text:line-break/>Communication systems<text:line-break/>Communications equipment installation<text:line-break/>Communications equipment maintenance<text:line-break/>Computer engineering<text:line-break/>Computer repairing<text:line-break/>Control engineering<text:line-break/>Data processing technology<text:line-break/>Digital technology<text:line-break/>Electronic engineering<text:line-break/>Electronic equipment servicing<text:line-break/>Network technology<text:line-break/>Robotics<text:line-break/>Telecommunications technology<text:line-break/>Television and radio repairing === Exclusions<text:line-break/>Computer science (Software and applications development) is excluded from this detailed field and included under 0613 'Software and applications development and analysis'.</text:p>
          </table:table-cell>
          <table:table-cell office:value-type="string">
            <text:p>0714</text:p>
          </table:table-cell>
        </table:table-row>
        <table:table-row>
          <table:table-cell office:value-type="string">
            <text:p>SkillGroup</text:p>
          </table:table-cell>
          <table:table-cell office:value-type="string">
            <text:p>http://data.europa.eu/esco/isced-f/0715</text:p>
          </table:table-cell>
          <table:table-cell office:value-type="string">
            <text:p>mechanics and metal trades</text:p>
          </table:table-cell>
          <table:table-cell table:number-columns-repeated="2"/>
          <table:table-cell office:value-type="string">
            <text:p>released</text:p>
          </table:table-cell>
          <table:table-cell office:value-type="string">
            <text:p>2024-01-29T16:22:28.909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Mechanics and metal trades is the study of planning, designing, developing, producing, maintaining and monitoring machines, mechanical plants and systems and metal products. It includes designing and maintaining machines which produce goods and services. The focus of study in this detailed field is machines, mechanical systems and metal products.<text:line-break/>Programmes and qualifications with the following main content are classified here:<text:line-break/>Gunsmithing<text:line-break/>Hydraulics<text:line-break/>Locksmithing and safe repairing<text:line-break/>Mechanical engineering<text:line-break/>Mechanical trades<text:line-break/>Metal casting and patternmaking<text:line-break/>Metal fitting, turning and machining<text:line-break/>Metallurgical engineering<text:line-break/>Precision mechanics<text:line-break/>Sheet metal working<text:line-break/>Steel production<text:line-break/>Tool and die making<text:line-break/>Welding === Exclusions<text:line-break/>The study of motor vehicle mechanics and engineering is excluded from this detailed field and included in detailed field 0716 'Motor vehicles, ships and aircraft'.</text:p>
          </table:table-cell>
          <table:table-cell office:value-type="string">
            <text:p>0715</text:p>
          </table:table-cell>
        </table:table-row>
        <table:table-row>
          <table:table-cell office:value-type="string">
            <text:p>SkillGroup</text:p>
          </table:table-cell>
          <table:table-cell office:value-type="string">
            <text:p>http://data.europa.eu/esco/isced-f/0716</text:p>
          </table:table-cell>
          <table:table-cell office:value-type="string">
            <text:p>motor vehicles, ships and aircraft</text:p>
          </table:table-cell>
          <table:table-cell table:number-columns-repeated="2"/>
          <table:table-cell office:value-type="string">
            <text:p>released</text:p>
          </table:table-cell>
          <table:table-cell office:value-type="string">
            <text:p>2023-07-05T15:16:47.21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Motor vehicles, ships and aircraft is the study of designing, developing, producing, maintaining, diagnosing faults in, repairing and servicing motor vehicles, including earth moving equipment and agriculture machines, ships, trains and aircraft. Typical is the combination of studies in both metal structures and motors.<text:line-break/>Programmes and qualifications with the following main content are classified here:<text:line-break/>Aerospace engineering<text:line-break/>Aircraft engineering<text:line-break/>Aircraft maintenance<text:line-break/>Automotive electrical systems<text:line-break/>Automotive engineering<text:line-break/>Avionics<text:line-break/>Coachwork<text:line-break/>Marine engineering<text:line-break/>Motorcycle engineering<text:line-break/>Panel beating<text:line-break/>Shipbuilding<text:line-break/>Train repair and maintenance<text:line-break/>Vehicle building and repairing<text:line-break/>Vehicle varnishing/spraying === Inclusions<text:line-break/>Study of vehicle electrical systems is included here. === Exclusions<text:line-break/>Study of producing and repairing non-motorised vehicles is excluded from this detailed field and included in 0715 'Mechanics and metal work' (e.g. bicycles) or 0722 'Materials (glass, paper, plastic, wood)' (e.g. non-motor boats).</text:p>
          </table:table-cell>
          <table:table-cell office:value-type="string">
            <text:p>0716</text:p>
          </table:table-cell>
        </table:table-row>
        <table:table-row>
          <table:table-cell office:value-type="string">
            <text:p>SkillGroup</text:p>
          </table:table-cell>
          <table:table-cell office:value-type="string">
            <text:p>http://data.europa.eu/esco/isced-f/0719</text:p>
          </table:table-cell>
          <table:table-cell office:value-type="string">
            <text:p>engineering and engineering trades not elsewhere classifi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office:value-type="string">
            <text:p>Engineering studies not covered by other detailed fields are classified here:<text:line-break/>Nanotechnology.</text:p>
          </table:table-cell>
          <table:table-cell office:value-type="string">
            <text:p>0719</text:p>
          </table:table-cell>
        </table:table-row>
        <table:table-row>
          <table:table-cell office:value-type="string">
            <text:p>SkillGroup</text:p>
          </table:table-cell>
          <table:table-cell office:value-type="string">
            <text:p>http://data.europa.eu/esco/isced-f/072</text:p>
          </table:table-cell>
          <table:table-cell office:value-type="string">
            <text:p>manufacturing and processing</text:p>
          </table:table-cell>
          <table:table-cell table:number-columns-repeated="2"/>
          <table:table-cell office:value-type="string">
            <text:p>released</text:p>
          </table:table-cell>
          <table:table-cell office:value-type="string">
            <text:p>2023-07-05T15:26:59.847Z</text:p>
          </table:table-cell>
          <table:table-cell/>
          <table:table-cell office:value-type="string">
            <text:p>http://data.europa.eu/esco/concept-scheme/skills<text:line-break/>http://data.europa.eu/esco/concept-scheme/skills-hierarchy<text:line-break/>http://data.europa.eu/esco/concept-scheme/isced-f</text:p>
          </table:table-cell>
          <table:table-cell/>
          <table:table-cell office:value-type="string">
            <text:p>072</text:p>
          </table:table-cell>
        </table:table-row>
        <table:table-row>
          <table:table-cell office:value-type="string">
            <text:p>SkillGroup</text:p>
          </table:table-cell>
          <table:table-cell office:value-type="string">
            <text:p>http://data.europa.eu/esco/isced-f/0720</text:p>
          </table:table-cell>
          <table:table-cell office:value-type="string">
            <text:p>manufacturing and processing not further defin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720</text:p>
          </table:table-cell>
        </table:table-row>
        <table:table-row>
          <table:table-cell office:value-type="string">
            <text:p>SkillGroup</text:p>
          </table:table-cell>
          <table:table-cell office:value-type="string">
            <text:p>http://data.europa.eu/esco/isced-f/0721</text:p>
          </table:table-cell>
          <table:table-cell office:value-type="string">
            <text:p>food processing</text:p>
          </table:table-cell>
          <table:table-cell table:number-columns-repeated="2"/>
          <table:table-cell office:value-type="string">
            <text:p>released</text:p>
          </table:table-cell>
          <table:table-cell office:value-type="string">
            <text:p>2023-08-03T10:03:35.737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Food processing is the study of processing and packaging of food and beverages, and the equipment and procedures used in the production and distribution of foods.<text:line-break/>Programmes and qualifications with the following main content are classified here:<text:line-break/>Baking<text:line-break/>Beer brewing<text:line-break/>Butchery<text:line-break/>Confectionery<text:line-break/>Dairy foods<text:line-break/>Food and drink processing<text:line-break/>Food preservation<text:line-break/>Food science and technology<text:line-break/>Meat processing<text:line-break/>Pastry cooking<text:line-break/>Tobacco processing<text:line-break/>Wine production === Inclusions<text:line-break/>Study of food handling and food hygiene is included here. === Exclusions<text:line-break/>Restaurant and catering are excluded from this detailed field and included in detailed field 1013 'Hotel, restaurant and catering'.<text:line-break/>Nutrition science is excluded from this detailed field and included in narrow field 051 'Biological and related sciences'.<text:line-break/>0722 Materials (glass, paper, plastic and wood)<text:line-break/>Materials is the study of the manufacturing of products in glass, paper, plastic, wood or other materials like stone, clay, artificial materials etc. Programmes and qualifications included in this detailed field have more to do with a specific material than general technical knowledge.<text:line-break/>Programmes and qualifications with the following main content are classified here:<text:line-break/>Boat building (non-motor)<text:line-break/>Cabinet making<text:line-break/>Carpentry (furniture)<text:line-break/>Ceramics (industrial)<text:line-break/>Furniture making<text:line-break/>Glass working (industrial)<text:line-break/>Industrial diamond production<text:line-break/>Paper manufacturing and processing<text:line-break/>Plastic manufacturing<text:line-break/>Rubber processing<text:line-break/>Timber technology<text:line-break/>Wood machining and turning<text:line-break/>Woodwork trades === Exclusions<text:line-break/>Study of metal work is excluded from this detailed field and included in detailed field 0715 'Mechanics and metal trades'.<text:line-break/>Study of building carpentry and joinery is excluded from this detailed field and included in detailed field 0732 'Building and civil engineering'.<text:line-break/>Study of chemical processing in general is excluded from this detailed field and included in detailed field 0711 'Chemical engineering and processes'.<text:line-break/>Study of printing and bookbinding is excluded from this detailed field and included in detailed field 0211 'Audio-visual techniques and media production'.<text:line-break/>Handicrafts programmes (glass arts and crafts, woodcarving etc) are excluded from this detailed field and included in detailed field 0214 'Handicrafts'.<text:line-break/>0723 Textiles (clothes, footwear and leather)<text:line-break/>Textiles (clothes, footwear and leather) is the study of the manufacture of textiles, textile and leather products, clothing and related items, shoes and other forms of footwear.<text:line-break/>Programmes and qualifications with the following main content are classified here:<text:line-break/>Clothing trades<text:line-break/>Dressmaking<text:line-break/>Footwear making<text:line-break/>Fur making<text:line-break/>Garment production<text:line-break/>Leather processing<text:line-break/>Saddlery<text:line-break/>Shoemaking<text:line-break/>Skins and leather production<text:line-break/>Spinning<text:line-break/>Tailoring<text:line-break/>Textile trades<text:line-break/>Upholstery<text:line-break/>Weaving (industrial)<text:line-break/>Wool science === Exclusions<text:line-break/>Handicrafts studies (weaving, embroidery etc.) are excluded from this detailed field and included in detailed field 0214 'Handicrafts'.</text:p>
          </table:table-cell>
          <table:table-cell office:value-type="string">
            <text:p>0721</text:p>
          </table:table-cell>
        </table:table-row>
        <table:table-row>
          <table:table-cell office:value-type="string">
            <text:p>SkillGroup</text:p>
          </table:table-cell>
          <table:table-cell office:value-type="string">
            <text:p>http://data.europa.eu/esco/isced-f/0722</text:p>
          </table:table-cell>
          <table:table-cell office:value-type="string">
            <text:p>materials (glass, paper, plastic and wood)</text:p>
          </table:table-cell>
          <table:table-cell table:number-columns-repeated="2"/>
          <table:table-cell office:value-type="string">
            <text:p>released</text:p>
          </table:table-cell>
          <table:table-cell office:value-type="string">
            <text:p>2023-01-24T18:49:48.26Z</text:p>
          </table:table-cell>
          <table:table-cell/>
          <table:table-cell office:value-type="string">
            <text:p>http://data.europa.eu/esco/concept-scheme/skills<text:line-break/>http://data.europa.eu/esco/concept-scheme/skills-hierarchy<text:line-break/>http://data.europa.eu/esco/concept-scheme/isced-f</text:p>
          </table:table-cell>
          <table:table-cell/>
          <table:table-cell office:value-type="string">
            <text:p>0722</text:p>
          </table:table-cell>
        </table:table-row>
        <table:table-row>
          <table:table-cell office:value-type="string">
            <text:p>SkillGroup</text:p>
          </table:table-cell>
          <table:table-cell office:value-type="string">
            <text:p>http://data.europa.eu/esco/isced-f/0723</text:p>
          </table:table-cell>
          <table:table-cell office:value-type="string">
            <text:p>textiles (clothes, footwear and leather)</text:p>
          </table:table-cell>
          <table:table-cell table:number-columns-repeated="2"/>
          <table:table-cell office:value-type="string">
            <text:p>released</text:p>
          </table:table-cell>
          <table:table-cell office:value-type="string">
            <text:p>2020-12-07T15:19:56.923Z</text:p>
          </table:table-cell>
          <table:table-cell/>
          <table:table-cell office:value-type="string">
            <text:p>http://data.europa.eu/esco/concept-scheme/skills<text:line-break/>http://data.europa.eu/esco/concept-scheme/skills-hierarchy<text:line-break/>http://data.europa.eu/esco/concept-scheme/isced-f</text:p>
          </table:table-cell>
          <table:table-cell/>
          <table:table-cell office:value-type="string">
            <text:p>0723</text:p>
          </table:table-cell>
        </table:table-row>
        <table:table-row>
          <table:table-cell office:value-type="string">
            <text:p>SkillGroup</text:p>
          </table:table-cell>
          <table:table-cell office:value-type="string">
            <text:p>http://data.europa.eu/esco/isced-f/0724</text:p>
          </table:table-cell>
          <table:table-cell office:value-type="string">
            <text:p>mining and extraction</text:p>
          </table:table-cell>
          <table:table-cell table:number-columns-repeated="2"/>
          <table:table-cell office:value-type="string">
            <text:p>released</text:p>
          </table:table-cell>
          <table:table-cell office:value-type="string">
            <text:p>2023-01-27T16:39:07.762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Mining and extraction is the study of assessing, planning, developing, and directing the extraction of minerals, oil and gas from the earth.<text:line-break/>Programmes and qualifications with the following main content are classified here:<text:line-break/>Coal mining<text:line-break/>Mineral technology<text:line-break/>Mining of minerals<text:line-break/>Oil and gas drilling<text:line-break/>Oil and gas extraction<text:line-break/>Raw material extraction === Exclusions<text:line-break/>Study of metallurgical engineering is excluded from this detailed field and included in 0715 'Mechanics and metal trades'<text:line-break/>Study of geology is excluded from this detailed field and included in detailed field 0532 'Earth sciences'.</text:p>
          </table:table-cell>
          <table:table-cell office:value-type="string">
            <text:p>0724</text:p>
          </table:table-cell>
        </table:table-row>
        <table:table-row>
          <table:table-cell office:value-type="string">
            <text:p>SkillGroup</text:p>
          </table:table-cell>
          <table:table-cell office:value-type="string">
            <text:p>http://data.europa.eu/esco/isced-f/0729</text:p>
          </table:table-cell>
          <table:table-cell office:value-type="string">
            <text:p>manufacturing and processing not elsewhere classified</text:p>
          </table:table-cell>
          <table:table-cell table:number-columns-repeated="2"/>
          <table:table-cell office:value-type="string">
            <text:p>released</text:p>
          </table:table-cell>
          <table:table-cell office:value-type="string">
            <text:p>2022-01-13T15:06:17.576Z</text:p>
          </table:table-cell>
          <table:table-cell/>
          <table:table-cell office:value-type="string">
            <text:p>http://data.europa.eu/esco/concept-scheme/skills<text:line-break/>http://data.europa.eu/esco/concept-scheme/skills-hierarchy<text:line-break/>http://data.europa.eu/esco/concept-scheme/isced-f</text:p>
          </table:table-cell>
          <table:table-cell/>
          <table:table-cell office:value-type="string">
            <text:p>0729</text:p>
          </table:table-cell>
        </table:table-row>
        <table:table-row>
          <table:table-cell office:value-type="string">
            <text:p>SkillGroup</text:p>
          </table:table-cell>
          <table:table-cell office:value-type="string">
            <text:p>http://data.europa.eu/esco/isced-f/073</text:p>
          </table:table-cell>
          <table:table-cell office:value-type="string">
            <text:p>architecture and construction</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73</text:p>
          </table:table-cell>
        </table:table-row>
        <table:table-row>
          <table:table-cell office:value-type="string">
            <text:p>SkillGroup</text:p>
          </table:table-cell>
          <table:table-cell office:value-type="string">
            <text:p>http://data.europa.eu/esco/isced-f/0730</text:p>
          </table:table-cell>
          <table:table-cell office:value-type="string">
            <text:p>architecture and construction not further defin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730</text:p>
          </table:table-cell>
        </table:table-row>
        <table:table-row>
          <table:table-cell office:value-type="string">
            <text:p>SkillGroup</text:p>
          </table:table-cell>
          <table:table-cell office:value-type="string">
            <text:p>http://data.europa.eu/esco/isced-f/0731</text:p>
          </table:table-cell>
          <table:table-cell office:value-type="string">
            <text:p>architecture and town planning</text:p>
          </table:table-cell>
          <table:table-cell table:number-columns-repeated="2"/>
          <table:table-cell office:value-type="string">
            <text:p>released</text:p>
          </table:table-cell>
          <table:table-cell office:value-type="string">
            <text:p>2024-01-29T16:17:36.811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Architecture is the study of the art, science and techniques of building design. It encompasses both utilitarian ends - such as the soundness of the structure and the functional and economic efficiency of the building - and aesthetic considerations. Town planning is the study of the regulated growth and improvement of towns in both functional and aesthetical points of view.<text:line-break/>Programmes and qualifications with the following main content are classified here:<text:line-break/>Architectural urban design and planning<text:line-break/>Architecture<text:line-break/>Building design<text:line-break/>Cartography/Land surveying<text:line-break/>City planning<text:line-break/>Community development<text:line-break/>Landscape architecture<text:line-break/>Structural architecture<text:line-break/>Surveying<text:line-break/>Town and country planning<text:line-break/>Urban planning === Exclusions<text:line-break/>Study of interior design is excluded from this detailed field and included in detailed field 0212 'Fashion, interior and industrial design'. Geomatics is excluded from this detailed field and included in detailed field 0532 'Earth science'.<text:line-break/>The laying out and construction of parks and gardens is excluded from this detailed field and included in detailed field 0812 'Horticulture'.</text:p>
          </table:table-cell>
          <table:table-cell office:value-type="string">
            <text:p>0731</text:p>
          </table:table-cell>
        </table:table-row>
        <table:table-row>
          <table:table-cell office:value-type="string">
            <text:p>SkillGroup</text:p>
          </table:table-cell>
          <table:table-cell office:value-type="string">
            <text:p>http://data.europa.eu/esco/isced-f/0732</text:p>
          </table:table-cell>
          <table:table-cell office:value-type="string">
            <text:p>building and civil engineering</text:p>
          </table:table-cell>
          <table:table-cell table:number-columns-repeated="2"/>
          <table:table-cell office:value-type="string">
            <text:p>released</text:p>
          </table:table-cell>
          <table:table-cell office:value-type="string">
            <text:p>2024-01-29T17:05:50.79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Building is the study of the science, technology and techniques of assembling, erecting and maintaining public, commercial, industrial and residential structures and their fittings. Civil engineering is the study of planning, designing, testing and directing the construction of large scale buildings and structures, including systems for transport, water supply, sewage etc.<text:line-break/>Programmes and qualifications with the following main content are classified here:<text:line-break/>Bricklaying<text:line-break/>Bridge construction<text:line-break/>Building construction<text:line-break/>Building engineering<text:line-break/>Building technology<text:line-break/>Carpentry and joinery (building)<text:line-break/>Civil engineering<text:line-break/>Construction equipment<text:line-break/>Constructional metalwork (building)<text:line-break/>Dock and harbour engineering<text:line-break/>Floor and wall tiling<text:line-break/>Floor covering<text:line-break/>House building<text:line-break/>Industrial abseiling (commercial)<text:line-break/>Masonry and tile setting<text:line-break/>Painting and wall covering<text:line-break/>Plastering<text:line-break/>Plumbing and pipefitting<text:line-break/>Road building<text:line-break/>Water engineering and technology<text:line-break/>Water supply and sewerage engineering<text:line-break/>Ventilation === Exclusions<text:line-break/>Installation of electricity is excluded from this detailed field and included in detailed field 0713 'Electricity and energy'. Similarly, installing and repairing of heating, air-conditioning and refrigeration equipment is excluded from this detailed field and included in detailed field 0713 'Electricity and energy'.</text:p>
          </table:table-cell>
          <table:table-cell office:value-type="string">
            <text:p>0732</text:p>
          </table:table-cell>
        </table:table-row>
        <table:table-row>
          <table:table-cell office:value-type="string">
            <text:p>SkillGroup</text:p>
          </table:table-cell>
          <table:table-cell office:value-type="string">
            <text:p>http://data.europa.eu/esco/isced-f/078</text:p>
          </table:table-cell>
          <table:table-cell office:value-type="string">
            <text:p>inter-disciplinary programmes and qualifications involving engineering, manufacturing and construction</text:p>
          </table:table-cell>
          <table:table-cell table:number-columns-repeated="2"/>
          <table:table-cell office:value-type="string">
            <text:p>released</text:p>
          </table:table-cell>
          <table:table-cell office:value-type="string">
            <text:p>2023-10-30T09:59:15.592Z</text:p>
          </table:table-cell>
          <table:table-cell/>
          <table:table-cell office:value-type="string">
            <text:p>http://data.europa.eu/esco/concept-scheme/skills<text:line-break/>http://data.europa.eu/esco/concept-scheme/skills-hierarchy<text:line-break/>http://data.europa.eu/esco/concept-scheme/isced-f</text:p>
          </table:table-cell>
          <table:table-cell/>
          <table:table-cell office:value-type="string">
            <text:p>078</text:p>
          </table:table-cell>
        </table:table-row>
        <table:table-row>
          <table:table-cell office:value-type="string">
            <text:p>SkillGroup</text:p>
          </table:table-cell>
          <table:table-cell office:value-type="string">
            <text:p>http://data.europa.eu/esco/isced-f/0788</text:p>
          </table:table-cell>
          <table:table-cell office:value-type="string">
            <text:p>inter-disciplinary programmes and qualifications involving engineering, manufacturing and construction</text:p>
          </table:table-cell>
          <table:table-cell table:number-columns-repeated="2"/>
          <table:table-cell office:value-type="string">
            <text:p>released</text:p>
          </table:table-cell>
          <table:table-cell office:value-type="string">
            <text:p>2023-07-03T14:54:39.891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Inter-disciplinary or broad programmes and qualifications to which the greatest intended learning time is devoted to engineering, manufacturing and construction are classified here.</text:p>
          </table:table-cell>
          <table:table-cell office:value-type="string">
            <text:p>0788</text:p>
          </table:table-cell>
        </table:table-row>
        <table:table-row>
          <table:table-cell office:value-type="string">
            <text:p>SkillGroup</text:p>
          </table:table-cell>
          <table:table-cell office:value-type="string">
            <text:p>http://data.europa.eu/esco/isced-f/079</text:p>
          </table:table-cell>
          <table:table-cell office:value-type="string">
            <text:p>engineering, manufacturing and construction not elsewhere classified</text:p>
          </table:table-cell>
          <table:table-cell table:number-columns-repeated="2"/>
          <table:table-cell office:value-type="string">
            <text:p>released</text:p>
          </table:table-cell>
          <table:table-cell office:value-type="string">
            <text:p>2022-01-13T15:04:52.225Z</text:p>
          </table:table-cell>
          <table:table-cell/>
          <table:table-cell office:value-type="string">
            <text:p>http://data.europa.eu/esco/concept-scheme/skills<text:line-break/>http://data.europa.eu/esco/concept-scheme/skills-hierarchy<text:line-break/>http://data.europa.eu/esco/concept-scheme/isced-f</text:p>
          </table:table-cell>
          <table:table-cell/>
          <table:table-cell office:value-type="string">
            <text:p>079</text:p>
          </table:table-cell>
        </table:table-row>
        <table:table-row>
          <table:table-cell office:value-type="string">
            <text:p>SkillGroup</text:p>
          </table:table-cell>
          <table:table-cell office:value-type="string">
            <text:p>http://data.europa.eu/esco/isced-f/0799</text:p>
          </table:table-cell>
          <table:table-cell office:value-type="string">
            <text:p>engineering, manufacturing and construction not elsewhere classified</text:p>
          </table:table-cell>
          <table:table-cell table:number-columns-repeated="2"/>
          <table:table-cell office:value-type="string">
            <text:p>released</text:p>
          </table:table-cell>
          <table:table-cell office:value-type="string">
            <text:p>2023-10-30T09:59:05.5Z</text:p>
          </table:table-cell>
          <table:table-cell/>
          <table:table-cell office:value-type="string">
            <text:p>http://data.europa.eu/esco/concept-scheme/skills<text:line-break/>http://data.europa.eu/esco/concept-scheme/skills-hierarchy<text:line-break/>http://data.europa.eu/esco/concept-scheme/isced-f</text:p>
          </table:table-cell>
          <table:table-cell/>
          <table:table-cell office:value-type="string">
            <text:p>0799</text:p>
          </table:table-cell>
        </table:table-row>
        <table:table-row>
          <table:table-cell office:value-type="string">
            <text:p>SkillGroup</text:p>
          </table:table-cell>
          <table:table-cell office:value-type="string">
            <text:p>http://data.europa.eu/esco/isced-f/08</text:p>
          </table:table-cell>
          <table:table-cell office:value-type="string">
            <text:p>agriculture, forestry, fisheries and veterinary</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8</text:p>
          </table:table-cell>
        </table:table-row>
        <table:table-row>
          <table:table-cell office:value-type="string">
            <text:p>SkillGroup</text:p>
          </table:table-cell>
          <table:table-cell office:value-type="string">
            <text:p>http://data.europa.eu/esco/isced-f/080</text:p>
          </table:table-cell>
          <table:table-cell office:value-type="string">
            <text:p>agriculture, forestry, fisheries and veterinary not further defin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80</text:p>
          </table:table-cell>
        </table:table-row>
        <table:table-row>
          <table:table-cell office:value-type="string">
            <text:p>SkillGroup</text:p>
          </table:table-cell>
          <table:table-cell office:value-type="string">
            <text:p>http://data.europa.eu/esco/isced-f/0800</text:p>
          </table:table-cell>
          <table:table-cell office:value-type="string">
            <text:p>agriculture, forestry, fisheries and veterinary not further defin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800</text:p>
          </table:table-cell>
        </table:table-row>
        <table:table-row>
          <table:table-cell office:value-type="string">
            <text:p>SkillGroup</text:p>
          </table:table-cell>
          <table:table-cell office:value-type="string">
            <text:p>http://data.europa.eu/esco/isced-f/081</text:p>
          </table:table-cell>
          <table:table-cell office:value-type="string">
            <text:p>agriculture</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81</text:p>
          </table:table-cell>
        </table:table-row>
        <table:table-row>
          <table:table-cell office:value-type="string">
            <text:p>SkillGroup</text:p>
          </table:table-cell>
          <table:table-cell office:value-type="string">
            <text:p>http://data.europa.eu/esco/isced-f/0810</text:p>
          </table:table-cell>
          <table:table-cell office:value-type="string">
            <text:p>agriculture not further defin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810</text:p>
          </table:table-cell>
        </table:table-row>
        <table:table-row>
          <table:table-cell office:value-type="string">
            <text:p>SkillGroup</text:p>
          </table:table-cell>
          <table:table-cell office:value-type="string">
            <text:p>http://data.europa.eu/esco/isced-f/0811</text:p>
          </table:table-cell>
          <table:table-cell office:value-type="string">
            <text:p>crop and livestock production</text:p>
          </table:table-cell>
          <table:table-cell table:number-columns-repeated="2"/>
          <table:table-cell office:value-type="string">
            <text:p>released</text:p>
          </table:table-cell>
          <table:table-cell office:value-type="string">
            <text:p>2021-03-16T13:50:53.105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Crop and livestock production is the study of growing, maintaining and harvesting crops and pastures, and grazing and managing animals. It includes the study of managing and maintaining farms and producing unprocessed plant and animal products.<text:line-break/>Programmes and qualifications with the following main content are classified here:<text:line-break/>Agricultural sciences<text:line-break/>Agronomy and crop science<text:line-break/>Animal husbandry<text:line-break/>Crop growing<text:line-break/>Dog breeding<text:line-break/>Farm and ranch management<text:line-break/>Farming<text:line-break/>Fruit growing<text:line-break/>Grain growing<text:line-break/>Horse breeding<text:line-break/>Pig farming<text:line-break/>Poultry husbandry<text:line-break/>Rice farming<text:line-break/>Rye and wheat growing<text:line-break/>Sheep farming<text:line-break/>Soil science<text:line-break/>Sugar cane growing<text:line-break/>Vegetable planting<text:line-break/>Wine growing === Inclusions<text:line-break/>Study of soil fertility and irrigation techniques are included here.<text:line-break/>Study of growing intensively managed crops such as fruit and vegetables is included here. === Exclusions<text:line-break/>Study of wine production is excluded from this detailed field and is included in detailed field 0721 'Food processing'.<text:line-break/>Jockeying is excluded from this detailed field and is included in detailed field 1014 'Sports'.</text:p>
          </table:table-cell>
          <table:table-cell office:value-type="string">
            <text:p>0811</text:p>
          </table:table-cell>
        </table:table-row>
        <table:table-row>
          <table:table-cell office:value-type="string">
            <text:p>SkillGroup</text:p>
          </table:table-cell>
          <table:table-cell office:value-type="string">
            <text:p>http://data.europa.eu/esco/isced-f/0812</text:p>
          </table:table-cell>
          <table:table-cell office:value-type="string">
            <text:p>horticulture</text:p>
          </table:table-cell>
          <table:table-cell table:number-columns-repeated="2"/>
          <table:table-cell office:value-type="string">
            <text:p>released</text:p>
          </table:table-cell>
          <table:table-cell office:value-type="string">
            <text:p>2021-03-12T10:30:59.29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Horticulture is the study of horticultural technology and management, floriculture, greenhouse methods, nursery management, landscape gardening etc.<text:line-break/>Programmes and qualifications with the following main content are classified here:<text:line-break/>Floriculture<text:line-break/>Gardening<text:line-break/>Green keeping<text:line-break/>Horticultural techniques<text:line-break/>Nursery management<text:line-break/>Turf cultivation === Inclusions<text:line-break/>The laying out and construction of urban and domestic parks and gardens is included here.<text:line-break/>Gardening programmes combining floriculture and growing vegetables are included here. === Exclusions<text:line-break/>Study of growing edible crops (such as wheat, rice, fruit, vegetables etc,) is excluded from this detailed field and included in detailed field 0811 'Crop and livestock production'.<text:line-break/>Study of soil science, soil fertility and irrigation techniques is excluded from this detailed field and included in detailed field 0811 'Crop and livestock production'.<text:line-break/>Study of National park management is excluded from this detailed field and included in detailed field 0522 'Natural environments and wildlife'.<text:line-break/>Study of Landscape architecture is excluded from this detailed field and included in detailed field 0731 'Architecture and town planning'.</text:p>
          </table:table-cell>
          <table:table-cell office:value-type="string">
            <text:p>0812</text:p>
          </table:table-cell>
        </table:table-row>
        <table:table-row>
          <table:table-cell office:value-type="string">
            <text:p>SkillGroup</text:p>
          </table:table-cell>
          <table:table-cell office:value-type="string">
            <text:p>http://data.europa.eu/esco/isced-f/0819</text:p>
          </table:table-cell>
          <table:table-cell office:value-type="string">
            <text:p>agriculture not elsewhere classifi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819</text:p>
          </table:table-cell>
        </table:table-row>
        <table:table-row>
          <table:table-cell office:value-type="string">
            <text:p>SkillGroup</text:p>
          </table:table-cell>
          <table:table-cell office:value-type="string">
            <text:p>http://data.europa.eu/esco/isced-f/082</text:p>
          </table:table-cell>
          <table:table-cell office:value-type="string">
            <text:p>forestry</text:p>
          </table:table-cell>
          <table:table-cell table:number-columns-repeated="2"/>
          <table:table-cell office:value-type="string">
            <text:p>released</text:p>
          </table:table-cell>
          <table:table-cell office:value-type="string">
            <text:p>2023-06-20T16:06:13.799Z</text:p>
          </table:table-cell>
          <table:table-cell/>
          <table:table-cell office:value-type="string">
            <text:p>http://data.europa.eu/esco/concept-scheme/skills<text:line-break/>http://data.europa.eu/esco/concept-scheme/skills-hierarchy<text:line-break/>http://data.europa.eu/esco/concept-scheme/isced-f</text:p>
          </table:table-cell>
          <table:table-cell/>
          <table:table-cell office:value-type="string">
            <text:p>082</text:p>
          </table:table-cell>
        </table:table-row>
        <table:table-row>
          <table:table-cell office:value-type="string">
            <text:p>SkillGroup</text:p>
          </table:table-cell>
          <table:table-cell office:value-type="string">
            <text:p>http://data.europa.eu/esco/isced-f/0821</text:p>
          </table:table-cell>
          <table:table-cell office:value-type="string">
            <text:p>forestry</text:p>
          </table:table-cell>
          <table:table-cell table:number-columns-repeated="2"/>
          <table:table-cell office:value-type="string">
            <text:p>released</text:p>
          </table:table-cell>
          <table:table-cell office:value-type="string">
            <text:p>2021-04-14T08:06:48.503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Forestry is the study of establishing, cultivating, harvesting and managing forests. It includes the study of hunting and trapping.<text:line-break/>Programmes and qualifications with the following main content are classified here:<text:line-break/>Charcoal burning<text:line-break/>Forest keeping<text:line-break/>Forest product techniques<text:line-break/>Forestry<text:line-break/>Hunting and trapping<text:line-break/>Logging<text:line-break/>Tree felling === Exclusions<text:line-break/>Study of National park management is excluded from this detailed field and included in detailed field 0522 'Natural environments and wildlife'.<text:line-break/>Timber technology (sawmill production etc) is excluded from this detailed field and included in detailed field 0722 'Materials (glass, paper, plastic and wood)'.</text:p>
          </table:table-cell>
          <table:table-cell office:value-type="string">
            <text:p>0821</text:p>
          </table:table-cell>
        </table:table-row>
        <table:table-row>
          <table:table-cell office:value-type="string">
            <text:p>SkillGroup</text:p>
          </table:table-cell>
          <table:table-cell office:value-type="string">
            <text:p>http://data.europa.eu/esco/isced-f/083</text:p>
          </table:table-cell>
          <table:table-cell office:value-type="string">
            <text:p>fisheries</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83</text:p>
          </table:table-cell>
        </table:table-row>
        <table:table-row>
          <table:table-cell office:value-type="string">
            <text:p>SkillGroup</text:p>
          </table:table-cell>
          <table:table-cell office:value-type="string">
            <text:p>http://data.europa.eu/esco/isced-f/0831</text:p>
          </table:table-cell>
          <table:table-cell office:value-type="string">
            <text:p>fisheries</text:p>
          </table:table-cell>
          <table:table-cell table:number-columns-repeated="2"/>
          <table:table-cell office:value-type="string">
            <text:p>released</text:p>
          </table:table-cell>
          <table:table-cell office:value-type="string">
            <text:p>2021-03-16T13:50:37.609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Fisheries is the study of breeding, rearing and harvesting fish and other seafood.<text:line-break/>Programmes and qualifications with the following main content are classified here:<text:line-break/>Aquaculture<text:line-break/>Fish breeding<text:line-break/>Fish farms<text:line-break/>Fishery science and technology<text:line-break/>Pearl cultivating<text:line-break/>Seafood farming<text:line-break/>Shellfish breeding === Inclusions<text:line-break/>Programmes for operating fishing boats are included here. === Exclusions<text:line-break/>Study of industrial processing of fish is excluded from this detailed field and included in detailed field 0721 'Food processing'.</text:p>
          </table:table-cell>
          <table:table-cell office:value-type="string">
            <text:p>0831</text:p>
          </table:table-cell>
        </table:table-row>
        <table:table-row>
          <table:table-cell office:value-type="string">
            <text:p>SkillGroup</text:p>
          </table:table-cell>
          <table:table-cell office:value-type="string">
            <text:p>http://data.europa.eu/esco/isced-f/084</text:p>
          </table:table-cell>
          <table:table-cell office:value-type="string">
            <text:p>veterinary</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84</text:p>
          </table:table-cell>
        </table:table-row>
        <table:table-row>
          <table:table-cell office:value-type="string">
            <text:p>SkillGroup</text:p>
          </table:table-cell>
          <table:table-cell office:value-type="string">
            <text:p>http://data.europa.eu/esco/isced-f/0841</text:p>
          </table:table-cell>
          <table:table-cell office:value-type="string">
            <text:p>veterinary</text:p>
          </table:table-cell>
          <table:table-cell table:number-columns-repeated="2"/>
          <table:table-cell office:value-type="string">
            <text:p>released</text:p>
          </table:table-cell>
          <table:table-cell office:value-type="string">
            <text:p>2023-02-22T20:03:53.109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Veterinary is the study of preventing, diagnosing and treating diseases and injuries in animals, and their general care. The study of caring for sick, injured and infirm animals undergoing treatment in veterinary clinics is included. It also includes the study of providing assistance to veterinary scientists.<text:line-break/>Programmes and qualifications with the following main content are classified here:<text:line-break/>Animal health care<text:line-break/>Animal reproduction (science)<text:line-break/>Artificial insemination (of animals)<text:line-break/>Veterinary assisting<text:line-break/>Veterinary medicine<text:line-break/>Veterinary nursing<text:line-break/>Veterinary science === Inclusions<text:line-break/>The science of animal reproduction is included here. === Exclusions<text:line-break/>Study of animal breeding is excluded from this detailed field and included in detailed field 0811 'Crop and livestock production'.</text:p>
          </table:table-cell>
          <table:table-cell office:value-type="string">
            <text:p>0841</text:p>
          </table:table-cell>
        </table:table-row>
        <table:table-row>
          <table:table-cell office:value-type="string">
            <text:p>SkillGroup</text:p>
          </table:table-cell>
          <table:table-cell office:value-type="string">
            <text:p>http://data.europa.eu/esco/isced-f/088</text:p>
          </table:table-cell>
          <table:table-cell office:value-type="string">
            <text:p>inter-disciplinary programmes and qualifications involving agriculture, forestry, fisheries and veterinary</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88</text:p>
          </table:table-cell>
        </table:table-row>
        <table:table-row>
          <table:table-cell office:value-type="string">
            <text:p>SkillGroup</text:p>
          </table:table-cell>
          <table:table-cell office:value-type="string">
            <text:p>http://data.europa.eu/esco/isced-f/0888</text:p>
          </table:table-cell>
          <table:table-cell office:value-type="string">
            <text:p>inter-disciplinary programmes and qualifications involving agriculture, forestry, fisheries and veterinary</text:p>
          </table:table-cell>
          <table:table-cell table:number-columns-repeated="2"/>
          <table:table-cell office:value-type="string">
            <text:p>released</text:p>
          </table:table-cell>
          <table:table-cell office:value-type="string">
            <text:p>2024-07-03T13:04:53.26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Inter-disciplinary or broad programmes and qualifications to which the greatest intended learning time is devoted to agriculture, forestry, fisheries and veterinary are classified here.</text:p>
          </table:table-cell>
          <table:table-cell office:value-type="string">
            <text:p>0888</text:p>
          </table:table-cell>
        </table:table-row>
        <table:table-row>
          <table:table-cell office:value-type="string">
            <text:p>SkillGroup</text:p>
          </table:table-cell>
          <table:table-cell office:value-type="string">
            <text:p>http://data.europa.eu/esco/isced-f/089</text:p>
          </table:table-cell>
          <table:table-cell office:value-type="string">
            <text:p>agriculture, forestry, fisheries and veterinary not elsewhere classifi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89</text:p>
          </table:table-cell>
        </table:table-row>
        <table:table-row>
          <table:table-cell office:value-type="string">
            <text:p>SkillGroup</text:p>
          </table:table-cell>
          <table:table-cell office:value-type="string">
            <text:p>http://data.europa.eu/esco/isced-f/0899</text:p>
          </table:table-cell>
          <table:table-cell office:value-type="string">
            <text:p>agriculture, forestry, fisheries and veterinary not elsewhere classifi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899</text:p>
          </table:table-cell>
        </table:table-row>
        <table:table-row>
          <table:table-cell office:value-type="string">
            <text:p>SkillGroup</text:p>
          </table:table-cell>
          <table:table-cell office:value-type="string">
            <text:p>http://data.europa.eu/esco/isced-f/09</text:p>
          </table:table-cell>
          <table:table-cell office:value-type="string">
            <text:p>health and welfare</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9</text:p>
          </table:table-cell>
        </table:table-row>
        <table:table-row>
          <table:table-cell office:value-type="string">
            <text:p>SkillGroup</text:p>
          </table:table-cell>
          <table:table-cell office:value-type="string">
            <text:p>http://data.europa.eu/esco/isced-f/090</text:p>
          </table:table-cell>
          <table:table-cell office:value-type="string">
            <text:p>health and welfare not further defin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90</text:p>
          </table:table-cell>
        </table:table-row>
        <table:table-row>
          <table:table-cell office:value-type="string">
            <text:p>SkillGroup</text:p>
          </table:table-cell>
          <table:table-cell office:value-type="string">
            <text:p>http://data.europa.eu/esco/isced-f/0900</text:p>
          </table:table-cell>
          <table:table-cell office:value-type="string">
            <text:p>health and welfare not further defined</text:p>
          </table:table-cell>
          <table:table-cell table:number-columns-repeated="2"/>
          <table:table-cell office:value-type="string">
            <text:p>released</text:p>
          </table:table-cell>
          <table:table-cell office:value-type="string">
            <text:p>2024-04-10T10:11:41.662Z</text:p>
          </table:table-cell>
          <table:table-cell/>
          <table:table-cell office:value-type="string">
            <text:p>http://data.europa.eu/esco/concept-scheme/skills<text:line-break/>http://data.europa.eu/esco/concept-scheme/skills-hierarchy<text:line-break/>http://data.europa.eu/esco/concept-scheme/isced-f</text:p>
          </table:table-cell>
          <table:table-cell/>
          <table:table-cell office:value-type="string">
            <text:p>0900</text:p>
          </table:table-cell>
        </table:table-row>
        <table:table-row>
          <table:table-cell office:value-type="string">
            <text:p>SkillGroup</text:p>
          </table:table-cell>
          <table:table-cell office:value-type="string">
            <text:p>http://data.europa.eu/esco/isced-f/091</text:p>
          </table:table-cell>
          <table:table-cell office:value-type="string">
            <text:p>health</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91</text:p>
          </table:table-cell>
        </table:table-row>
        <table:table-row>
          <table:table-cell office:value-type="string">
            <text:p>SkillGroup</text:p>
          </table:table-cell>
          <table:table-cell office:value-type="string">
            <text:p>http://data.europa.eu/esco/isced-f/0910</text:p>
          </table:table-cell>
          <table:table-cell office:value-type="string">
            <text:p>health not further defin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910</text:p>
          </table:table-cell>
        </table:table-row>
        <table:table-row>
          <table:table-cell office:value-type="string">
            <text:p>SkillGroup</text:p>
          </table:table-cell>
          <table:table-cell office:value-type="string">
            <text:p>http://data.europa.eu/esco/isced-f/0911</text:p>
          </table:table-cell>
          <table:table-cell office:value-type="string">
            <text:p>dental studies</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office:value-type="string">
            <text:p>Dental studies are the study of diagnosing, treating and preventing diseases and abnormalities of the teeth and gums. It includes the study of designing, making and repairing dental prostheses and orthodontic appliances. It also includes the study of providing assistance to dentists.<text:line-break/>Programmes and qualifications with the following main content are classified here:<text:line-break/>Dental assisting<text:line-break/>Dental hygiene<text:line-break/>Dental laboratory technology<text:line-break/>Dental nursing<text:line-break/>Dental science<text:line-break/>Dental surgery<text:line-break/>Dental technology<text:line-break/>Odontology<text:line-break/>Oral surgery<text:line-break/>Orthodontics === Inclusions<text:line-break/>Study of public dental health is included here.</text:p>
          </table:table-cell>
          <table:table-cell office:value-type="string">
            <text:p>0911</text:p>
          </table:table-cell>
        </table:table-row>
        <table:table-row>
          <table:table-cell office:value-type="string">
            <text:p>SkillGroup</text:p>
          </table:table-cell>
          <table:table-cell office:value-type="string">
            <text:p>http://data.europa.eu/esco/isced-f/0912</text:p>
          </table:table-cell>
          <table:table-cell office:value-type="string">
            <text:p>medicine</text:p>
          </table:table-cell>
          <table:table-cell table:number-columns-repeated="2"/>
          <table:table-cell office:value-type="string">
            <text:p>released</text:p>
          </table:table-cell>
          <table:table-cell office:value-type="string">
            <text:p>2023-07-05T15:39:12.407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Medicine is the study of the principles and procedures used in preventing, diagnosing, caring for and treating illness, disease and injury in humans and the maintenance of general health. Principally, this detailed field consists of training of physicians/doctors.<text:line-break/>Programmes and qualifications with the following main content are classified here:<text:line-break/>Anaesthetics<text:line-break/>Forensic medicine<text:line-break/>Forensic pathology<text:line-break/>General medicine<text:line-break/>Gerontology<text:line-break/>Gynaecology<text:line-break/>Medical science<text:line-break/>Medical training<text:line-break/>Medicine<text:line-break/>Paediatrics<text:line-break/>Psychiatry<text:line-break/>Surgery<text:line-break/>Training of physicians/doctors.</text:p>
          </table:table-cell>
          <table:table-cell office:value-type="string">
            <text:p>0912</text:p>
          </table:table-cell>
        </table:table-row>
        <table:table-row>
          <table:table-cell office:value-type="string">
            <text:p>SkillGroup</text:p>
          </table:table-cell>
          <table:table-cell office:value-type="string">
            <text:p>http://data.europa.eu/esco/isced-f/0913</text:p>
          </table:table-cell>
          <table:table-cell office:value-type="string">
            <text:p>nursing and midwifery</text:p>
          </table:table-cell>
          <table:table-cell table:number-columns-repeated="2"/>
          <table:table-cell office:value-type="string">
            <text:p>released</text:p>
          </table:table-cell>
          <table:table-cell office:value-type="string">
            <text:p>2021-09-20T12:26:36.821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Nursing is the study of providing health care for the sick, disabled or infirm and assisting physicians and other medical and health professionals diagnose and treat patients. The focus of qualifications in nursing is maintaining and caring for the health of patients during illness and rehabilitation. It includes health care of old people and health care of the disabled. Midwifery is the study of providing care to childbearing women during pregnancy, labour and birth and during the postpartum period. It also includes caring for the new born and assisting the mother with breast feeding.<text:line-break/>Programmes and qualifications with the following main content are classified here:<text:line-break/>Assistant nursing<text:line-break/>Basic nursing<text:line-break/>General nursing<text:line-break/>Health care of old people<text:line-break/>Heath care of the disabled<text:line-break/>Health care programmes<text:line-break/>Infant hygiene (nursing)<text:line-break/>Midwifery<text:line-break/>Nursing aide/Orderly<text:line-break/>Psychiatric nursing<text:line-break/>Specialised nursing === Inclusions<text:line-break/>Care programmes comprising both health care and social care e.g. for old people, are included here. === Exclusions<text:line-break/>Veterinary nursing is excluded from this detailed field and is included in detailed field 0841 'Veterinary'.<text:line-break/>Dental nursing is excluded from this detailed field and is included in detailed field 0911 'Dental studies'.<text:line-break/>Non-medical care of children (not health care) is excluded from this detailed field and included in detailed field 0922 'Child care and youth services'.<text:line-break/>Non-medical care of the elderly (not health care) is excluded from this detailed field and included in detailed field 0921 'Care of the elderly and disabled adults'.</text:p>
          </table:table-cell>
          <table:table-cell office:value-type="string">
            <text:p>0913</text:p>
          </table:table-cell>
        </table:table-row>
        <table:table-row>
          <table:table-cell office:value-type="string">
            <text:p>SkillGroup</text:p>
          </table:table-cell>
          <table:table-cell office:value-type="string">
            <text:p>http://data.europa.eu/esco/isced-f/0914</text:p>
          </table:table-cell>
          <table:table-cell office:value-type="string">
            <text:p>medical diagnostic and treatment technology</text:p>
          </table:table-cell>
          <table:table-cell table:number-columns-repeated="2"/>
          <table:table-cell office:value-type="string">
            <text:p>released</text:p>
          </table:table-cell>
          <table:table-cell office:value-type="string">
            <text:p>2023-07-04T12:51:47.743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Medical diagnostic and treatment technology is the study of a wide range of technologies used for diagnosing and treating diseases and handicaps.<text:line-break/>Programmes and qualifications with the following main content are classified here:<text:line-break/>Ambulance technology<text:line-break/>Hearing aid technology<text:line-break/>Medical laboratory technology<text:line-break/>Optical technology<text:line-break/>Prosthetic technology<text:line-break/>Radiology technology<text:line-break/>Radiotherapy<text:line-break/>X-ray technology (medical) === Exclusions<text:line-break/>Study of laboratory technology is excluded from this detailed field if emphasis is not given to medical laboratory technology. General laboratory technology is included in detailed field 0711 'Chemical engineering and processes'. Laboratory technology where emphasis is given to other specific applications (biology, chemistry, physics etc) is included in the appropriate detailed field (0511, 0531, 0533 etc.).<text:line-break/>Study of dental technology is excluded from this detailed field and included in detailed field 0911 'Dental studies'.</text:p>
          </table:table-cell>
          <table:table-cell office:value-type="string">
            <text:p>0914</text:p>
          </table:table-cell>
        </table:table-row>
        <table:table-row>
          <table:table-cell office:value-type="string">
            <text:p>SkillGroup</text:p>
          </table:table-cell>
          <table:table-cell office:value-type="string">
            <text:p>http://data.europa.eu/esco/isced-f/0915</text:p>
          </table:table-cell>
          <table:table-cell office:value-type="string">
            <text:p>therapy and rehabilitation</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office:value-type="string">
            <text:p>Therapy and rehabilitation is the study of restoring normal physical conditions to those incapacitated by temporary or permanent disability.<text:line-break/>Programmes and qualifications with the following main content are classified here:<text:line-break/>Dietician programmes<text:line-break/>Medical massage<text:line-break/>Nutrition/Dietetics<text:line-break/>Occupational therapy<text:line-break/>Physiotherapy<text:line-break/>Rehabilitation<text:line-break/>Speech therapy === Exclusions<text:line-break/>Study of psychotherapy is excluded from this detailed field and included in detailed field 0313 'Psychology'.<text:line-break/>Study of nutrition science is excluded from this detailed field and included in narrow field 051 'Biological and related sciences'.</text:p>
          </table:table-cell>
          <table:table-cell office:value-type="string">
            <text:p>0915</text:p>
          </table:table-cell>
        </table:table-row>
        <table:table-row>
          <table:table-cell office:value-type="string">
            <text:p>SkillGroup</text:p>
          </table:table-cell>
          <table:table-cell office:value-type="string">
            <text:p>http://data.europa.eu/esco/isced-f/0916</text:p>
          </table:table-cell>
          <table:table-cell office:value-type="string">
            <text:p>pharmacy</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office:value-type="string">
            <text:p>Pharmacy is the study of drugs and their effects on humans. It includes their preparation, dispensing and administration.<text:line-break/>Programmes and qualifications with the following main content are classified here:<text:line-break/>Dispensing pharmacy<text:line-break/>Pharmacy === Exclusions<text:line-break/>Study of pharmacology is excluded from this detailed field and included in detailed field 0511 'Biology'.</text:p>
          </table:table-cell>
          <table:table-cell office:value-type="string">
            <text:p>0916</text:p>
          </table:table-cell>
        </table:table-row>
        <table:table-row>
          <table:table-cell office:value-type="string">
            <text:p>SkillGroup</text:p>
          </table:table-cell>
          <table:table-cell office:value-type="string">
            <text:p>http://data.europa.eu/esco/isced-f/0917</text:p>
          </table:table-cell>
          <table:table-cell office:value-type="string">
            <text:p>traditional and complementary medicine and therapy</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office:value-type="string">
            <text:p>Traditional and complementary medicine is the study of alternative medicine.<text:line-break/>Programmes and qualifications with the following main content are classified here:<text:line-break/>Acupuncture and oriental medicine<text:line-break/>Aromatherapy<text:line-break/>Ayurvedic medicine<text:line-break/>Herbalism<text:line-break/>Herbology<text:line-break/>Holistic medicine<text:line-break/>Homeopathic medicine<text:line-break/>Traditional medicine, for example Chinese.</text:p>
          </table:table-cell>
          <table:table-cell office:value-type="string">
            <text:p>0917</text:p>
          </table:table-cell>
        </table:table-row>
        <table:table-row>
          <table:table-cell office:value-type="string">
            <text:p>SkillGroup</text:p>
          </table:table-cell>
          <table:table-cell office:value-type="string">
            <text:p>http://data.europa.eu/esco/isced-f/0919</text:p>
          </table:table-cell>
          <table:table-cell office:value-type="string">
            <text:p>health not elsewhere classifi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919</text:p>
          </table:table-cell>
        </table:table-row>
        <table:table-row>
          <table:table-cell office:value-type="string">
            <text:p>SkillGroup</text:p>
          </table:table-cell>
          <table:table-cell office:value-type="string">
            <text:p>http://data.europa.eu/esco/isced-f/092</text:p>
          </table:table-cell>
          <table:table-cell office:value-type="string">
            <text:p>welfare</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92</text:p>
          </table:table-cell>
        </table:table-row>
        <table:table-row>
          <table:table-cell office:value-type="string">
            <text:p>SkillGroup</text:p>
          </table:table-cell>
          <table:table-cell office:value-type="string">
            <text:p>http://data.europa.eu/esco/isced-f/0920</text:p>
          </table:table-cell>
          <table:table-cell office:value-type="string">
            <text:p>welfare not further defin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920</text:p>
          </table:table-cell>
        </table:table-row>
        <table:table-row>
          <table:table-cell office:value-type="string">
            <text:p>SkillGroup</text:p>
          </table:table-cell>
          <table:table-cell office:value-type="string">
            <text:p>http://data.europa.eu/esco/isced-f/0921</text:p>
          </table:table-cell>
          <table:table-cell office:value-type="string">
            <text:p>care of the elderly and of disabled adults</text:p>
          </table:table-cell>
          <table:table-cell table:number-columns-repeated="2"/>
          <table:table-cell office:value-type="string">
            <text:p>released</text:p>
          </table:table-cell>
          <table:table-cell office:value-type="string">
            <text:p>2021-10-04T20:14:30.53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Care of the elderly and of disabled adults is the study of non-medical care of the elderly and disabled.<text:line-break/>Programmes and qualifications with the following main content are classified here:<text:line-break/>Care of the elderly<text:line-break/>Non-medical care of disabled adults<text:line-break/>Personal care of adults === Exclusions<text:line-break/>Study of health care of the elderly and disabled is excluded from this detailed field and included in detailed field 0913 'Nursing and midwifery'.</text:p>
          </table:table-cell>
          <table:table-cell office:value-type="string">
            <text:p>0921</text:p>
          </table:table-cell>
        </table:table-row>
        <table:table-row>
          <table:table-cell office:value-type="string">
            <text:p>SkillGroup</text:p>
          </table:table-cell>
          <table:table-cell office:value-type="string">
            <text:p>http://data.europa.eu/esco/isced-f/0922</text:p>
          </table:table-cell>
          <table:table-cell office:value-type="string">
            <text:p>child care and youth services</text:p>
          </table:table-cell>
          <table:table-cell table:number-columns-repeated="2"/>
          <table:table-cell office:value-type="string">
            <text:p>released</text:p>
          </table:table-cell>
          <table:table-cell office:value-type="string">
            <text:p>2023-07-04T07:50:56.183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Child care and youth services are the study of the development and non-medical care of children and youths. It includes the study of recreation and leisure activities as a social service for school children and young adults.<text:line-break/>Programmes and qualifications with the following main content are classified here:<text:line-break/>Child care<text:line-break/>Child recreation programmes<text:line-break/>Day care<text:line-break/>Non-medical care of disabled children<text:line-break/>Youth services<text:line-break/>Youth worker programmes === Exclusions<text:line-break/>Study of early childhood education in pre-schools is excluded from this detailed field and included in detailed field 0112 'Training for pre-school teachers'.<text:line-break/>Study of health care of children is excluded from this detailed field and included in detailed field 0913 'Nursing and midwifery'.</text:p>
          </table:table-cell>
          <table:table-cell office:value-type="string">
            <text:p>0922</text:p>
          </table:table-cell>
        </table:table-row>
        <table:table-row>
          <table:table-cell office:value-type="string">
            <text:p>SkillGroup</text:p>
          </table:table-cell>
          <table:table-cell office:value-type="string">
            <text:p>http://data.europa.eu/esco/isced-f/0923</text:p>
          </table:table-cell>
          <table:table-cell office:value-type="string">
            <text:p>social work and counselling</text:p>
          </table:table-cell>
          <table:table-cell table:number-columns-repeated="2"/>
          <table:table-cell office:value-type="string">
            <text:p>released</text:p>
          </table:table-cell>
          <table:table-cell office:value-type="string">
            <text:p>2023-06-30T14:28:45.421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Social work and counselling is the study of the welfare needs of communities, specific groups and individuals and the appropriate ways of meeting these needs. The focus is on social welfare with emphasis on social policy and practice.<text:line-break/>Programmes and qualifications with the following main content are classified here:<text:line-break/>Alcohol and drug abuse counselling<text:line-break/>Alcohol, tobacco, drugs (knowledge about)<text:line-break/>Crisis support<text:line-break/>Family and marriage counselling<text:line-break/>Mobbing and maltreatment (knowledge about)<text:line-break/>Parole officer training<text:line-break/>Probation officer training<text:line-break/>Social policy<text:line-break/>Social practice<text:line-break/>Social theory (applied)<text:line-break/>Social work (welfare)<text:line-break/>Vocational counselling<text:line-break/>Vocational guidance === Exclusions<text:line-break/>Study of sociology and social science is excluded from this detailed field and included in detailed field 0314 'Sociology and cultural studies'.<text:line-break/>Studies combining health care and social care (e.g. for old people) are excluded from this detailed field and included in detailed field 0913 'Nursing and midwifery'.</text:p>
          </table:table-cell>
          <table:table-cell office:value-type="string">
            <text:p>0923</text:p>
          </table:table-cell>
        </table:table-row>
        <table:table-row>
          <table:table-cell office:value-type="string">
            <text:p>SkillGroup</text:p>
          </table:table-cell>
          <table:table-cell office:value-type="string">
            <text:p>http://data.europa.eu/esco/isced-f/0929</text:p>
          </table:table-cell>
          <table:table-cell office:value-type="string">
            <text:p>welfare not elsewhere classifi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929</text:p>
          </table:table-cell>
        </table:table-row>
        <table:table-row>
          <table:table-cell office:value-type="string">
            <text:p>SkillGroup</text:p>
          </table:table-cell>
          <table:table-cell office:value-type="string">
            <text:p>http://data.europa.eu/esco/isced-f/098</text:p>
          </table:table-cell>
          <table:table-cell office:value-type="string">
            <text:p>inter-disciplinary programmes and qualifications involving health and welfare</text:p>
          </table:table-cell>
          <table:table-cell table:number-columns-repeated="2"/>
          <table:table-cell office:value-type="string">
            <text:p>released</text:p>
          </table:table-cell>
          <table:table-cell office:value-type="string">
            <text:p>2023-06-29T13:38:13.156Z</text:p>
          </table:table-cell>
          <table:table-cell/>
          <table:table-cell office:value-type="string">
            <text:p>http://data.europa.eu/esco/concept-scheme/skills<text:line-break/>http://data.europa.eu/esco/concept-scheme/skills-hierarchy<text:line-break/>http://data.europa.eu/esco/concept-scheme/isced-f</text:p>
          </table:table-cell>
          <table:table-cell/>
          <table:table-cell office:value-type="string">
            <text:p>098</text:p>
          </table:table-cell>
        </table:table-row>
        <table:table-row>
          <table:table-cell office:value-type="string">
            <text:p>SkillGroup</text:p>
          </table:table-cell>
          <table:table-cell office:value-type="string">
            <text:p>http://data.europa.eu/esco/isced-f/0988</text:p>
          </table:table-cell>
          <table:table-cell office:value-type="string">
            <text:p>inter-disciplinary programmes and qualifications involving health and welfare</text:p>
          </table:table-cell>
          <table:table-cell table:number-columns-repeated="2"/>
          <table:table-cell office:value-type="string">
            <text:p>released</text:p>
          </table:table-cell>
          <table:table-cell office:value-type="string">
            <text:p>2023-07-03T14:59:07.647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Inter-disciplinary or broad programmes and qualifications to which the greatest intended learning time is devoted to health and welfare are classified here.</text:p>
          </table:table-cell>
          <table:table-cell office:value-type="string">
            <text:p>0988</text:p>
          </table:table-cell>
        </table:table-row>
        <table:table-row>
          <table:table-cell office:value-type="string">
            <text:p>SkillGroup</text:p>
          </table:table-cell>
          <table:table-cell office:value-type="string">
            <text:p>http://data.europa.eu/esco/isced-f/099</text:p>
          </table:table-cell>
          <table:table-cell office:value-type="string">
            <text:p>health and welfare not elsewhere classifi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99</text:p>
          </table:table-cell>
        </table:table-row>
        <table:table-row>
          <table:table-cell office:value-type="string">
            <text:p>SkillGroup</text:p>
          </table:table-cell>
          <table:table-cell office:value-type="string">
            <text:p>http://data.europa.eu/esco/isced-f/0999</text:p>
          </table:table-cell>
          <table:table-cell office:value-type="string">
            <text:p>health and welfare not elsewhere classifi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0999</text:p>
          </table:table-cell>
        </table:table-row>
        <table:table-row>
          <table:table-cell office:value-type="string">
            <text:p>SkillGroup</text:p>
          </table:table-cell>
          <table:table-cell office:value-type="string">
            <text:p>http://data.europa.eu/esco/isced-f/10</text:p>
          </table:table-cell>
          <table:table-cell office:value-type="string">
            <text:p>services</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10</text:p>
          </table:table-cell>
        </table:table-row>
        <table:table-row>
          <table:table-cell office:value-type="string">
            <text:p>SkillGroup</text:p>
          </table:table-cell>
          <table:table-cell office:value-type="string">
            <text:p>http://data.europa.eu/esco/isced-f/100</text:p>
          </table:table-cell>
          <table:table-cell office:value-type="string">
            <text:p>services not further defin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100</text:p>
          </table:table-cell>
        </table:table-row>
        <table:table-row>
          <table:table-cell office:value-type="string">
            <text:p>SkillGroup</text:p>
          </table:table-cell>
          <table:table-cell office:value-type="string">
            <text:p>http://data.europa.eu/esco/isced-f/1000</text:p>
          </table:table-cell>
          <table:table-cell office:value-type="string">
            <text:p>services not further defined</text:p>
          </table:table-cell>
          <table:table-cell table:number-columns-repeated="2"/>
          <table:table-cell office:value-type="string">
            <text:p>released</text:p>
          </table:table-cell>
          <table:table-cell office:value-type="string">
            <text:p>2025-02-19T14:43:00.737Z</text:p>
          </table:table-cell>
          <table:table-cell/>
          <table:table-cell office:value-type="string">
            <text:p>http://data.europa.eu/esco/concept-scheme/skills<text:line-break/>http://data.europa.eu/esco/concept-scheme/skills-hierarchy<text:line-break/>http://data.europa.eu/esco/concept-scheme/isced-f</text:p>
          </table:table-cell>
          <table:table-cell/>
          <table:table-cell office:value-type="string">
            <text:p>1000</text:p>
          </table:table-cell>
        </table:table-row>
        <table:table-row>
          <table:table-cell office:value-type="string">
            <text:p>SkillGroup</text:p>
          </table:table-cell>
          <table:table-cell office:value-type="string">
            <text:p>http://data.europa.eu/esco/isced-f/101</text:p>
          </table:table-cell>
          <table:table-cell office:value-type="string">
            <text:p>personal services</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101</text:p>
          </table:table-cell>
        </table:table-row>
        <table:table-row>
          <table:table-cell office:value-type="string">
            <text:p>SkillGroup</text:p>
          </table:table-cell>
          <table:table-cell office:value-type="string">
            <text:p>http://data.europa.eu/esco/isced-f/1010</text:p>
          </table:table-cell>
          <table:table-cell office:value-type="string">
            <text:p>personal services not further defin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1010</text:p>
          </table:table-cell>
        </table:table-row>
        <table:table-row>
          <table:table-cell office:value-type="string">
            <text:p>SkillGroup</text:p>
          </table:table-cell>
          <table:table-cell office:value-type="string">
            <text:p>http://data.europa.eu/esco/isced-f/1011</text:p>
          </table:table-cell>
          <table:table-cell office:value-type="string">
            <text:p>domestic services</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office:value-type="string">
            <text:p>Domestic services are the study of various domestic services, such as housekeeping, cleaning, laundering, sewing etc.<text:line-break/>Programmes and qualifications with the following main content are classified here:<text:line-break/>Caretaking, housekeeping and home service workers<text:line-break/>Chimney sweeping<text:line-break/>Cleaning<text:line-break/>Cooking (home)<text:line-break/>Domestic science<text:line-break/>Dry-cleaning<text:line-break/>Funeral services and mortuary science<text:line-break/>Home economics<text:line-break/>Laundry<text:line-break/>Needlework (home)<text:line-break/>Sewing (home)<text:line-break/>Window cleaning === Inclusions<text:line-break/>Cleaning is included here even if directed towards cleaning schools, hospitals, factories etc. === Exclusions<text:line-break/>Study of building maintenance is excluded from this detailed field and included in detailed field 0732 'Building and civil engineering'.</text:p>
          </table:table-cell>
          <table:table-cell office:value-type="string">
            <text:p>1011</text:p>
          </table:table-cell>
        </table:table-row>
        <table:table-row>
          <table:table-cell office:value-type="string">
            <text:p>SkillGroup</text:p>
          </table:table-cell>
          <table:table-cell office:value-type="string">
            <text:p>http://data.europa.eu/esco/isced-f/1012</text:p>
          </table:table-cell>
          <table:table-cell office:value-type="string">
            <text:p>hair and beauty services</text:p>
          </table:table-cell>
          <table:table-cell table:number-columns-repeated="2"/>
          <table:table-cell office:value-type="string">
            <text:p>released</text:p>
          </table:table-cell>
          <table:table-cell office:value-type="string">
            <text:p>2023-01-25T20:17:17.229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Hair and beauty services are the study of caring for the hair and the body for beautification.<text:line-break/>Programmes and qualifications with the following main content are classified here:<text:line-break/>Barbering<text:line-break/>Beauty therapy<text:line-break/>Cosmetology (make up)<text:line-break/>Fitness and weight control<text:line-break/>Hairdressing<text:line-break/>Manicure<text:line-break/>Pedicure.</text:p>
          </table:table-cell>
          <table:table-cell office:value-type="string">
            <text:p>1012</text:p>
          </table:table-cell>
        </table:table-row>
        <table:table-row>
          <table:table-cell office:value-type="string">
            <text:p>SkillGroup</text:p>
          </table:table-cell>
          <table:table-cell office:value-type="string">
            <text:p>http://data.europa.eu/esco/isced-f/1013</text:p>
          </table:table-cell>
          <table:table-cell office:value-type="string">
            <text:p>hotel, restaurants and catering</text:p>
          </table:table-cell>
          <table:table-cell table:number-columns-repeated="2"/>
          <table:table-cell office:value-type="string">
            <text:p>released</text:p>
          </table:table-cell>
          <table:table-cell office:value-type="string">
            <text:p>2023-07-05T09:23:20.685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Hotel, restaurants and catering is the study of providing food, beverages, accommodation and related services at hotels, restaurants etc.<text:line-break/>Programmes and qualifications with the following main content are classified here:<text:line-break/>Catering<text:line-break/>Cooking (restaurant and hotel-type)<text:line-break/>Fast food preparation<text:line-break/>Food serving<text:line-break/>Hospitality services<text:line-break/>Hotel and restaurant studies<text:line-break/>Hotel receptionist training<text:line-break/>Hotel services<text:line-break/>Waiting and bar service === Exclusions<text:line-break/>Study of food processing (industrial) is excluded from this detailed field and included in detailed field 0721 'Food processing'.<text:line-break/>Receptionist training (general) is excluded from this detailed field and included in detailed field 0415 'Secretarial and office work'.</text:p>
          </table:table-cell>
          <table:table-cell office:value-type="string">
            <text:p>1013</text:p>
          </table:table-cell>
        </table:table-row>
        <table:table-row>
          <table:table-cell office:value-type="string">
            <text:p>SkillGroup</text:p>
          </table:table-cell>
          <table:table-cell office:value-type="string">
            <text:p>http://data.europa.eu/esco/isced-f/1014</text:p>
          </table:table-cell>
          <table:table-cell office:value-type="string">
            <text:p>sports</text:p>
          </table:table-cell>
          <table:table-cell table:number-columns-repeated="2"/>
          <table:table-cell office:value-type="string">
            <text:p>released</text:p>
          </table:table-cell>
          <table:table-cell office:value-type="string">
            <text:p>2023-07-05T16:32:27.796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Sports is the study of techniques and skills in a chosen sport.<text:line-break/>Programmes and qualifications with the following main content are classified here:<text:line-break/>Sport trainer studies<text:line-break/>Techniques and skills in a chosen sport<text:line-break/>Training of umpires/referees and other sports officials === Inclusions<text:line-break/>Jockeying is included here. Chess playing is included here. === Exclusions<text:line-break/>Training of school teachers in physical education (sports teachers) is excluded from this detailed field and included in detailed field 0114 'Teacher training with subject specialisation'.<text:line-break/>Fitness services are excluded from this detailed field and included in detailed field 1012 'Hair and beauty services'.</text:p>
          </table:table-cell>
          <table:table-cell office:value-type="string">
            <text:p>1014</text:p>
          </table:table-cell>
        </table:table-row>
        <table:table-row>
          <table:table-cell office:value-type="string">
            <text:p>SkillGroup</text:p>
          </table:table-cell>
          <table:table-cell office:value-type="string">
            <text:p>http://data.europa.eu/esco/isced-f/1015</text:p>
          </table:table-cell>
          <table:table-cell office:value-type="string">
            <text:p>travel, tourism and leisure</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office:value-type="string">
            <text:p>Travel and tourism is the study of marketing and advertising tourist destinations and events. It includes the study of ticketing and reservation practices. Leisure is the study of recreational and leisure activities for individuals and groups.<text:line-break/>Programmes and qualifications with the following main content are classified here:<text:line-break/>Abseiling (rope climbing)<text:line-break/>Adventure based activities<text:line-break/>Ground crew training (airport)<text:line-break/>Guiding, tour leading<text:line-break/>Recreation and leisure<text:line-break/>Tourist trades programmes<text:line-break/>Travel agency services<text:line-break/>Travel and tourism<text:line-break/>Travel services === Inclusions<text:line-break/>Basic training in how to treat tourists is included here. === Exclusions<text:line-break/>Study of recreation and leisure activities for school children is excluded from this detailed field and included in detailed field 0922 'Child care and youth services'.</text:p>
          </table:table-cell>
          <table:table-cell office:value-type="string">
            <text:p>1015</text:p>
          </table:table-cell>
        </table:table-row>
        <table:table-row>
          <table:table-cell office:value-type="string">
            <text:p>SkillGroup</text:p>
          </table:table-cell>
          <table:table-cell office:value-type="string">
            <text:p>http://data.europa.eu/esco/isced-f/1019</text:p>
          </table:table-cell>
          <table:table-cell office:value-type="string">
            <text:p>personal services not elsewhere classifi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1019</text:p>
          </table:table-cell>
        </table:table-row>
        <table:table-row>
          <table:table-cell office:value-type="string">
            <text:p>SkillGroup</text:p>
          </table:table-cell>
          <table:table-cell office:value-type="string">
            <text:p>http://data.europa.eu/esco/isced-f/102</text:p>
          </table:table-cell>
          <table:table-cell office:value-type="string">
            <text:p>hygiene and occupational health services</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102</text:p>
          </table:table-cell>
        </table:table-row>
        <table:table-row>
          <table:table-cell office:value-type="string">
            <text:p>SkillGroup</text:p>
          </table:table-cell>
          <table:table-cell office:value-type="string">
            <text:p>http://data.europa.eu/esco/isced-f/1020</text:p>
          </table:table-cell>
          <table:table-cell office:value-type="string">
            <text:p>hygiene and occupational health services not further defin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1020</text:p>
          </table:table-cell>
        </table:table-row>
        <table:table-row>
          <table:table-cell office:value-type="string">
            <text:p>SkillGroup</text:p>
          </table:table-cell>
          <table:table-cell office:value-type="string">
            <text:p>http://data.europa.eu/esco/isced-f/1021</text:p>
          </table:table-cell>
          <table:table-cell office:value-type="string">
            <text:p>community sanitation</text:p>
          </table:table-cell>
          <table:table-cell table:number-columns-repeated="2"/>
          <table:table-cell office:value-type="string">
            <text:p>released</text:p>
          </table:table-cell>
          <table:table-cell office:value-type="string">
            <text:p>2020-12-07T11:59:16.586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Community sanitation is the study of community services dealing with items that affect public health such as hygienic standards in food, water supply, disposal of sewage and garbage and street cleaning.<text:line-break/>Programmes and qualifications with the following main content are classified here:<text:line-break/>Hygiene, community<text:line-break/>Hygienic standards<text:line-break/>Refuse collection<text:line-break/>Refuse/sewage disposal<text:line-break/>Street cleaning<text:line-break/>Water supply (service)<text:line-break/>Waste management.</text:p>
          </table:table-cell>
          <table:table-cell office:value-type="string">
            <text:p>1021</text:p>
          </table:table-cell>
        </table:table-row>
        <table:table-row>
          <table:table-cell office:value-type="string">
            <text:p>SkillGroup</text:p>
          </table:table-cell>
          <table:table-cell office:value-type="string">
            <text:p>http://data.europa.eu/esco/isced-f/1022</text:p>
          </table:table-cell>
          <table:table-cell office:value-type="string">
            <text:p>occupational health and safety</text:p>
          </table:table-cell>
          <table:table-cell table:number-columns-repeated="2"/>
          <table:table-cell office:value-type="string">
            <text:p>released</text:p>
          </table:table-cell>
          <table:table-cell office:value-type="string">
            <text:p>2023-06-30T08:19:29.191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Occupational health and safety is the study of recognising, evaluating and controlling environmental factors associated with the workplace.<text:line-break/>Programmes and qualifications with the following main content are classified here:<text:line-break/>Ergonomics (occupational health and safety)<text:line-break/>Health and safety in the workplace<text:line-break/>Industrial welfare<text:line-break/>Labour protection<text:line-break/>Labour security<text:line-break/>Labour welfare (safety)<text:line-break/>Occupational health and industrial hygiene<text:line-break/>Occupational safety<text:line-break/>Stress management<text:line-break/>Work environment === Exclusions<text:line-break/>Study of vocational rehabilitation and occupational therapy is excluded from this detailed field and included in detailed field 0915 'Therapy and rehabilitation'.<text:line-break/>Study of labour law is excluded from this detailed field and included in 0421 'Law'.<text:line-break/>Study of ergonomics is excluded from this detailed field if emphasis is given to technical aspects and is included in the appropriate detailed field under 071 'Engineering and engineering trades'.</text:p>
          </table:table-cell>
          <table:table-cell office:value-type="string">
            <text:p>1022</text:p>
          </table:table-cell>
        </table:table-row>
        <table:table-row>
          <table:table-cell office:value-type="string">
            <text:p>SkillGroup</text:p>
          </table:table-cell>
          <table:table-cell office:value-type="string">
            <text:p>http://data.europa.eu/esco/isced-f/1029</text:p>
          </table:table-cell>
          <table:table-cell office:value-type="string">
            <text:p>hygiene and occupational health services not elsewhere classifi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1029</text:p>
          </table:table-cell>
        </table:table-row>
        <table:table-row>
          <table:table-cell office:value-type="string">
            <text:p>SkillGroup</text:p>
          </table:table-cell>
          <table:table-cell office:value-type="string">
            <text:p>http://data.europa.eu/esco/isced-f/103</text:p>
          </table:table-cell>
          <table:table-cell office:value-type="string">
            <text:p>security services</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103</text:p>
          </table:table-cell>
        </table:table-row>
        <table:table-row>
          <table:table-cell office:value-type="string">
            <text:p>SkillGroup</text:p>
          </table:table-cell>
          <table:table-cell office:value-type="string">
            <text:p>http://data.europa.eu/esco/isced-f/1030</text:p>
          </table:table-cell>
          <table:table-cell office:value-type="string">
            <text:p>security services not further defin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1030</text:p>
          </table:table-cell>
        </table:table-row>
        <table:table-row>
          <table:table-cell office:value-type="string">
            <text:p>SkillGroup</text:p>
          </table:table-cell>
          <table:table-cell office:value-type="string">
            <text:p>http://data.europa.eu/esco/isced-f/1031</text:p>
          </table:table-cell>
          <table:table-cell office:value-type="string">
            <text:p>military and defence</text:p>
          </table:table-cell>
          <table:table-cell table:number-columns-repeated="2"/>
          <table:table-cell office:value-type="string">
            <text:p>released</text:p>
          </table:table-cell>
          <table:table-cell office:value-type="string">
            <text:p>2020-12-10T13:06:54.77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Military and defence is the study of services to the community connected with war and defence, designed to provide training in the principles and practice of military science.<text:line-break/>Programmes and qualifications with the following main content are classified here:<text:line-break/>Air force training<text:line-break/>Army training<text:line-break/>Defence studies<text:line-break/>Military science<text:line-break/>Navy training<text:line-break/>War theory === Exclusions<text:line-break/>Military personnel participating in non-military programmes should be classified according to the subject content of the training programme.</text:p>
          </table:table-cell>
          <table:table-cell office:value-type="string">
            <text:p>1031</text:p>
          </table:table-cell>
        </table:table-row>
        <table:table-row>
          <table:table-cell office:value-type="string">
            <text:p>SkillGroup</text:p>
          </table:table-cell>
          <table:table-cell office:value-type="string">
            <text:p>http://data.europa.eu/esco/isced-f/1032</text:p>
          </table:table-cell>
          <table:table-cell office:value-type="string">
            <text:p>protection of persons and property</text:p>
          </table:table-cell>
          <table:table-cell table:number-columns-repeated="2"/>
          <table:table-cell office:value-type="string">
            <text:p>released</text:p>
          </table:table-cell>
          <table:table-cell office:value-type="string">
            <text:p>2023-06-20T08:55:20.116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Protection of persons and property is the study of services to the community concerning protection of property and persons. It comprises training in police work, public security, fire protection and fire-fighting.<text:line-break/>Programmes and qualifications with the following main content are classified here:<text:line-break/>Civil security<text:line-break/>Customs programmes<text:line-break/>Fire-protection (fire-fighting)<text:line-break/>Fire technology<text:line-break/>Life guarding<text:line-break/>Police work<text:line-break/>Policing studies<text:line-break/>Prison work<text:line-break/>Public security<text:line-break/>Security and loss prevention services<text:line-break/>Security guarding === Exclusions<text:line-break/>Study of law is excluded from this detailed field and included in 0421 'Law'.<text:line-break/>Study of criminology is excluded from this detailed field and included in detailed field 0314 'Sociology and cultural studies'.</text:p>
          </table:table-cell>
          <table:table-cell office:value-type="string">
            <text:p>1032</text:p>
          </table:table-cell>
        </table:table-row>
        <table:table-row>
          <table:table-cell office:value-type="string">
            <text:p>SkillGroup</text:p>
          </table:table-cell>
          <table:table-cell office:value-type="string">
            <text:p>http://data.europa.eu/esco/isced-f/1039</text:p>
          </table:table-cell>
          <table:table-cell office:value-type="string">
            <text:p>security services not elsewhere classified</text:p>
          </table:table-cell>
          <table:table-cell table:number-columns-repeated="2"/>
          <table:table-cell office:value-type="string">
            <text:p>released</text:p>
          </table:table-cell>
          <table:table-cell office:value-type="string">
            <text:p>2023-07-05T13:04:06.443Z</text:p>
          </table:table-cell>
          <table:table-cell/>
          <table:table-cell office:value-type="string">
            <text:p>http://data.europa.eu/esco/concept-scheme/skills<text:line-break/>http://data.europa.eu/esco/concept-scheme/skills-hierarchy<text:line-break/>http://data.europa.eu/esco/concept-scheme/isced-f</text:p>
          </table:table-cell>
          <table:table-cell/>
          <table:table-cell office:value-type="string">
            <text:p>1039</text:p>
          </table:table-cell>
        </table:table-row>
        <table:table-row>
          <table:table-cell office:value-type="string">
            <text:p>SkillGroup</text:p>
          </table:table-cell>
          <table:table-cell office:value-type="string">
            <text:p>http://data.europa.eu/esco/isced-f/104</text:p>
          </table:table-cell>
          <table:table-cell office:value-type="string">
            <text:p>transport services</text:p>
          </table:table-cell>
          <table:table-cell table:number-columns-repeated="2"/>
          <table:table-cell office:value-type="string">
            <text:p>released</text:p>
          </table:table-cell>
          <table:table-cell office:value-type="string">
            <text:p>2023-07-05T15:11:58.866Z</text:p>
          </table:table-cell>
          <table:table-cell/>
          <table:table-cell office:value-type="string">
            <text:p>http://data.europa.eu/esco/concept-scheme/skills<text:line-break/>http://data.europa.eu/esco/concept-scheme/skills-hierarchy<text:line-break/>http://data.europa.eu/esco/concept-scheme/isced-f</text:p>
          </table:table-cell>
          <table:table-cell/>
          <table:table-cell office:value-type="string">
            <text:p>104</text:p>
          </table:table-cell>
        </table:table-row>
        <table:table-row>
          <table:table-cell office:value-type="string">
            <text:p>SkillGroup</text:p>
          </table:table-cell>
          <table:table-cell office:value-type="string">
            <text:p>http://data.europa.eu/esco/isced-f/1041</text:p>
          </table:table-cell>
          <table:table-cell office:value-type="string">
            <text:p>transport services</text:p>
          </table:table-cell>
          <table:table-cell table:number-columns-repeated="2"/>
          <table:table-cell office:value-type="string">
            <text:p>released</text:p>
          </table:table-cell>
          <table:table-cell office:value-type="string">
            <text:p>2023-02-23T21:00:15.914Z</text:p>
          </table:table-cell>
          <table:table-cell/>
          <table:table-cell office:value-type="string">
            <text:p>http://data.europa.eu/esco/concept-scheme/skills<text:line-break/>http://data.europa.eu/esco/concept-scheme/skills-hierarchy<text:line-break/>http://data.europa.eu/esco/concept-scheme/isced-f</text:p>
          </table:table-cell>
          <table:table-cell office:value-type="string">
            <text:p>Transport is the study of operating, navigating and directing ships, train, aircraft and other forms of transportation.<text:line-break/>Programmes and qualifications with the following main content are classified here:<text:line-break/>Aircraft operation<text:line-break/>Air traffic control<text:line-break/>Air traffic safety<text:line-break/>Cabin crew training<text:line-break/>Communication (air, railway, road etc.) programmes<text:line-break/>Crane and truck driving<text:line-break/>Driving programmes<text:line-break/>Flying and navigation<text:line-break/>Navigation technologies<text:line-break/>Postal service<text:line-break/>Railway operations<text:line-break/>Road motor vehicle operations<text:line-break/>Ship operation<text:line-break/>Shipping<text:line-break/>Transport studies === Exclusions<text:line-break/>Programmes in telephone network services are excluded from this detailed field and included in detailed field 0714 'Electronics and automation'. Programmes in switchboard operating are excluded from this detailed field and included in detailed field 0415 'Secretarial and office work'.</text:p>
          </table:table-cell>
          <table:table-cell office:value-type="string">
            <text:p>1041</text:p>
          </table:table-cell>
        </table:table-row>
        <table:table-row>
          <table:table-cell office:value-type="string">
            <text:p>SkillGroup</text:p>
          </table:table-cell>
          <table:table-cell office:value-type="string">
            <text:p>http://data.europa.eu/esco/isced-f/108</text:p>
          </table:table-cell>
          <table:table-cell office:value-type="string">
            <text:p>inter-disciplinary programmes and qualifications involving services</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108</text:p>
          </table:table-cell>
        </table:table-row>
        <table:table-row>
          <table:table-cell office:value-type="string">
            <text:p>SkillGroup</text:p>
          </table:table-cell>
          <table:table-cell office:value-type="string">
            <text:p>http://data.europa.eu/esco/isced-f/1088</text:p>
          </table:table-cell>
          <table:table-cell office:value-type="string">
            <text:p>inter-disciplinary programmes and qualifications involving services</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office:value-type="string">
            <text:p>Inter-disciplinary programmes and qualifications to which the greatest intended learning time is devoted to services are classified here.</text:p>
          </table:table-cell>
          <table:table-cell office:value-type="string">
            <text:p>1088</text:p>
          </table:table-cell>
        </table:table-row>
        <table:table-row>
          <table:table-cell office:value-type="string">
            <text:p>SkillGroup</text:p>
          </table:table-cell>
          <table:table-cell office:value-type="string">
            <text:p>http://data.europa.eu/esco/isced-f/109</text:p>
          </table:table-cell>
          <table:table-cell office:value-type="string">
            <text:p>services not elsewhere classifi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109</text:p>
          </table:table-cell>
        </table:table-row>
        <table:table-row>
          <table:table-cell office:value-type="string">
            <text:p>SkillGroup</text:p>
          </table:table-cell>
          <table:table-cell office:value-type="string">
            <text:p>http://data.europa.eu/esco/isced-f/1099</text:p>
          </table:table-cell>
          <table:table-cell office:value-type="string">
            <text:p>services not elsewhere classified</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1099</text:p>
          </table:table-cell>
        </table:table-row>
        <table:table-row>
          <table:table-cell office:value-type="string">
            <text:p>SkillGroup</text:p>
          </table:table-cell>
          <table:table-cell office:value-type="string">
            <text:p>http://data.europa.eu/esco/isced-f/99</text:p>
          </table:table-cell>
          <table:table-cell office:value-type="string">
            <text:p>field unknown</text:p>
          </table:table-cell>
          <table:table-cell table:number-columns-repeated="2"/>
          <table:table-cell office:value-type="string">
            <text:p>released</text:p>
          </table:table-cell>
          <table:table-cell office:value-type="string">
            <text:p>2021-03-12T11:44:36.574Z</text:p>
          </table:table-cell>
          <table:table-cell/>
          <table:table-cell office:value-type="string">
            <text:p>http://data.europa.eu/esco/concept-scheme/skills<text:line-break/>http://data.europa.eu/esco/concept-scheme/skills-hierarchy<text:line-break/>http://data.europa.eu/esco/concept-scheme/isced-f</text:p>
          </table:table-cell>
          <table:table-cell/>
          <table:table-cell office:value-type="string">
            <text:p>99</text:p>
          </table:table-cell>
        </table:table-row>
        <table:table-row>
          <table:table-cell office:value-type="string">
            <text:p>SkillGroup</text:p>
          </table:table-cell>
          <table:table-cell office:value-type="string">
            <text:p>http://data.europa.eu/esco/isced-f/999</text:p>
          </table:table-cell>
          <table:table-cell office:value-type="string">
            <text:p>field unknown</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line-break/>http://data.europa.eu/esco/concept-scheme/isced-f</text:p>
          </table:table-cell>
          <table:table-cell/>
          <table:table-cell office:value-type="string">
            <text:p>999</text:p>
          </table:table-cell>
        </table:table-row>
        <table:table-row>
          <table:table-cell office:value-type="string">
            <text:p>SkillGroup</text:p>
          </table:table-cell>
          <table:table-cell office:value-type="string">
            <text:p>http://data.europa.eu/esco/isced-f/9999</text:p>
          </table:table-cell>
          <table:table-cell office:value-type="string">
            <text:p>field unknown</text:p>
          </table:table-cell>
          <table:table-cell table:number-columns-repeated="2"/>
          <table:table-cell office:value-type="string">
            <text:p>released</text:p>
          </table:table-cell>
          <table:table-cell office:value-type="string">
            <text:p>2022-01-12T20:03:01.494Z</text:p>
          </table:table-cell>
          <table:table-cell/>
          <table:table-cell office:value-type="string">
            <text:p>http://data.europa.eu/esco/concept-scheme/skills<text:line-break/>http://data.europa.eu/esco/concept-scheme/skills-hierarchy<text:line-break/>http://data.europa.eu/esco/concept-scheme/isced-f</text:p>
          </table:table-cell>
          <table:table-cell/>
          <table:table-cell office:value-type="string">
            <text:p>9999</text:p>
          </table:table-cell>
        </table:table-row>
        <table:table-row>
          <table:table-cell office:value-type="string">
            <text:p>SkillGroup</text:p>
          </table:table-cell>
          <table:table-cell office:value-type="string">
            <text:p>http://data.europa.eu/esco/skill/00d5d1d2-c521-4c58-9df5-2939c0ce9adb</text:p>
          </table:table-cell>
          <table:table-cell office:value-type="string">
            <text:p>accompanying and welcoming people</text:p>
          </table:table-cell>
          <table:table-cell table:number-columns-repeated="2"/>
          <table:table-cell office:value-type="string">
            <text:p>released</text:p>
          </table:table-cell>
          <table:table-cell office:value-type="string">
            <text:p>2022-07-15T14:44:44.924Z</text:p>
          </table:table-cell>
          <table:table-cell office:value-type="string">
            <text:p>Examples:<text:line-break/>- escort students on a field trip<text:line-break/>- supervise special visitors Excludes:<text:line-break/>- assist clients with special needs.</text:p>
          </table:table-cell>
          <table:table-cell office:value-type="string">
            <text:p>http://data.europa.eu/esco/concept-scheme/skills<text:line-break/>http://data.europa.eu/esco/concept-scheme/skills-hierarchy</text:p>
          </table:table-cell>
          <table:table-cell office:value-type="string">
            <text:p>Welcoming, accompanying or supporting clients, patrons, visitors and others by helping them to feel at ease, and assisting them with activities such as finding seats, making reservations and using facilities at social events, outings, or trips.</text:p>
          </table:table-cell>
          <table:table-cell office:value-type="string">
            <text:p>S3.4.2</text:p>
          </table:table-cell>
        </table:table-row>
        <table:table-row>
          <table:table-cell office:value-type="string">
            <text:p>SkillGroup</text:p>
          </table:table-cell>
          <table:table-cell office:value-type="string">
            <text:p>http://data.europa.eu/esco/skill/0101f8a4-4243-4e67-813b-3e2a6274f7e2</text:p>
          </table:table-cell>
          <table:table-cell office:value-type="string">
            <text:p>monitoring developments in area of expertise</text:p>
          </table:table-cell>
          <table:table-cell table:number-columns-repeated="2"/>
          <table:table-cell office:value-type="string">
            <text:p>released</text:p>
          </table:table-cell>
          <table:table-cell/>
          <table:table-cell office:value-type="string">
            <text:p>Examples:<text:line-break/>- Follow trends in sporting equipment<text:line-break/>- Keep up to date with diagnostic innovations<text:line-break/>- Monitor legislation developments<text:line-break/>- Monitor technology trends.</text:p>
          </table:table-cell>
          <table:table-cell office:value-type="string">
            <text:p>http://data.europa.eu/esco/concept-scheme/skills<text:line-break/>http://data.europa.eu/esco/concept-scheme/skills-hierarchy</text:p>
          </table:table-cell>
          <table:table-cell office:value-type="string">
            <text:p>Monitoring and keeping knowledge up-to-date concerning new research, methodologies, regulations, policies technological developments and other significant changes relevant to a particular field of specialisation.</text:p>
          </table:table-cell>
          <table:table-cell office:value-type="string">
            <text:p>S2.9</text:p>
          </table:table-cell>
        </table:table-row>
        <table:table-row>
          <table:table-cell office:value-type="string">
            <text:p>SkillGroup</text:p>
          </table:table-cell>
          <table:table-cell office:value-type="string">
            <text:p>http://data.europa.eu/esco/skill/021a23e1-907e-4627-b05a-555f889cbb65</text:p>
          </table:table-cell>
          <table:table-cell office:value-type="string">
            <text:p>self-management skills and competences</text:p>
          </table:table-cell>
          <table:table-cell office:value-type="string">
            <text:p>self-discipline<text:line-break/>self-management<text:line-break/>self-control<text:line-break/>self-regulation<text:line-break/>professional attitude</text:p>
          </table:table-cell>
          <table:table-cell office:value-type="string">
            <text:p>professional orientation and perfection<text:line-break/>demonstrate self-management<text:line-break/>professional way of working<text:line-break/>self-discipline<text:line-break/>self-conquest</text:p>
          </table:table-cell>
          <table:table-cell office:value-type="string">
            <text:p>released</text:p>
          </table:table-cell>
          <table:table-cell office:value-type="string">
            <text:p>2021-08-30T08:11:14.03Z</text:p>
          </table:table-cell>
          <table:table-cell/>
          <table:table-cell office:value-type="string">
            <text:p>http://data.europa.eu/esco/concept-scheme/skills<text:line-break/>http://data.europa.eu/esco/concept-scheme/skills-hierarchy<text:line-break/>http://data.europa.eu/esco/concept-scheme/skill-transversal-groups</text:p>
          </table:table-cell>
          <table:table-cell office:value-type="string">
            <text:p>Skills and competences requiring individuals to understand and control their own capabilities and limitations and use this self-awareness to manage activities in a variety of contexts. They include the ability to act reflectively and responsibly, to accept feedback, adapting to change and to seek opportunities for personal and professional development.</text:p>
          </table:table-cell>
          <table:table-cell office:value-type="string">
            <text:p>T3</text:p>
          </table:table-cell>
        </table:table-row>
        <table:table-row>
          <table:table-cell office:value-type="string">
            <text:p>SkillGroup</text:p>
          </table:table-cell>
          <table:table-cell office:value-type="string">
            <text:p>http://data.europa.eu/esco/skill/02208098-ee91-4df0-8581-5c1a04d8fe0a</text:p>
          </table:table-cell>
          <table:table-cell office:value-type="string">
            <text:p>installing, maintaining and repairing mechanical equipment</text:p>
          </table:table-cell>
          <table:table-cell office:value-type="string">
            <text:p>installing and maintaining mechanical equipment</text:p>
          </table:table-cell>
          <table:table-cell/>
          <table:table-cell office:value-type="string">
            <text:p>released</text:p>
          </table:table-cell>
          <table:table-cell/>
          <table:table-cell office:value-type="string">
            <text:p>Excludes:<text:line-break/>- Installing, maintaining and repairing mechatronic or robotic equipment and components.</text:p>
          </table:table-cell>
          <table:table-cell office:value-type="string">
            <text:p>http://data.europa.eu/esco/concept-scheme/skills<text:line-break/>http://data.europa.eu/esco/concept-scheme/skills-hierarchy</text:p>
          </table:table-cell>
          <table:table-cell office:value-type="string">
            <text:p>Installing, maintaining and repairing stationary and mobile mechanical equipment, components and devices.</text:p>
          </table:table-cell>
          <table:table-cell office:value-type="string">
            <text:p>S8.7</text:p>
          </table:table-cell>
        </table:table-row>
        <table:table-row>
          <table:table-cell office:value-type="string">
            <text:p>SkillGroup</text:p>
          </table:table-cell>
          <table:table-cell office:value-type="string">
            <text:p>http://data.europa.eu/esco/skill/036afa6e-cdde-4b38-a53a-8e7910a840e1</text:p>
          </table:table-cell>
          <table:table-cell office:value-type="string">
            <text:p>collaborating in teams and networks</text:p>
          </table:table-cell>
          <table:table-cell office:value-type="string">
            <text:p>working with others<text:line-break/>acting with others to achieve aims</text:p>
          </table:table-cell>
          <table:table-cell/>
          <table:table-cell office:value-type="string">
            <text:p>released</text:p>
          </table:table-cell>
          <table:table-cell office:value-type="string">
            <text:p>2021-09-14T07:57:53.667Z</text:p>
          </table:table-cell>
          <table:table-cell/>
          <table:table-cell office:value-type="string">
            <text:p>http://data.europa.eu/esco/concept-scheme/skills<text:line-break/>http://data.europa.eu/esco/concept-scheme/skills-hierarchy<text:line-break/>http://data.europa.eu/esco/concept-scheme/skill-transversal-groups</text:p>
          </table:table-cell>
          <table:table-cell office:value-type="string">
            <text:p>Support or develop a group to work towards a common goal in a way which shows understanding and respect of others’ roles and competencies.</text:p>
          </table:table-cell>
          <table:table-cell office:value-type="string">
            <text:p>T4.3</text:p>
          </table:table-cell>
        </table:table-row>
        <table:table-row>
          <table:table-cell office:value-type="string">
            <text:p>SkillGroup</text:p>
          </table:table-cell>
          <table:table-cell office:value-type="string">
            <text:p>http://data.europa.eu/esco/skill/03961960-e729-4768-ab0a-49886132f17a</text:p>
          </table:table-cell>
          <table:table-cell office:value-type="string">
            <text:p>using foreign languages</text:p>
          </table:table-cell>
          <table:table-cell table:number-columns-repeated="2"/>
          <table:table-cell office:value-type="string">
            <text:p>released</text:p>
          </table:table-cell>
          <table:table-cell office:value-type="string">
            <text:p>2021-04-14T10:04:10.228Z</text:p>
          </table:table-cell>
          <table:table-cell office:value-type="string">
            <text:p>Examples:<text:line-break/>- employ foreign languages in care<text:line-break/>- communicate commercial and technical issues in foreign languages<text:line-break/>- speak dialect Excludes:<text:line-break/>- skills and knowledge related to a specific language or dialect.</text:p>
          </table:table-cell>
          <table:table-cell office:value-type="string">
            <text:p>http://data.europa.eu/esco/concept-scheme/skills<text:line-break/>http://data.europa.eu/esco/concept-scheme/skills-hierarchy</text:p>
          </table:table-cell>
          <table:table-cell office:value-type="string">
            <text:p>Communicating with others in one or more foreign languages or dialects, in spoken or written forms.</text:p>
          </table:table-cell>
          <table:table-cell office:value-type="string">
            <text:p>S1.15.1</text:p>
          </table:table-cell>
        </table:table-row>
        <table:table-row>
          <table:table-cell office:value-type="string">
            <text:p>SkillGroup</text:p>
          </table:table-cell>
          <table:table-cell office:value-type="string">
            <text:p>http://data.europa.eu/esco/skill/03e0b95b-67d1-457a-b3f7-06c407cf6bec</text:p>
          </table:table-cell>
          <table:table-cell office:value-type="string">
            <text:p>handling and moving</text:p>
          </table:table-cell>
          <table:table-cell office:value-type="string">
            <text:p>handling goods or animals</text:p>
          </table:table-cell>
          <table:table-cell/>
          <table:table-cell office:value-type="string">
            <text:p>released</text:p>
          </table:table-cell>
          <table:table-cell/>
          <table:table-cell office:value-type="string">
            <text:p>Excludes:<text:line-break/>- Specific skills involving interaction with people.</text:p>
          </table:table-cell>
          <table:table-cell office:value-type="string">
            <text:p>http://data.europa.eu/esco/concept-scheme/skills<text:line-break/>http://data.europa.eu/esco/concept-scheme/skills-hierarchy</text:p>
          </table:table-cell>
          <table:table-cell office:value-type="string">
            <text:p>Sorting, arranging, moving, transforming, fabricating and cleaning goods and materials by hand or using handheld tools and equipment. Tending plants, crops and animals.</text:p>
          </table:table-cell>
          <table:table-cell office:value-type="string">
            <text:p>S6</text:p>
          </table:table-cell>
        </table:table-row>
        <table:table-row>
          <table:table-cell office:value-type="string">
            <text:p>SkillGroup</text:p>
          </table:table-cell>
          <table:table-cell office:value-type="string">
            <text:p>http://data.europa.eu/esco/skill/03efa398-a1cc-4589-9c10-84bf10f8d42d</text:p>
          </table:table-cell>
          <table:table-cell office:value-type="string">
            <text:p>installing, maintaining and repairing mechanical equipment</text:p>
          </table:table-cell>
          <table:table-cell office:value-type="string">
            <text:p>installing and maintaining mechanical equipment</text:p>
          </table:table-cell>
          <table:table-cell/>
          <table:table-cell office:value-type="string">
            <text:p>released</text:p>
          </table:table-cell>
          <table:table-cell/>
          <table:table-cell office:value-type="string">
            <text:p>Excludes:<text:line-break/>- Installing, maintaining and repairing mechatronic or robotic equipment and components.</text:p>
          </table:table-cell>
          <table:table-cell office:value-type="string">
            <text:p>http://data.europa.eu/esco/concept-scheme/skills<text:line-break/>http://data.europa.eu/esco/concept-scheme/skills-hierarchy</text:p>
          </table:table-cell>
          <table:table-cell office:value-type="string">
            <text:p>Installing, maintaining and repairing stationary and mobile mechanical equipment, components and devices.</text:p>
          </table:table-cell>
          <table:table-cell office:value-type="string">
            <text:p>S8.7.0</text:p>
          </table:table-cell>
        </table:table-row>
        <table:table-row>
          <table:table-cell office:value-type="string">
            <text:p>SkillGroup</text:p>
          </table:table-cell>
          <table:table-cell office:value-type="string">
            <text:p>http://data.europa.eu/esco/skill/048812ba-45ff-4801-b04f-b20c03432809</text:p>
          </table:table-cell>
          <table:table-cell office:value-type="string">
            <text:p>protecting and enforcing</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office:value-type="string">
            <text:p>Responding to public and personal safety and security needs and ensuring compliance to rules, standards, guidelines or laws.</text:p>
          </table:table-cell>
          <table:table-cell office:value-type="string">
            <text:p>S3.3</text:p>
          </table:table-cell>
        </table:table-row>
        <table:table-row>
          <table:table-cell office:value-type="string">
            <text:p>SkillGroup</text:p>
          </table:table-cell>
          <table:table-cell office:value-type="string">
            <text:p>http://data.europa.eu/esco/skill/04a13491-b58c-4d33-8b59-8fad0d55fe9e</text:p>
          </table:table-cell>
          <table:table-cell office:value-type="string">
            <text:p>transversal skills and competences</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table:table-cell office:value-type="string">
            <text:p>T</text:p>
          </table:table-cell>
        </table:table-row>
        <table:table-row>
          <table:table-cell office:value-type="string">
            <text:p>SkillGroup</text:p>
          </table:table-cell>
          <table:table-cell office:value-type="string">
            <text:p>http://data.europa.eu/esco/skill/062a9fde-cd91-44f9-9a2f-9e2bc3b281fd</text:p>
          </table:table-cell>
          <table:table-cell office:value-type="string">
            <text:p>advising on environmental issues</text:p>
          </table:table-cell>
          <table:table-cell table:number-columns-repeated="2"/>
          <table:table-cell office:value-type="string">
            <text:p>released</text:p>
          </table:table-cell>
          <table:table-cell office:value-type="string">
            <text:p>2023-06-20T14:35:24.12Z</text:p>
          </table:table-cell>
          <table:table-cell office:value-type="string">
            <text:p>Examples:<text:line-break/>- advise on environmental remediation<text:line-break/>- advise on pollution prevention.</text:p>
          </table:table-cell>
          <table:table-cell office:value-type="string">
            <text:p>http://data.europa.eu/esco/concept-scheme/skills<text:line-break/>http://data.europa.eu/esco/concept-scheme/skills-hierarchy</text:p>
          </table:table-cell>
          <table:table-cell office:value-type="string">
            <text:p>Providing information and advice on environmental protection and sustainability.</text:p>
          </table:table-cell>
          <table:table-cell office:value-type="string">
            <text:p>S1.5.5</text:p>
          </table:table-cell>
        </table:table-row>
        <table:table-row>
          <table:table-cell office:value-type="string">
            <text:p>SkillGroup</text:p>
          </table:table-cell>
          <table:table-cell office:value-type="string">
            <text:p>http://data.europa.eu/esco/skill/06769591-b8cf-46b2-b1d3-6602b1cf440e</text:p>
          </table:table-cell>
          <table:table-cell office:value-type="string">
            <text:p>operating wood processing and papermaking machinery</text:p>
          </table:table-cell>
          <table:table-cell table:number-columns-repeated="2"/>
          <table:table-cell office:value-type="string">
            <text:p>released</text:p>
          </table:table-cell>
          <table:table-cell/>
          <table:table-cell office:value-type="string">
            <text:p>Examples:<text:line-break/>- Operate wood chipper<text:line-break/>- Operate pulper<text:line-break/>- Make paper slurry.</text:p>
          </table:table-cell>
          <table:table-cell office:value-type="string">
            <text:p>http://data.europa.eu/esco/concept-scheme/skills<text:line-break/>http://data.europa.eu/esco/concept-scheme/skills-hierarchy</text:p>
          </table:table-cell>
          <table:table-cell office:value-type="string">
            <text:p>Operating machinery for processing wood and timber, and for production of wood pulp and paper.</text:p>
          </table:table-cell>
          <table:table-cell office:value-type="string">
            <text:p>S8.4.6</text:p>
          </table:table-cell>
        </table:table-row>
        <table:table-row>
          <table:table-cell office:value-type="string">
            <text:p>SkillGroup</text:p>
          </table:table-cell>
          <table:table-cell office:value-type="string">
            <text:p>http://data.europa.eu/esco/skill/06fdd94c-292d-49e3-9c78-bbcbc2088232</text:p>
          </table:table-cell>
          <table:table-cell office:value-type="string">
            <text:p>maintaining operational records</text:p>
          </table:table-cell>
          <table:table-cell table:number-columns-repeated="2"/>
          <table:table-cell office:value-type="string">
            <text:p>released</text:p>
          </table:table-cell>
          <table:table-cell office:value-type="string">
            <text:p>2023-11-06T15:22:30.261Z</text:p>
          </table:table-cell>
          <table:table-cell office:value-type="string">
            <text:p>Examples:<text:line-break/>- keep personal records<text:line-break/>- keep stock records<text:line-break/>- prepare production reports Excludes:<text:line-break/>- write reports or documents requiring drafting of original text.</text:p>
          </table:table-cell>
          <table:table-cell office:value-type="string">
            <text:p>http://data.europa.eu/esco/concept-scheme/skills<text:line-break/>http://data.europa.eu/esco/concept-scheme/skills-hierarchy</text:p>
          </table:table-cell>
          <table:table-cell office:value-type="string">
            <text:p>Keeping records required for operational purposes such as those related to staff, clients, production and stock inventories.</text:p>
          </table:table-cell>
          <table:table-cell office:value-type="string">
            <text:p>S2.2.5</text:p>
          </table:table-cell>
        </table:table-row>
        <table:table-row>
          <table:table-cell office:value-type="string">
            <text:p>SkillGroup</text:p>
          </table:table-cell>
          <table:table-cell office:value-type="string">
            <text:p>http://data.europa.eu/esco/skill/0779d482-4154-4fbb-9a22-d9fd89c39d67</text:p>
          </table:table-cell>
          <table:table-cell office:value-type="string">
            <text:p>organising, planning and scheduling work and activities</text:p>
          </table:table-cell>
          <table:table-cell office:value-type="string">
            <text:p>organising and planning</text:p>
          </table:table-cell>
          <table:table-cell/>
          <table:table-cell office:value-type="string">
            <text:p>released</text:p>
          </table:table-cell>
          <table:table-cell office:value-type="string">
            <text:p>2020-12-11T09:16:01.788Z</text:p>
          </table:table-cell>
          <table:table-cell/>
          <table:table-cell office:value-type="string">
            <text:p>http://data.europa.eu/esco/concept-scheme/skills<text:line-break/>http://data.europa.eu/esco/concept-scheme/skills-hierarchy</text:p>
          </table:table-cell>
          <table:table-cell office:value-type="string">
            <text:p>Directing activities and tasks, establishing schedules and co-ordinating the activities of groups and individuals to complete objectives on time and within budget.</text:p>
          </table:table-cell>
          <table:table-cell office:value-type="string">
            <text:p>S4.2.0</text:p>
          </table:table-cell>
        </table:table-row>
        <table:table-row>
          <table:table-cell office:value-type="string">
            <text:p>SkillGroup</text:p>
          </table:table-cell>
          <table:table-cell office:value-type="string">
            <text:p>http://data.europa.eu/esco/skill/07f47dea-587c-40c0-990a-6c092cc3e6a4</text:p>
          </table:table-cell>
          <table:table-cell office:value-type="string">
            <text:p>interviewing</text:p>
          </table:table-cell>
          <table:table-cell table:number-columns-repeated="2"/>
          <table:table-cell office:value-type="string">
            <text:p>released</text:p>
          </table:table-cell>
          <table:table-cell office:value-type="string">
            <text:p>2021-09-20T14:03:31.797Z</text:p>
          </table:table-cell>
          <table:table-cell office:value-type="string">
            <text:p>Examples:<text:line-break/>- adhere to questionnaires<text:line-break/>- interview insurance claimants<text:line-break/>- interrogate individuals.</text:p>
          </table:table-cell>
          <table:table-cell office:value-type="string">
            <text:p>http://data.europa.eu/esco/concept-scheme/skills<text:line-break/>http://data.europa.eu/esco/concept-scheme/skills-hierarchy</text:p>
          </table:table-cell>
          <table:table-cell office:value-type="string">
            <text:p>Interacting verbally in a formal way, usually using structured questioning, to collect information, determine opinions, or determine suitability of individuals for jobs, roles or tasks.</text:p>
          </table:table-cell>
          <table:table-cell office:value-type="string">
            <text:p>S1.7.1</text:p>
          </table:table-cell>
        </table:table-row>
        <table:table-row>
          <table:table-cell office:value-type="string">
            <text:p>SkillGroup</text:p>
          </table:table-cell>
          <table:table-cell office:value-type="string">
            <text:p>http://data.europa.eu/esco/skill/08104c27-d4b2-4d40-ae97-dde65e71712f</text:p>
          </table:table-cell>
          <table:table-cell office:value-type="string">
            <text:p>advising on workplace health and safety issues</text:p>
          </table:table-cell>
          <table:table-cell table:number-columns-repeated="2"/>
          <table:table-cell office:value-type="string">
            <text:p>released</text:p>
          </table:table-cell>
          <table:table-cell/>
          <table:table-cell office:value-type="string">
            <text:p>Examples:<text:line-break/>- advise on safety improvements<text:line-break/>- inform on safety standards.</text:p>
          </table:table-cell>
          <table:table-cell office:value-type="string">
            <text:p>http://data.europa.eu/esco/concept-scheme/skills<text:line-break/>http://data.europa.eu/esco/concept-scheme/skills-hierarchy</text:p>
          </table:table-cell>
          <table:table-cell office:value-type="string">
            <text:p>Promoting and providing information and advice on health and safety in the workplace.</text:p>
          </table:table-cell>
          <table:table-cell office:value-type="string">
            <text:p>S1.5.9</text:p>
          </table:table-cell>
        </table:table-row>
        <table:table-row>
          <table:table-cell office:value-type="string">
            <text:p>SkillGroup</text:p>
          </table:table-cell>
          <table:table-cell office:value-type="string">
            <text:p>http://data.europa.eu/esco/skill/0a295163-3e17-47ad-99ac-2b507ce30adb</text:p>
          </table:table-cell>
          <table:table-cell office:value-type="string">
            <text:p>designing systems and products</text:p>
          </table:table-cell>
          <table:table-cell table:number-columns-repeated="2"/>
          <table:table-cell office:value-type="string">
            <text:p>released</text:p>
          </table:table-cell>
          <table:table-cell office:value-type="string">
            <text:p>2022-12-15T10:20:53.743Z</text:p>
          </table:table-cell>
          <table:table-cell office:value-type="string">
            <text:p>Excludes:<text:line-break/>- Styling hair<text:line-break/>- Creating artistic, visual or instructive materials.</text:p>
          </table:table-cell>
          <table:table-cell office:value-type="string">
            <text:p>http://data.europa.eu/esco/concept-scheme/skills<text:line-break/>http://data.europa.eu/esco/concept-scheme/skills-hierarchy</text:p>
          </table:table-cell>
          <table:table-cell office:value-type="string">
            <text:p>Creating a plan or specification for the construction of an object, system or structure based on aesthetic and/or functional design concepts.</text:p>
          </table:table-cell>
          <table:table-cell office:value-type="string">
            <text:p>S1.11</text:p>
          </table:table-cell>
        </table:table-row>
        <table:table-row>
          <table:table-cell office:value-type="string">
            <text:p>SkillGroup</text:p>
          </table:table-cell>
          <table:table-cell office:value-type="string">
            <text:p>http://data.europa.eu/esco/skill/0a2d70ee-d435-4965-9e96-702b2fb65740</text:p>
          </table:table-cell>
          <table:table-cell office:value-type="string">
            <text:p>information skills</text:p>
          </table:table-cell>
          <table:table-cell office:value-type="string">
            <text:p>working with information</text:p>
          </table:table-cell>
          <table:table-cell/>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office:value-type="string">
            <text:p>Collecting, storing, monitoring, and using information; Conducting studies, investigations and tests; maintaining records; managing, evaluating, processing, analysing and monitoring information and projecting outcomes.</text:p>
          </table:table-cell>
          <table:table-cell office:value-type="string">
            <text:p>S2</text:p>
          </table:table-cell>
        </table:table-row>
        <table:table-row>
          <table:table-cell office:value-type="string">
            <text:p>SkillGroup</text:p>
          </table:table-cell>
          <table:table-cell office:value-type="string">
            <text:p>http://data.europa.eu/esco/skill/0a400212-8693-4b1f-b0ca-d1f82c321916</text:p>
          </table:table-cell>
          <table:table-cell office:value-type="string">
            <text:p>providing health care or medical treatments</text:p>
          </table:table-cell>
          <table:table-cell office:value-type="string">
            <text:p>healthcare</text:p>
          </table:table-cell>
          <table:table-cell/>
          <table:table-cell office:value-type="string">
            <text:p>released</text:p>
          </table:table-cell>
          <table:table-cell office:value-type="string">
            <text:p>2022-07-15T14:44:44.924Z</text:p>
          </table:table-cell>
          <table:table-cell office:value-type="string">
            <text:p>Excludes:<text:line-break/>- Veterinary care<text:line-break/>- Diagnosing health conditions.</text:p>
          </table:table-cell>
          <table:table-cell office:value-type="string">
            <text:p>http://data.europa.eu/esco/concept-scheme/skills<text:line-break/>http://data.europa.eu/esco/concept-scheme/skills-hierarchy</text:p>
          </table:table-cell>
          <table:table-cell office:value-type="string">
            <text:p>Treating injuries and health conditions through the provision of health care and medical treatments to people.</text:p>
          </table:table-cell>
          <table:table-cell office:value-type="string">
            <text:p>S3.2.0</text:p>
          </table:table-cell>
        </table:table-row>
        <table:table-row>
          <table:table-cell office:value-type="string">
            <text:p>SkillGroup</text:p>
          </table:table-cell>
          <table:table-cell office:value-type="string">
            <text:p>http://data.europa.eu/esco/skill/0a4c5823-8b09-4e6b-95b4-8036ef3b9c4c</text:p>
          </table:table-cell>
          <table:table-cell office:value-type="string">
            <text:p>advocating for individual or community needs</text:p>
          </table:table-cell>
          <table:table-cell table:number-columns-repeated="2"/>
          <table:table-cell office:value-type="string">
            <text:p>released</text:p>
          </table:table-cell>
          <table:table-cell office:value-type="string">
            <text:p>2022-06-19T12:25:44.633Z</text:p>
          </table:table-cell>
          <table:table-cell office:value-type="string">
            <text:p>Excludes:<text:line-break/>- Promoting goods and services<text:line-break/>- Representing clients in legal proceeding Examples:<text:line-break/>- Advocate for healthcare users' needs<text:line-break/>- Promote service users' rights<text:line-break/>- Influence legislators.</text:p>
          </table:table-cell>
          <table:table-cell office:value-type="string">
            <text:p>http://data.europa.eu/esco/concept-scheme/skills<text:line-break/>http://data.europa.eu/esco/concept-scheme/skills-hierarchy</text:p>
          </table:table-cell>
          <table:table-cell office:value-type="string">
            <text:p>Delivering arguments in favour of something, such as a cause, idea, or policy, to benefit another person or a community.</text:p>
          </table:table-cell>
          <table:table-cell office:value-type="string">
            <text:p>S1.2.4</text:p>
          </table:table-cell>
        </table:table-row>
        <table:table-row>
          <table:table-cell office:value-type="string">
            <text:p>SkillGroup</text:p>
          </table:table-cell>
          <table:table-cell office:value-type="string">
            <text:p>http://data.europa.eu/esco/skill/0a88a13f-693a-4dde-b44c-22e6f98fabc6</text:p>
          </table:table-cell>
          <table:table-cell office:value-type="string">
            <text:p>operating communications equipment</text:p>
          </table:table-cell>
          <table:table-cell table:number-columns-repeated="2"/>
          <table:table-cell office:value-type="string">
            <text:p>released</text:p>
          </table:table-cell>
          <table:table-cell office:value-type="string">
            <text:p>2021-09-16T16:37:34.751Z</text:p>
          </table:table-cell>
          <table:table-cell office:value-type="string">
            <text:p>Excludes:<text:line-break/>- Installing and setting up precision equipment Examples:<text:line-break/>- Operate broadcast equipment<text:line-break/>- Operate radar equipment<text:line-break/>- Operate maritime communication equipment.</text:p>
          </table:table-cell>
          <table:table-cell office:value-type="string">
            <text:p>http://data.europa.eu/esco/concept-scheme/skills<text:line-break/>http://data.europa.eu/esco/concept-scheme/skills-hierarchy</text:p>
          </table:table-cell>
          <table:table-cell office:value-type="string">
            <text:p>Controlling, monitoring, and adjusting telecommunication, navigation, radio transmission or broadcasting equipment.</text:p>
          </table:table-cell>
          <table:table-cell office:value-type="string">
            <text:p>S8.6.4</text:p>
          </table:table-cell>
        </table:table-row>
        <table:table-row>
          <table:table-cell office:value-type="string">
            <text:p>SkillGroup</text:p>
          </table:table-cell>
          <table:table-cell office:value-type="string">
            <text:p>http://data.europa.eu/esco/skill/0ac31705-79ff-4409-a818-c9d0a6388e84</text:p>
          </table:table-cell>
          <table:table-cell office:value-type="string">
            <text:p>counselling</text:p>
          </table:table-cell>
          <table:table-cell table:number-columns-repeated="2"/>
          <table:table-cell office:value-type="string">
            <text:p>released</text:p>
          </table:table-cell>
          <table:table-cell office:value-type="string">
            <text:p>2020-12-04T16:35:28.167Z</text:p>
          </table:table-cell>
          <table:table-cell/>
          <table:table-cell office:value-type="string">
            <text:p>http://data.europa.eu/esco/concept-scheme/skills<text:line-break/>http://data.europa.eu/esco/concept-scheme/skills-hierarchy</text:p>
          </table:table-cell>
          <table:table-cell office:value-type="string">
            <text:p>Responding to clients' needs by interpreting their emotional and motivational states, and determining and providing appropriate support or interventions.</text:p>
          </table:table-cell>
          <table:table-cell office:value-type="string">
            <text:p>S3.1.0</text:p>
          </table:table-cell>
        </table:table-row>
        <table:table-row>
          <table:table-cell office:value-type="string">
            <text:p>SkillGroup</text:p>
          </table:table-cell>
          <table:table-cell office:value-type="string">
            <text:p>http://data.europa.eu/esco/skill/0b3930a2-8a13-4932-8a09-4c72ec8af464</text:p>
          </table:table-cell>
          <table:table-cell office:value-type="string">
            <text:p>monitoring quality of products</text:p>
          </table:table-cell>
          <table:table-cell table:number-columns-repeated="2"/>
          <table:table-cell office:value-type="string">
            <text:p>released</text:p>
          </table:table-cell>
          <table:table-cell office:value-type="string">
            <text:p>2022-06-21T15:02:59.368Z</text:p>
          </table:table-cell>
          <table:table-cell office:value-type="string">
            <text:p>Examples: - check paper quality - inspect material.</text:p>
          </table:table-cell>
          <table:table-cell office:value-type="string">
            <text:p>http://data.europa.eu/esco/concept-scheme/skills<text:line-break/>http://data.europa.eu/esco/concept-scheme/skills-hierarchy</text:p>
          </table:table-cell>
          <table:table-cell office:value-type="string">
            <text:p>Monitoring the manufacturing process of products, testing their quality and investigating them for defects.</text:p>
          </table:table-cell>
          <table:table-cell office:value-type="string">
            <text:p>S2.8.10</text:p>
          </table:table-cell>
        </table:table-row>
        <table:table-row>
          <table:table-cell office:value-type="string">
            <text:p>SkillGroup</text:p>
          </table:table-cell>
          <table:table-cell office:value-type="string">
            <text:p>http://data.europa.eu/esco/skill/0b8d15c9-7b4f-4163-b863-fe5b756d3e7f</text:p>
          </table:table-cell>
          <table:table-cell office:value-type="string">
            <text:p>repairing and installing mechanical equipment</text:p>
          </table:table-cell>
          <table:table-cell table:number-columns-repeated="2"/>
          <table:table-cell office:value-type="string">
            <text:p>released</text:p>
          </table:table-cell>
          <table:table-cell/>
          <table:table-cell office:value-type="string">
            <text:p>Examples:<text:line-break/>- Repair engines<text:line-break/>- Repair vessel mechanical systems<text:line-break/>- Install mining machinery.</text:p>
          </table:table-cell>
          <table:table-cell office:value-type="string">
            <text:p>http://data.europa.eu/esco/concept-scheme/skills<text:line-break/>http://data.europa.eu/esco/concept-scheme/skills-hierarchy</text:p>
          </table:table-cell>
          <table:table-cell office:value-type="string">
            <text:p>Repairing, dismantling, reassembling and installing stationary and mobile mechanical equipment, components and devices.</text:p>
          </table:table-cell>
          <table:table-cell office:value-type="string">
            <text:p>S8.7.1</text:p>
          </table:table-cell>
        </table:table-row>
        <table:table-row>
          <table:table-cell office:value-type="string">
            <text:p>SkillGroup</text:p>
          </table:table-cell>
          <table:table-cell office:value-type="string">
            <text:p>http://data.europa.eu/esco/skill/0b9968af-72de-470a-98e1-2d19577443fb</text:p>
          </table:table-cell>
          <table:table-cell office:value-type="string">
            <text:p>resolving computer problems</text:p>
          </table:table-cell>
          <table:table-cell table:number-columns-repeated="2"/>
          <table:table-cell office:value-type="string">
            <text:p>released</text:p>
          </table:table-cell>
          <table:table-cell office:value-type="string">
            <text:p>2021-09-16T17:48:22.348Z</text:p>
          </table:table-cell>
          <table:table-cell office:value-type="string">
            <text:p>Excludes:<text:line-break/>- Installing, maintaining and repairing computer hardware Examples:<text:line-break/>- Troubleshoot website<text:line-break/>- Implement ICT recovery system.</text:p>
          </table:table-cell>
          <table:table-cell office:value-type="string">
            <text:p>http://data.europa.eu/esco/concept-scheme/skills<text:line-break/>http://data.europa.eu/esco/concept-scheme/skills-hierarchy</text:p>
          </table:table-cell>
          <table:table-cell office:value-type="string">
            <text:p>Identifying technical problems with ICT systems and devices and performing actions to solve the problems.</text:p>
          </table:table-cell>
          <table:table-cell office:value-type="string">
            <text:p>S5.2.3</text:p>
          </table:table-cell>
        </table:table-row>
        <table:table-row>
          <table:table-cell office:value-type="string">
            <text:p>SkillGroup</text:p>
          </table:table-cell>
          <table:table-cell office:value-type="string">
            <text:p>http://data.europa.eu/esco/skill/0c92c33c-2859-4705-87ae-4fdd71d0f8f6</text:p>
          </table:table-cell>
          <table:table-cell office:value-type="string">
            <text:p>using more than one language</text:p>
          </table:table-cell>
          <table:table-cell office:value-type="string">
            <text:p>working with different languages</text:p>
          </table:table-cell>
          <table:table-cell/>
          <table:table-cell office:value-type="string">
            <text:p>released</text:p>
          </table:table-cell>
          <table:table-cell office:value-type="string">
            <text:p>2021-04-15T08:19:35.605Z</text:p>
          </table:table-cell>
          <table:table-cell office:value-type="string">
            <text:p>Excludes:<text:line-break/>- Skills and knowledge related to a specific language or dialect.</text:p>
          </table:table-cell>
          <table:table-cell office:value-type="string">
            <text:p>http://data.europa.eu/esco/concept-scheme/skills<text:line-break/>http://data.europa.eu/esco/concept-scheme/skills-hierarchy</text:p>
          </table:table-cell>
          <table:table-cell office:value-type="string">
            <text:p>Using more than one language or dialect to communicate verbally or in written form, or to translate from one language to another.</text:p>
          </table:table-cell>
          <table:table-cell office:value-type="string">
            <text:p>S1.15.0</text:p>
          </table:table-cell>
        </table:table-row>
        <table:table-row>
          <table:table-cell office:value-type="string">
            <text:p>SkillGroup</text:p>
          </table:table-cell>
          <table:table-cell office:value-type="string">
            <text:p>http://data.europa.eu/esco/skill/0d80a782-99ff-4f49-abbe-c72524c6f390</text:p>
          </table:table-cell>
          <table:table-cell office:value-type="string">
            <text:p>negotiating and managing contracts and agreements</text:p>
          </table:table-cell>
          <table:table-cell table:number-columns-repeated="2"/>
          <table:table-cell office:value-type="string">
            <text:p>released</text:p>
          </table:table-cell>
          <table:table-cell office:value-type="string">
            <text:p>2020-12-11T13:14:15.065Z</text:p>
          </table:table-cell>
          <table:table-cell office:value-type="string">
            <text:p>Examples include: - conclude business agreements<text:line-break/>- manage contracts<text:line-break/>- negotiate price.</text:p>
          </table:table-cell>
          <table:table-cell office:value-type="string">
            <text:p>http://data.europa.eu/esco/concept-scheme/skills<text:line-break/>http://data.europa.eu/esco/concept-scheme/skills-hierarchy</text:p>
          </table:table-cell>
          <table:table-cell office:value-type="string">
            <text:p>Negotiating and managing contracts and agreements with others concerning matters such as prices, terms of service, employment conditions, access to land and facilities.</text:p>
          </table:table-cell>
          <table:table-cell office:value-type="string">
            <text:p>S1.1.1</text:p>
          </table:table-cell>
        </table:table-row>
        <table:table-row>
          <table:table-cell office:value-type="string">
            <text:p>SkillGroup</text:p>
          </table:table-cell>
          <table:table-cell office:value-type="string">
            <text:p>http://data.europa.eu/esco/skill/0e0a44a8-654c-4e85-986a-fb4386114838</text:p>
          </table:table-cell>
          <table:table-cell office:value-type="string">
            <text:p>monitoring safety or security</text:p>
          </table:table-cell>
          <table:table-cell table:number-columns-repeated="2"/>
          <table:table-cell office:value-type="string">
            <text:p>released</text:p>
          </table:table-cell>
          <table:table-cell office:value-type="string">
            <text:p>2023-06-20T13:56:43.469Z</text:p>
          </table:table-cell>
          <table:table-cell office:value-type="string">
            <text:p>Excludes:<text:line-break/>- Testing and analysing substances Examples:<text:line-break/>- Conduct on board safety inspections<text:line-break/>- Monitor building security<text:line-break/>- Monitor parking areas to maintain security<text:line-break/>- Inspect mine safety conditions.</text:p>
          </table:table-cell>
          <table:table-cell office:value-type="string">
            <text:p>http://data.europa.eu/esco/concept-scheme/skills<text:line-break/>http://data.europa.eu/esco/concept-scheme/skills-hierarchy</text:p>
          </table:table-cell>
          <table:table-cell office:value-type="string">
            <text:p>Monitoring and inspecting the safety or security of work areas, facilities, or properties.</text:p>
          </table:table-cell>
          <table:table-cell office:value-type="string">
            <text:p>S2.8.4</text:p>
          </table:table-cell>
        </table:table-row>
        <table:table-row>
          <table:table-cell office:value-type="string">
            <text:p>SkillGroup</text:p>
          </table:table-cell>
          <table:table-cell office:value-type="string">
            <text:p>http://data.europa.eu/esco/skill/0edd863d-b02d-4714-a1a2-835d6dd23c55</text:p>
          </table:table-cell>
          <table:table-cell office:value-type="string">
            <text:p>installing insulation materials</text:p>
          </table:table-cell>
          <table:table-cell table:number-columns-repeated="2"/>
          <table:table-cell office:value-type="string">
            <text:p>released</text:p>
          </table:table-cell>
          <table:table-cell/>
          <table:table-cell office:value-type="string">
            <text:p>Examples:<text:line-break/>- Apply spray foam insulation<text:line-break/>- Install insulation blocks.</text:p>
          </table:table-cell>
          <table:table-cell office:value-type="string">
            <text:p>http://data.europa.eu/esco/concept-scheme/skills<text:line-break/>http://data.europa.eu/esco/concept-scheme/skills-hierarchy</text:p>
          </table:table-cell>
          <table:table-cell office:value-type="string">
            <text:p>Installing materials to insulate a structure from thermic or acoustic influences and to prevent fire.</text:p>
          </table:table-cell>
          <table:table-cell office:value-type="string">
            <text:p>S7.2.3</text:p>
          </table:table-cell>
        </table:table-row>
        <table:table-row>
          <table:table-cell office:value-type="string">
            <text:p>SkillGroup</text:p>
          </table:table-cell>
          <table:table-cell office:value-type="string">
            <text:p>http://data.europa.eu/esco/skill/0f804e14-001d-4ec0-b3f7-eb6a23ad43cb</text:p>
          </table:table-cell>
          <table:table-cell office:value-type="string">
            <text:p>negotiating</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office:value-type="string">
            <text:p>Exchanging ideas while analysing issues and interests at stake, enabling opposing sides to resolve disputes and reach agreement, or making decisions to resolve disputes or impose justice.</text:p>
          </table:table-cell>
          <table:table-cell office:value-type="string">
            <text:p>S1.1.0</text:p>
          </table:table-cell>
        </table:table-row>
        <table:table-row>
          <table:table-cell office:value-type="string">
            <text:p>SkillGroup</text:p>
          </table:table-cell>
          <table:table-cell office:value-type="string">
            <text:p>http://data.europa.eu/esco/skill/0f8f9438-8529-41b8-bb7a-4d91121e3192</text:p>
          </table:table-cell>
          <table:table-cell office:value-type="string">
            <text:p>making patterns and templates</text:p>
          </table:table-cell>
          <table:table-cell table:number-columns-repeated="2"/>
          <table:table-cell office:value-type="string">
            <text:p>released</text:p>
          </table:table-cell>
          <table:table-cell office:value-type="string">
            <text:p>2023-02-22T19:55:15.987Z</text:p>
          </table:table-cell>
          <table:table-cell office:value-type="string">
            <text:p>Examples:<text:line-break/>- Create floor plan template<text:line-break/>- Create patterns for garments.</text:p>
          </table:table-cell>
          <table:table-cell office:value-type="string">
            <text:p>http://data.europa.eu/esco/concept-scheme/skills<text:line-break/>http://data.europa.eu/esco/concept-scheme/skills-hierarchy</text:p>
          </table:table-cell>
          <table:table-cell office:value-type="string">
            <text:p>Creating two dimensional patterns or templates for purposes such as cutting and fabricating articles in different shapes and sizes, or placement of items.</text:p>
          </table:table-cell>
          <table:table-cell office:value-type="string">
            <text:p>S6.6.2</text:p>
          </table:table-cell>
        </table:table-row>
        <table:table-row>
          <table:table-cell office:value-type="string">
            <text:p>SkillGroup</text:p>
          </table:table-cell>
          <table:table-cell office:value-type="string">
            <text:p>http://data.europa.eu/esco/skill/1034004c-0347-4765-8794-b65d2c92b379</text:p>
          </table:table-cell>
          <table:table-cell office:value-type="string">
            <text:p>documenting and recording information</text:p>
          </table:table-cell>
          <table:table-cell table:number-columns-repeated="2"/>
          <table:table-cell office:value-type="string">
            <text:p>released</text:p>
          </table:table-cell>
          <table:table-cell office:value-type="string">
            <text:p>2020-12-10T10:43:07.597Z</text:p>
          </table:table-cell>
          <table:table-cell office:value-type="string">
            <text:p>Excludes:<text:line-break/>- Writing reports or documents requiring drafting of original text.</text:p>
          </table:table-cell>
          <table:table-cell office:value-type="string">
            <text:p>http://data.europa.eu/esco/concept-scheme/skills<text:line-break/>http://data.europa.eu/esco/concept-scheme/skills-hierarchy</text:p>
          </table:table-cell>
          <table:table-cell office:value-type="string">
            <text:p>Maintaining records of information, transactions and activities in digital, paper or other forms.</text:p>
          </table:table-cell>
          <table:table-cell office:value-type="string">
            <text:p>S2.2.0</text:p>
          </table:table-cell>
        </table:table-row>
        <table:table-row>
          <table:table-cell office:value-type="string">
            <text:p>SkillGroup</text:p>
          </table:table-cell>
          <table:table-cell office:value-type="string">
            <text:p>http://data.europa.eu/esco/skill/103af23e-d56c-47ab-b991-55c94dcdef50</text:p>
          </table:table-cell>
          <table:table-cell office:value-type="string">
            <text:p>advising and consulting</text:p>
          </table:table-cell>
          <table:table-cell table:number-columns-repeated="2"/>
          <table:table-cell office:value-type="string">
            <text:p>released</text:p>
          </table:table-cell>
          <table:table-cell office:value-type="string">
            <text:p>2023-10-27T14:03:21.216Z</text:p>
          </table:table-cell>
          <table:table-cell office:value-type="string">
            <text:p>Excludes:<text:line-break/>- Psychological, behavioural and social counselling; see S3.1.1.</text:p>
          </table:table-cell>
          <table:table-cell office:value-type="string">
            <text:p>http://data.europa.eu/esco/concept-scheme/skills<text:line-break/>http://data.europa.eu/esco/concept-scheme/skills-hierarchy</text:p>
          </table:table-cell>
          <table:table-cell office:value-type="string">
            <text:p>Providing guidance and advice to enable decision-making about tasks, situations, and processes.</text:p>
          </table:table-cell>
          <table:table-cell office:value-type="string">
            <text:p>S1.5.0</text:p>
          </table:table-cell>
        </table:table-row>
        <table:table-row>
          <table:table-cell office:value-type="string">
            <text:p>SkillGroup</text:p>
          </table:table-cell>
          <table:table-cell office:value-type="string">
            <text:p>http://data.europa.eu/esco/skill/1072f444-8a7d-41c1-aa6f-d536f20d94bf</text:p>
          </table:table-cell>
          <table:table-cell office:value-type="string">
            <text:p>artistic and creative writing</text:p>
          </table:table-cell>
          <table:table-cell table:number-columns-repeated="2"/>
          <table:table-cell office:value-type="string">
            <text:p>released</text:p>
          </table:table-cell>
          <table:table-cell/>
          <table:table-cell office:value-type="string">
            <text:p>Examples:<text:line-break/>- write storylines<text:line-break/>- create script for artistic production<text:line-break/>- write headlines<text:line-break/>- perform copywriting Excludes:<text:line-break/>- revise translations<text:line-break/>- write computer programmes / coding.</text:p>
          </table:table-cell>
          <table:table-cell office:value-type="string">
            <text:p>http://data.europa.eu/esco/concept-scheme/skills<text:line-break/>http://data.europa.eu/esco/concept-scheme/skills-hierarchy</text:p>
          </table:table-cell>
          <table:table-cell office:value-type="string">
            <text:p>Writing original text of a creative nature for artistic, journalistic, promotional or similar purposes.</text:p>
          </table:table-cell>
          <table:table-cell office:value-type="string">
            <text:p>S1.13.2</text:p>
          </table:table-cell>
        </table:table-row>
        <table:table-row>
          <table:table-cell office:value-type="string">
            <text:p>SkillGroup</text:p>
          </table:table-cell>
          <table:table-cell office:value-type="string">
            <text:p>http://data.europa.eu/esco/skill/119a2f5c-3c3e-4b0d-9813-06a553c8860c</text:p>
          </table:table-cell>
          <table:table-cell office:value-type="string">
            <text:p>providing general assistance to people</text:p>
          </table:table-cell>
          <table:table-cell table:number-columns-repeated="2"/>
          <table:table-cell office:value-type="string">
            <text:p>released</text:p>
          </table:table-cell>
          <table:table-cell office:value-type="string">
            <text:p>2022-08-24T13:46:54.315Z</text:p>
          </table:table-cell>
          <table:table-cell office:value-type="string">
            <text:p>Examples:<text:line-break/>- guarantee customer satisfaction<text:line-break/>- assist pool users Excludes:<text:line-break/>- escort passengers<text:line-break/>- provide social guidance over the phone.</text:p>
          </table:table-cell>
          <table:table-cell office:value-type="string">
            <text:p>http://data.europa.eu/esco/concept-scheme/skills<text:line-break/>http://data.europa.eu/esco/concept-scheme/skills-hierarchy</text:p>
          </table:table-cell>
          <table:table-cell office:value-type="string">
            <text:p>Providing practical assistance and service to clients and the public in using services and facilities, such as assisting with paperwork or supporting their special needs.</text:p>
          </table:table-cell>
          <table:table-cell office:value-type="string">
            <text:p>S3.4.4</text:p>
          </table:table-cell>
        </table:table-row>
        <table:table-row>
          <table:table-cell office:value-type="string">
            <text:p>SkillGroup</text:p>
          </table:table-cell>
          <table:table-cell office:value-type="string">
            <text:p>http://data.europa.eu/esco/skill/12022223-8c30-418a-8f83-658396c9fec2</text:p>
          </table:table-cell>
          <table:table-cell office:value-type="string">
            <text:p>physical and manual skills and competences</text:p>
          </table:table-cell>
          <table:table-cell office:value-type="string">
            <text:p>physical fitness<text:line-break/>psychomotor abilities<text:line-break/>manual dexterity<text:line-break/>physical flexibility and coordination</text:p>
          </table:table-cell>
          <table:table-cell office:value-type="string">
            <text:p>good sense of pressure and touch<text:line-break/>good sense of taste<text:line-break/>speed<text:line-break/>good sense of touch<text:line-break/>athletic performance<text:line-break/>climb<text:line-break/>good sense of hearing<text:line-break/>reaction time<text:line-break/>dynamic flexibility<text:line-break/>olfactory skills<text:line-break/>good sense of smell<text:line-break/>good eyesight<text:line-break/>coordination<text:line-break/>color sense</text:p>
          </table:table-cell>
          <table:table-cell office:value-type="string">
            <text:p>released</text:p>
          </table:table-cell>
          <table:table-cell office:value-type="string">
            <text:p>2021-08-30T09:17:04.357Z</text:p>
          </table:table-cell>
          <table:table-cell/>
          <table:table-cell office:value-type="string">
            <text:p>http://data.europa.eu/esco/concept-scheme/skills<text:line-break/>http://data.europa.eu/esco/concept-scheme/skills-hierarchy<text:line-break/>http://data.europa.eu/esco/concept-scheme/skill-transversal-groups</text:p>
          </table:table-cell>
          <table:table-cell office:value-type="string">
            <text:p>Skills and competences relating to the ability to perform tasks and activities requiring manual dexterity, agility and/or bodily strength. This is demonstrated by carrying out tasks and activities in demanding or hazardous environments requiring endurance or stamina. These tasks and activities may be carried out by hand, with other direct physical intervention, or by using equipment, tools or technology (such as ICT devices, machinery, craft or musical instruments) which requires guidance, movement or force.</text:p>
          </table:table-cell>
          <table:table-cell office:value-type="string">
            <text:p>T5</text:p>
          </table:table-cell>
        </table:table-row>
        <table:table-row>
          <table:table-cell office:value-type="string">
            <text:p>SkillGroup</text:p>
          </table:table-cell>
          <table:table-cell office:value-type="string">
            <text:p>http://data.europa.eu/esco/skill/13d301d0-98cb-414f-a8f9-a3f059228133</text:p>
          </table:table-cell>
          <table:table-cell office:value-type="string">
            <text:p>dealing with problems</text:p>
          </table:table-cell>
          <table:table-cell office:value-type="string">
            <text:p>problem solving skills<text:line-break/>addressing problems and issues</text:p>
          </table:table-cell>
          <table:table-cell office:value-type="string">
            <text:p>solution-oriented approach<text:line-break/>solution and process-oriented thinking</text:p>
          </table:table-cell>
          <table:table-cell office:value-type="string">
            <text:p>released</text:p>
          </table:table-cell>
          <table:table-cell office:value-type="string">
            <text:p>2021-08-30T15:44:01.988Z</text:p>
          </table:table-cell>
          <table:table-cell/>
          <table:table-cell office:value-type="string">
            <text:p>http://data.europa.eu/esco/concept-scheme/skills<text:line-break/>http://data.europa.eu/esco/concept-scheme/skills-hierarchy<text:line-break/>http://data.europa.eu/esco/concept-scheme/skill-transversal-groups</text:p>
          </table:table-cell>
          <table:table-cell office:value-type="string">
            <text:p>Develop and implement solutions to practical, operational or conceptual problems which arise in the execution of work, in a wide range of contexts.</text:p>
          </table:table-cell>
          <table:table-cell office:value-type="string">
            <text:p>T2.3</text:p>
          </table:table-cell>
        </table:table-row>
        <table:table-row>
          <table:table-cell office:value-type="string">
            <text:p>SkillGroup</text:p>
          </table:table-cell>
          <table:table-cell office:value-type="string">
            <text:p>http://data.europa.eu/esco/skill/14c41899-0224-4cbc-bd8c-e946ada2da87</text:p>
          </table:table-cell>
          <table:table-cell office:value-type="string">
            <text:p>working efficiently</text:p>
          </table:table-cell>
          <table:table-cell office:value-type="string">
            <text:p>time-efficient work<text:line-break/>responding to the requirements of tasks and responsibilities<text:line-break/>efficiency<text:line-break/>efficient working style</text:p>
          </table:table-cell>
          <table:table-cell office:value-type="string">
            <text:p>good time management</text:p>
          </table:table-cell>
          <table:table-cell office:value-type="string">
            <text:p>released</text:p>
          </table:table-cell>
          <table:table-cell office:value-type="string">
            <text:p>2021-08-30T16:07:41.362Z</text:p>
          </table:table-cell>
          <table:table-cell/>
          <table:table-cell office:value-type="string">
            <text:p>http://data.europa.eu/esco/concept-scheme/skills<text:line-break/>http://data.europa.eu/esco/concept-scheme/skills-hierarchy<text:line-break/>http://data.europa.eu/esco/concept-scheme/skill-transversal-groups</text:p>
          </table:table-cell>
          <table:table-cell office:value-type="string">
            <text:p>Achieve objectives independently using optimal amount of time, effort, or cost.</text:p>
          </table:table-cell>
          <table:table-cell office:value-type="string">
            <text:p>T3.1</text:p>
          </table:table-cell>
        </table:table-row>
        <table:table-row>
          <table:table-cell office:value-type="string">
            <text:p>SkillGroup</text:p>
          </table:table-cell>
          <table:table-cell office:value-type="string">
            <text:p>http://data.europa.eu/esco/skill/151bd6ca-74be-47bb-9dab-9c7387114006</text:p>
          </table:table-cell>
          <table:table-cell office:value-type="string">
            <text:p>operating metal processing and finishing machinery</text:p>
          </table:table-cell>
          <table:table-cell table:number-columns-repeated="2"/>
          <table:table-cell office:value-type="string">
            <text:p>released</text:p>
          </table:table-cell>
          <table:table-cell/>
          <table:table-cell office:value-type="string">
            <text:p>Excludes:<text:line-break/>- Operating furnaces and smelters Examples:<text:line-break/>- Tend anodising machine<text:line-break/>- Tend hot rolling mill<text:line-break/>- Tend thread rolling machine.</text:p>
          </table:table-cell>
          <table:table-cell office:value-type="string">
            <text:p>http://data.europa.eu/esco/concept-scheme/skills<text:line-break/>http://data.europa.eu/esco/concept-scheme/skills-hierarchy</text:p>
          </table:table-cell>
          <table:table-cell office:value-type="string">
            <text:p>Operating and tending machinery for the processing and fabrication and finishing of metals and metal stock.</text:p>
          </table:table-cell>
          <table:table-cell office:value-type="string">
            <text:p>S8.4.2</text:p>
          </table:table-cell>
        </table:table-row>
        <table:table-row>
          <table:table-cell office:value-type="string">
            <text:p>SkillGroup</text:p>
          </table:table-cell>
          <table:table-cell office:value-type="string">
            <text:p>http://data.europa.eu/esco/skill/15dfca7a-5dde-4199-bad3-c00600387258</text:p>
          </table:table-cell>
          <table:table-cell office:value-type="string">
            <text:p>handling and disposing of waste and hazardous materials</text:p>
          </table:table-cell>
          <table:table-cell office:value-type="string">
            <text:p>handling waste and hazardous materials</text:p>
          </table:table-cell>
          <table:table-cell/>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office:value-type="string">
            <text:p>Collecting, storing and disposing of unwanted materials or hazardous, according to established waste management procedures.</text:p>
          </table:table-cell>
          <table:table-cell office:value-type="string">
            <text:p>S6.13</text:p>
          </table:table-cell>
        </table:table-row>
        <table:table-row>
          <table:table-cell office:value-type="string">
            <text:p>SkillGroup</text:p>
          </table:table-cell>
          <table:table-cell office:value-type="string">
            <text:p>http://data.europa.eu/esco/skill/15fa3879-ac0e-46e6-ae36-609bae9c19c3</text:p>
          </table:table-cell>
          <table:table-cell office:value-type="string">
            <text:p>monitoring operational activities</text:p>
          </table:table-cell>
          <table:table-cell table:number-columns-repeated="2"/>
          <table:table-cell office:value-type="string">
            <text:p>released</text:p>
          </table:table-cell>
          <table:table-cell office:value-type="string">
            <text:p>2021-01-20T14:32:12.736Z</text:p>
          </table:table-cell>
          <table:table-cell office:value-type="string">
            <text:p>Excludes:<text:line-break/>- Testing and analysing substances Examples:<text:line-break/>- Detect bottlenecks<text:line-break/>- Monitor mine production<text:line-break/>- Manage project metrics.</text:p>
          </table:table-cell>
          <table:table-cell office:value-type="string">
            <text:p>http://data.europa.eu/esco/concept-scheme/skills<text:line-break/>http://data.europa.eu/esco/concept-scheme/skills-hierarchy</text:p>
          </table:table-cell>
          <table:table-cell office:value-type="string">
            <text:p>Monitoring the operations of a business or organisation to ensure adequate performance and compliance with regulatory requirements.</text:p>
          </table:table-cell>
          <table:table-cell office:value-type="string">
            <text:p>S2.8.2</text:p>
          </table:table-cell>
        </table:table-row>
        <table:table-row>
          <table:table-cell office:value-type="string">
            <text:p>SkillGroup</text:p>
          </table:table-cell>
          <table:table-cell office:value-type="string">
            <text:p>http://data.europa.eu/esco/skill/164510d1-1216-4dc0-b9d1-a7f6af19e469</text:p>
          </table:table-cell>
          <table:table-cell office:value-type="string">
            <text:p>developing contingency and emergency response plans</text:p>
          </table:table-cell>
          <table:table-cell table:number-columns-repeated="2"/>
          <table:table-cell office:value-type="string">
            <text:p>released</text:p>
          </table:table-cell>
          <table:table-cell office:value-type="string">
            <text:p>2023-07-05T15:43:46.118Z</text:p>
          </table:table-cell>
          <table:table-cell office:value-type="string">
            <text:p>Examples:<text:line-break/>- manage disaster recovery plans<text:line-break/>- plan railway incident mitigation measures.</text:p>
          </table:table-cell>
          <table:table-cell office:value-type="string">
            <text:p>http://data.europa.eu/esco/concept-scheme/skills<text:line-break/>http://data.europa.eu/esco/concept-scheme/skills-hierarchy</text:p>
          </table:table-cell>
          <table:table-cell office:value-type="string">
            <text:p>Composing and maintaining procedures outlining specific actions to be taken in the event of an emergency or adverse event, taking into account all the risks and dangers that could be involved, ensuring that the plans comply with safety legislation and represent the safest course of action.</text:p>
          </table:table-cell>
          <table:table-cell office:value-type="string">
            <text:p>S4.1.7</text:p>
          </table:table-cell>
        </table:table-row>
        <table:table-row>
          <table:table-cell office:value-type="string">
            <text:p>SkillGroup</text:p>
          </table:table-cell>
          <table:table-cell office:value-type="string">
            <text:p>http://data.europa.eu/esco/skill/173fbafb-d2e0-4b89-be1c-548b1cc47160</text:p>
          </table:table-cell>
          <table:table-cell office:value-type="string">
            <text:p>assisting and supporting co-workers</text:p>
          </table:table-cell>
          <table:table-cell table:number-columns-repeated="2"/>
          <table:table-cell office:value-type="string">
            <text:p>released</text:p>
          </table:table-cell>
          <table:table-cell office:value-type="string">
            <text:p>2021-09-15T14:03:28.111Z</text:p>
          </table:table-cell>
          <table:table-cell office:value-type="string">
            <text:p>Examples:<text:line-break/>- support managers<text:line-break/>- support colleagues<text:line-break/>- assist forestry service crew<text:line-break/>- assist emergency services.</text:p>
          </table:table-cell>
          <table:table-cell office:value-type="string">
            <text:p>http://data.europa.eu/esco/concept-scheme/skills<text:line-break/>http://data.europa.eu/esco/concept-scheme/skills-hierarchy</text:p>
          </table:table-cell>
          <table:table-cell office:value-type="string">
            <text:p>Assisting and supporting colleagues, managers, volunteers and other co-workers in the performance of their tasks or in the operations of a business unit.</text:p>
          </table:table-cell>
          <table:table-cell office:value-type="string">
            <text:p>S1.8.6</text:p>
          </table:table-cell>
        </table:table-row>
        <table:table-row>
          <table:table-cell office:value-type="string">
            <text:p>SkillGroup</text:p>
          </table:table-cell>
          <table:table-cell office:value-type="string">
            <text:p>http://data.europa.eu/esco/skill/185c56ee-098f-46a1-af87-56337085da6f</text:p>
          </table:table-cell>
          <table:table-cell office:value-type="string">
            <text:p>protecting ict devices</text:p>
          </table:table-cell>
          <table:table-cell table:number-columns-repeated="2"/>
          <table:table-cell office:value-type="string">
            <text:p>released</text:p>
          </table:table-cell>
          <table:table-cell office:value-type="string">
            <text:p>2021-09-24T16:34:47.664Z</text:p>
          </table:table-cell>
          <table:table-cell office:value-type="string">
            <text:p>Examples:<text:line-break/>- Remove computer virus or malware form a computer - Implement a firewall - Use back-up and recovery tools.</text:p>
          </table:table-cell>
          <table:table-cell office:value-type="string">
            <text:p>http://data.europa.eu/esco/concept-scheme/skills<text:line-break/>http://data.europa.eu/esco/concept-scheme/skills-hierarchy</text:p>
          </table:table-cell>
          <table:table-cell office:value-type="string">
            <text:p>Making use of tools and methods to protect and maximize security of ICT devices and information by controlling access, such as by requiring passwords, digital signatures, and biometric identification, and by protecting systems through the use of software.</text:p>
          </table:table-cell>
          <table:table-cell office:value-type="string">
            <text:p>S5.2.2</text:p>
          </table:table-cell>
        </table:table-row>
        <table:table-row>
          <table:table-cell office:value-type="string">
            <text:p>SkillGroup</text:p>
          </table:table-cell>
          <table:table-cell office:value-type="string">
            <text:p>http://data.europa.eu/esco/skill/1893b4bc-0eb2-41de-96e3-9c8f1f1eac41</text:p>
          </table:table-cell>
          <table:table-cell office:value-type="string">
            <text:p>inspecting food safety and quality</text:p>
          </table:table-cell>
          <table:table-cell table:number-columns-repeated="2"/>
          <table:table-cell office:value-type="string">
            <text:p>released</text:p>
          </table:table-cell>
          <table:table-cell office:value-type="string">
            <text:p>2022-07-15T14:44:44.924Z</text:p>
          </table:table-cell>
          <table:table-cell office:value-type="string">
            <text:p>Examples: - check paper quality - inspect material Excludes:<text:line-break/>- inspect material.</text:p>
          </table:table-cell>
          <table:table-cell office:value-type="string">
            <text:p>http://data.europa.eu/esco/concept-scheme/skills<text:line-break/>http://data.europa.eu/esco/concept-scheme/skills-hierarchy</text:p>
          </table:table-cell>
          <table:table-cell office:value-type="string">
            <text:p>Performing food safety and quality checks of ingredients, raw materials and finished food products to check if they meet required standards.</text:p>
          </table:table-cell>
          <table:table-cell office:value-type="string">
            <text:p>S2.8.9</text:p>
          </table:table-cell>
        </table:table-row>
        <table:table-row>
          <table:table-cell office:value-type="string">
            <text:p>SkillGroup</text:p>
          </table:table-cell>
          <table:table-cell office:value-type="string">
            <text:p>http://data.europa.eu/esco/skill/18da3b88-1cd5-4ef3-83d6-664e52afdaba</text:p>
          </table:table-cell>
          <table:table-cell office:value-type="string">
            <text:p>building and repairing structures</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office:value-type="string">
            <text:p>Forming, shaping and joining materials to form structures such as buildings, bridges, or underground mines according to specifications and plans.</text:p>
          </table:table-cell>
          <table:table-cell office:value-type="string">
            <text:p>S7.1</text:p>
          </table:table-cell>
        </table:table-row>
        <table:table-row>
          <table:table-cell office:value-type="string">
            <text:p>SkillGroup</text:p>
          </table:table-cell>
          <table:table-cell office:value-type="string">
            <text:p>http://data.europa.eu/esco/skill/18f2a44e-28ef-4ae3-8ea2-347e33bd9a4b</text:p>
          </table:table-cell>
          <table:table-cell office:value-type="string">
            <text:p>operating machinery for the manufacture of products</text:p>
          </table:table-cell>
          <table:table-cell office:value-type="string">
            <text:p>operating machinery for the manufacture of products</text:p>
          </table:table-cell>
          <table:table-cell/>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office:value-type="string">
            <text:p>Operating and monitoring various types of mechanically-controlled or computer-controlled stationary machinery for the manufacture of goods.</text:p>
          </table:table-cell>
          <table:table-cell office:value-type="string">
            <text:p>S8.5.0</text:p>
          </table:table-cell>
        </table:table-row>
        <table:table-row>
          <table:table-cell office:value-type="string">
            <text:p>SkillGroup</text:p>
          </table:table-cell>
          <table:table-cell office:value-type="string">
            <text:p>http://data.europa.eu/esco/skill/190f64e1-b7b6-4c53-b20b-80f9215ef6ca</text:p>
          </table:table-cell>
          <table:table-cell office:value-type="string">
            <text:p>directing, supervising and coordinating projects</text:p>
          </table:table-cell>
          <table:table-cell table:number-columns-repeated="2"/>
          <table:table-cell office:value-type="string">
            <text:p>released</text:p>
          </table:table-cell>
          <table:table-cell office:value-type="string">
            <text:p>2022-06-21T15:19:54.98Z</text:p>
          </table:table-cell>
          <table:table-cell office:value-type="string">
            <text:p>Examples:<text:line-break/>- manage ICT project - supervise advocacy work Excludes:<text:line-break/>- supervise site maintenance<text:line-break/>- translate strategy into operation.</text:p>
          </table:table-cell>
          <table:table-cell office:value-type="string">
            <text:p>http://data.europa.eu/esco/concept-scheme/skills<text:line-break/>http://data.europa.eu/esco/concept-scheme/skills-hierarchy</text:p>
          </table:table-cell>
          <table:table-cell office:value-type="string">
            <text:p>Directing, supervising and coordinating workflow of projects and programmes such as research and development projects.</text:p>
          </table:table-cell>
          <table:table-cell office:value-type="string">
            <text:p>S4.2.3</text:p>
          </table:table-cell>
        </table:table-row>
        <table:table-row>
          <table:table-cell office:value-type="string">
            <text:p>SkillGroup</text:p>
          </table:table-cell>
          <table:table-cell office:value-type="string">
            <text:p>http://data.europa.eu/esco/skill/193af349-b20e-4277-94bf-b184e92b8d6a</text:p>
          </table:table-cell>
          <table:table-cell office:value-type="string">
            <text:p>managing budgets or finances</text:p>
          </table:table-cell>
          <table:table-cell table:number-columns-repeated="2"/>
          <table:table-cell office:value-type="string">
            <text:p>released</text:p>
          </table:table-cell>
          <table:table-cell office:value-type="string">
            <text:p>2022-06-19T15:45:14.266Z</text:p>
          </table:table-cell>
          <table:table-cell office:value-type="string">
            <text:p>Examples:<text:line-break/>- Control financial resources<text:line-break/>- Manage revenue<text:line-break/>- Handle external financing.</text:p>
          </table:table-cell>
          <table:table-cell office:value-type="string">
            <text:p>http://data.europa.eu/esco/concept-scheme/skills<text:line-break/>http://data.europa.eu/esco/concept-scheme/skills-hierarchy</text:p>
          </table:table-cell>
          <table:table-cell office:value-type="string">
            <text:p>Determining the distribution and availability financial assets and putting in place financial and administrative controls.</text:p>
          </table:table-cell>
          <table:table-cell office:value-type="string">
            <text:p>S4.3.1</text:p>
          </table:table-cell>
        </table:table-row>
        <table:table-row>
          <table:table-cell office:value-type="string">
            <text:p>SkillGroup</text:p>
          </table:table-cell>
          <table:table-cell office:value-type="string">
            <text:p>http://data.europa.eu/esco/skill/19990cb0-e9d5-41c7-9638-88700b47271e</text:p>
          </table:table-cell>
          <table:table-cell office:value-type="string">
            <text:p>operating earthmoving equipment</text:p>
          </table:table-cell>
          <table:table-cell table:number-columns-repeated="2"/>
          <table:table-cell office:value-type="string">
            <text:p>released</text:p>
          </table:table-cell>
          <table:table-cell/>
          <table:table-cell office:value-type="string">
            <text:p>Excludes:<text:line-break/>- Operating mining, drilling, tunnelling and boring machinery Examples:<text:line-break/>- Drive steel piles<text:line-break/>- Operate bulldozer<text:line-break/>- Operate front loader<text:line-break/>- Operate grader.</text:p>
          </table:table-cell>
          <table:table-cell office:value-type="string">
            <text:p>http://data.europa.eu/esco/concept-scheme/skills<text:line-break/>http://data.europa.eu/esco/concept-scheme/skills-hierarchy</text:p>
          </table:table-cell>
          <table:table-cell office:value-type="string">
            <text:p>Operating equipment for moving, excavating, smoothing or shaping earth.</text:p>
          </table:table-cell>
          <table:table-cell office:value-type="string">
            <text:p>S8.1.1</text:p>
          </table:table-cell>
        </table:table-row>
        <table:table-row>
          <table:table-cell office:value-type="string">
            <text:p>SkillGroup</text:p>
          </table:table-cell>
          <table:table-cell office:value-type="string">
            <text:p>http://data.europa.eu/esco/skill/1bb32451-7ca4-4fa2-a2c0-2083c426d76c</text:p>
          </table:table-cell>
          <table:table-cell office:value-type="string">
            <text:p>serving food and drinks</text:p>
          </table:table-cell>
          <table:table-cell table:number-columns-repeated="2"/>
          <table:table-cell office:value-type="string">
            <text:p>released</text:p>
          </table:table-cell>
          <table:table-cell office:value-type="string">
            <text:p>2021-09-30T13:22:07.41Z</text:p>
          </table:table-cell>
          <table:table-cell office:value-type="string">
            <text:p>Examples:<text:line-break/>- serve food in table service<text:line-break/>- prepare service trolleys<text:line-break/>- serve wines.</text:p>
          </table:table-cell>
          <table:table-cell office:value-type="string">
            <text:p>http://data.europa.eu/esco/concept-scheme/skills<text:line-break/>http://data.europa.eu/esco/concept-scheme/skills-hierarchy</text:p>
          </table:table-cell>
          <table:table-cell office:value-type="string">
            <text:p>Serving food and beverages to clients in restaurants, canteens, cafes, bars, transportation equipment or other locations.</text:p>
          </table:table-cell>
          <table:table-cell office:value-type="string">
            <text:p>S3.5.2</text:p>
          </table:table-cell>
        </table:table-row>
        <table:table-row>
          <table:table-cell office:value-type="string">
            <text:p>SkillGroup</text:p>
          </table:table-cell>
          <table:table-cell office:value-type="string">
            <text:p>http://data.europa.eu/esco/skill/1bc1cf2a-a7f6-4769-a13b-cc26a2214498</text:p>
          </table:table-cell>
          <table:table-cell office:value-type="string">
            <text:p>preparing documentation for contracts, applications, or permits</text:p>
          </table:table-cell>
          <table:table-cell table:number-columns-repeated="2"/>
          <table:table-cell office:value-type="string">
            <text:p>released</text:p>
          </table:table-cell>
          <table:table-cell office:value-type="string">
            <text:p>2022-06-22T10:53:34.19Z</text:p>
          </table:table-cell>
          <table:table-cell office:value-type="string">
            <text:p>Examples:<text:line-break/>- prepare building permit applications<text:line-break/>- issue permits<text:line-break/>- arrange customs documents Excludes:<text:line-break/>- write reports or documents requiring drafting of original text.</text:p>
          </table:table-cell>
          <table:table-cell office:value-type="string">
            <text:p>http://data.europa.eu/esco/concept-scheme/skills<text:line-break/>http://data.europa.eu/esco/concept-scheme/skills-hierarchy</text:p>
          </table:table-cell>
          <table:table-cell office:value-type="string">
            <text:p>Preparing applications and maintaining standardized documentation for the issuance of contracts, licences or permits.</text:p>
          </table:table-cell>
          <table:table-cell office:value-type="string">
            <text:p>S2.2.3</text:p>
          </table:table-cell>
        </table:table-row>
        <table:table-row>
          <table:table-cell office:value-type="string">
            <text:p>SkillGroup</text:p>
          </table:table-cell>
          <table:table-cell office:value-type="string">
            <text:p>http://data.europa.eu/esco/skill/1cc5ff0b-afaa-4993-9de7-ab0d77b6cca2</text:p>
          </table:table-cell>
          <table:table-cell office:value-type="string">
            <text:p>moving and lifting</text:p>
          </table:table-cell>
          <table:table-cell table:number-columns-repeated="2"/>
          <table:table-cell office:value-type="string">
            <text:p>released</text:p>
          </table:table-cell>
          <table:table-cell/>
          <table:table-cell office:value-type="string">
            <text:p>Excludes:<text:line-break/>- Specific skills involving lifting and moving people and animals<text:line-break/>- Operation of machinery other than hand-held equipment.</text:p>
          </table:table-cell>
          <table:table-cell office:value-type="string">
            <text:p>http://data.europa.eu/esco/concept-scheme/skills<text:line-break/>http://data.europa.eu/esco/concept-scheme/skills-hierarchy</text:p>
          </table:table-cell>
          <table:table-cell office:value-type="string">
            <text:p>Performing physical activities to move, load, unload or store objects, position workpieces or equipment for assembly, or to climb structures, by hand or with the aid of equipment.</text:p>
          </table:table-cell>
          <table:table-cell office:value-type="string">
            <text:p>S6.2</text:p>
          </table:table-cell>
        </table:table-row>
        <table:table-row>
          <table:table-cell office:value-type="string">
            <text:p>SkillGroup</text:p>
          </table:table-cell>
          <table:table-cell office:value-type="string">
            <text:p>http://data.europa.eu/esco/skill/1d4be2e3-ac64-426f-838d-1e7cb8600927</text:p>
          </table:table-cell>
          <table:table-cell office:value-type="string">
            <text:p>management skills</text:p>
          </table:table-cell>
          <table:table-cell table:number-columns-repeated="2"/>
          <table:table-cell office:value-type="string">
            <text:p>released</text:p>
          </table:table-cell>
          <table:table-cell office:value-type="string">
            <text:p>2023-06-29T13:45:28.167Z</text:p>
          </table:table-cell>
          <table:table-cell/>
          <table:table-cell office:value-type="string">
            <text:p>http://data.europa.eu/esco/concept-scheme/skills<text:line-break/>http://data.europa.eu/esco/concept-scheme/skills-hierarchy</text:p>
          </table:table-cell>
          <table:table-cell office:value-type="string">
            <text:p>Managing people, activities, resources, and organisation; developing objectives and strategies, organising work activities, allocating and controlling resources and leading, motivating, recruiting and supervising people and teams.</text:p>
          </table:table-cell>
          <table:table-cell office:value-type="string">
            <text:p>S4.0.0</text:p>
          </table:table-cell>
        </table:table-row>
        <table:table-row>
          <table:table-cell office:value-type="string">
            <text:p>SkillGroup</text:p>
          </table:table-cell>
          <table:table-cell office:value-type="string">
            <text:p>http://data.europa.eu/esco/skill/1d9e5893-d6b2-47b1-80ba-5f1cdcbf5e9a</text:p>
          </table:table-cell>
          <table:table-cell office:value-type="string">
            <text:p>making moulds, casts, models and patterns</text:p>
          </table:table-cell>
          <table:table-cell table:number-columns-repeated="2"/>
          <table:table-cell office:value-type="string">
            <text:p>released</text:p>
          </table:table-cell>
          <table:table-cell/>
          <table:table-cell office:value-type="string">
            <text:p>Excludes:<text:line-break/>- Operation of automated assembly equipment or machines<text:line-break/>- Repair of building structures and mechanical, electrical, electronic products and components.</text:p>
          </table:table-cell>
          <table:table-cell office:value-type="string">
            <text:p>http://data.europa.eu/esco/concept-scheme/skills<text:line-break/>http://data.europa.eu/esco/concept-scheme/skills-hierarchy</text:p>
          </table:table-cell>
          <table:table-cell office:value-type="string">
            <text:p>Making moulds, casts and two-dimensional patterns or templates and making three-dimensional models of products.</text:p>
          </table:table-cell>
          <table:table-cell office:value-type="string">
            <text:p>S6.6</text:p>
          </table:table-cell>
        </table:table-row>
        <table:table-row>
          <table:table-cell office:value-type="string">
            <text:p>SkillGroup</text:p>
          </table:table-cell>
          <table:table-cell office:value-type="string">
            <text:p>http://data.europa.eu/esco/skill/1e95cef2-9c35-4f9f-b6a9-cb458c3e5379</text:p>
          </table:table-cell>
          <table:table-cell office:value-type="string">
            <text:p>monitoring, inspecting and testing</text:p>
          </table:table-cell>
          <table:table-cell table:number-columns-repeated="2"/>
          <table:table-cell office:value-type="string">
            <text:p>released</text:p>
          </table:table-cell>
          <table:table-cell office:value-type="string">
            <text:p>2023-03-16T15:20:07.475Z</text:p>
          </table:table-cell>
          <table:table-cell/>
          <table:table-cell office:value-type="string">
            <text:p>http://data.europa.eu/esco/concept-scheme/skills<text:line-break/>http://data.europa.eu/esco/concept-scheme/skills-hierarchy</text:p>
          </table:table-cell>
          <table:table-cell office:value-type="string">
            <text:p>Examining and investigating problems, sites or objects to assess functioning or compliance with standards, laws or regulations.</text:p>
          </table:table-cell>
          <table:table-cell office:value-type="string">
            <text:p>S2.8</text:p>
          </table:table-cell>
        </table:table-row>
        <table:table-row>
          <table:table-cell office:value-type="string">
            <text:p>SkillGroup</text:p>
          </table:table-cell>
          <table:table-cell office:value-type="string">
            <text:p>http://data.europa.eu/esco/skill/1f2950c0-ef1e-44b4-9a55-125ccd7b78af</text:p>
          </table:table-cell>
          <table:table-cell office:value-type="string">
            <text:p>analysing and evaluating information and data</text:p>
          </table:table-cell>
          <table:table-cell office:value-type="string">
            <text:p>analysing information</text:p>
          </table:table-cell>
          <table:table-cell/>
          <table:table-cell office:value-type="string">
            <text:p>released</text:p>
          </table:table-cell>
          <table:table-cell office:value-type="string">
            <text:p>2023-02-17T16:35:11.868Z</text:p>
          </table:table-cell>
          <table:table-cell office:value-type="string">
            <text:p>Excludes:<text:line-break/>- Using ICT tools to analyse and process data.</text:p>
          </table:table-cell>
          <table:table-cell office:value-type="string">
            <text:p>http://data.europa.eu/esco/concept-scheme/skills<text:line-break/>http://data.europa.eu/esco/concept-scheme/skills-hierarchy</text:p>
          </table:table-cell>
          <table:table-cell office:value-type="string">
            <text:p>Examining data or facts to determine appropriate actions or recommendations; comparing and critically evaluating the credibility and reliability of sources of data; making and defending judgements based on internal evidence and external criteria.</text:p>
          </table:table-cell>
          <table:table-cell office:value-type="string">
            <text:p>S2.7.0</text:p>
          </table:table-cell>
        </table:table-row>
        <table:table-row>
          <table:table-cell office:value-type="string">
            <text:p>SkillGroup</text:p>
          </table:table-cell>
          <table:table-cell office:value-type="string">
            <text:p>http://data.europa.eu/esco/skill/20136935-e6a1-417b-81df-9b94d4c2c371</text:p>
          </table:table-cell>
          <table:table-cell office:value-type="string">
            <text:p>reporting incidents and defects</text:p>
          </table:table-cell>
          <table:table-cell table:number-columns-repeated="2"/>
          <table:table-cell office:value-type="string">
            <text:p>released</text:p>
          </table:table-cell>
          <table:table-cell/>
          <table:table-cell office:value-type="string">
            <text:p>Examples:<text:line-break/>- report airport security incidents<text:line-break/>- write rail defect records Excludes:<text:line-break/>- write reports or documents requiring drafting of original text.</text:p>
          </table:table-cell>
          <table:table-cell office:value-type="string">
            <text:p>http://data.europa.eu/esco/concept-scheme/skills<text:line-break/>http://data.europa.eu/esco/concept-scheme/skills-hierarchy</text:p>
          </table:table-cell>
          <table:table-cell office:value-type="string">
            <text:p>Reporting and keeping records of events, complaints, and defective equipment or materials.</text:p>
          </table:table-cell>
          <table:table-cell office:value-type="string">
            <text:p>S2.2.7</text:p>
          </table:table-cell>
        </table:table-row>
        <table:table-row>
          <table:table-cell office:value-type="string">
            <text:p>SkillGroup</text:p>
          </table:table-cell>
          <table:table-cell office:value-type="string">
            <text:p>http://data.europa.eu/esco/skill/2198d7a0-6eca-4795-b877-98a19064e61a</text:p>
          </table:table-cell>
          <table:table-cell office:value-type="string">
            <text:p>operating machinery for the extraction and processing of raw materials</text:p>
          </table:table-cell>
          <table:table-cell office:value-type="string">
            <text:p>extraction and processing of raw materials</text:p>
          </table:table-cell>
          <table:table-cell/>
          <table:table-cell office:value-type="string">
            <text:p>released</text:p>
          </table:table-cell>
          <table:table-cell/>
          <table:table-cell office:value-type="string">
            <text:p>Excludes:<text:line-break/>- Operating centralized process control equipment.</text:p>
          </table:table-cell>
          <table:table-cell office:value-type="string">
            <text:p>http://data.europa.eu/esco/concept-scheme/skills<text:line-break/>http://data.europa.eu/esco/concept-scheme/skills-hierarchy</text:p>
          </table:table-cell>
          <table:table-cell office:value-type="string">
            <text:p>Operating and monitoring various types of mechanically-controlled or computer-controlled stationary machinery for the extraction or processing of raw materials.</text:p>
          </table:table-cell>
          <table:table-cell office:value-type="string">
            <text:p>S8.4</text:p>
          </table:table-cell>
        </table:table-row>
        <table:table-row>
          <table:table-cell office:value-type="string">
            <text:p>SkillGroup</text:p>
          </table:table-cell>
          <table:table-cell office:value-type="string">
            <text:p>http://data.europa.eu/esco/skill/2258cde2-a95b-4b2c-b105-59e84b0a364b</text:p>
          </table:table-cell>
          <table:table-cell office:value-type="string">
            <text:p>managing and administering human resources</text:p>
          </table:table-cell>
          <table:table-cell table:number-columns-repeated="2"/>
          <table:table-cell office:value-type="string">
            <text:p>released</text:p>
          </table:table-cell>
          <table:table-cell office:value-type="string">
            <text:p>2022-06-22T14:05:20.877Z</text:p>
          </table:table-cell>
          <table:table-cell office:value-type="string">
            <text:p>Examples:<text:line-break/>- manage personnel<text:line-break/>- plan shifts of employees Excludes:<text:line-break/>- delegate activities.</text:p>
          </table:table-cell>
          <table:table-cell office:value-type="string">
            <text:p>http://data.europa.eu/esco/concept-scheme/skills<text:line-break/>http://data.europa.eu/esco/concept-scheme/skills-hierarchy</text:p>
          </table:table-cell>
          <table:table-cell office:value-type="string">
            <text:p>Performing administrative and clerical tasks concerned with human resource administration. Determining the distribution and availability of people to accomplish organizational goals.</text:p>
          </table:table-cell>
          <table:table-cell office:value-type="string">
            <text:p>S4.3.2</text:p>
          </table:table-cell>
        </table:table-row>
        <table:table-row>
          <table:table-cell office:value-type="string">
            <text:p>SkillGroup</text:p>
          </table:table-cell>
          <table:table-cell office:value-type="string">
            <text:p>http://data.europa.eu/esco/skill/22d15a65-7262-4a6d-b981-53671b95ad29</text:p>
          </table:table-cell>
          <table:table-cell office:value-type="string">
            <text:p>washing and maintaining textiles and clothing</text:p>
          </table:table-cell>
          <table:table-cell office:value-type="string">
            <text:p>maintaining textiles and clothing</text:p>
          </table:table-cell>
          <table:table-cell/>
          <table:table-cell office:value-type="string">
            <text:p>released</text:p>
          </table:table-cell>
          <table:table-cell/>
          <table:table-cell office:value-type="string">
            <text:p>Excludes:<text:line-break/>- Repairing or adjusting clothes Examples:<text:line-break/>- Iron textiles - Eliminate stains - Clean household linens.</text:p>
          </table:table-cell>
          <table:table-cell office:value-type="string">
            <text:p>http://data.europa.eu/esco/concept-scheme/skills<text:line-break/>http://data.europa.eu/esco/concept-scheme/skills-hierarchy</text:p>
          </table:table-cell>
          <table:table-cell office:value-type="string">
            <text:p>Washing or cleaning clothing and other textile products by hand or using a washing or laundry machine, maintaining textile items in good order.</text:p>
          </table:table-cell>
          <table:table-cell office:value-type="string">
            <text:p>S6.12.0</text:p>
          </table:table-cell>
        </table:table-row>
        <table:table-row>
          <table:table-cell office:value-type="string">
            <text:p>SkillGroup</text:p>
          </table:table-cell>
          <table:table-cell office:value-type="string">
            <text:p>http://data.europa.eu/esco/skill/23cfb269-eec1-4011-8e57-c86203ce9fd7</text:p>
          </table:table-cell>
          <table:table-cell office:value-type="string">
            <text:p>giving feedback</text:p>
          </table:table-cell>
          <table:table-cell table:number-columns-repeated="2"/>
          <table:table-cell office:value-type="string">
            <text:p>released</text:p>
          </table:table-cell>
          <table:table-cell office:value-type="string">
            <text:p>2020-12-11T12:31:47.977Z</text:p>
          </table:table-cell>
          <table:table-cell office:value-type="string">
            <text:p>Examples:<text:line-break/>- provide feedback on job performance<text:line-break/>- give constructive feedback.</text:p>
          </table:table-cell>
          <table:table-cell office:value-type="string">
            <text:p>http://data.europa.eu/esco/concept-scheme/skills<text:line-break/>http://data.europa.eu/esco/concept-scheme/skills-hierarchy</text:p>
          </table:table-cell>
          <table:table-cell office:value-type="string">
            <text:p>Providing founded feedback on the performance of subordinates, co-workers and students through both criticism and praise in a respectful, clear, and consistent manner. Highlighting achievements as well as mistakes and set up methods of formative assessment.</text:p>
          </table:table-cell>
          <table:table-cell office:value-type="string">
            <text:p>S1.8.3</text:p>
          </table:table-cell>
        </table:table-row>
        <table:table-row>
          <table:table-cell office:value-type="string">
            <text:p>SkillGroup</text:p>
          </table:table-cell>
          <table:table-cell office:value-type="string">
            <text:p>http://data.europa.eu/esco/skill/23d7bd85-d8d5-4455-b64d-3b0998f2425d</text:p>
          </table:table-cell>
          <table:table-cell office:value-type="string">
            <text:p>measuring dimensions and related properties</text:p>
          </table:table-cell>
          <table:table-cell table:number-columns-repeated="2"/>
          <table:table-cell office:value-type="string">
            <text:p>released</text:p>
          </table:table-cell>
          <table:table-cell office:value-type="string">
            <text:p>2021-03-16T14:41:08.752Z</text:p>
          </table:table-cell>
          <table:table-cell office:value-type="string">
            <text:p>Examples:<text:line-break/>- measure interior space<text:line-break/>- measure the human body for wearing apparel<text:line-break/>- measure water depth.</text:p>
          </table:table-cell>
          <table:table-cell office:value-type="string">
            <text:p>http://data.europa.eu/esco/concept-scheme/skills<text:line-break/>http://data.europa.eu/esco/concept-scheme/skills-hierarchy</text:p>
          </table:table-cell>
          <table:table-cell office:value-type="string">
            <text:p>Measuring the dimensions, density and other physical properties of objects, materials, people, and spaces.</text:p>
          </table:table-cell>
          <table:table-cell office:value-type="string">
            <text:p>S2.5.1</text:p>
          </table:table-cell>
        </table:table-row>
        <table:table-row>
          <table:table-cell office:value-type="string">
            <text:p>SkillGroup</text:p>
          </table:table-cell>
          <table:table-cell office:value-type="string">
            <text:p>http://data.europa.eu/esco/skill/243eb885-07c7-4b77-ab9c-827551d83dc4</text:p>
          </table:table-cell>
          <table:table-cell office:value-type="string">
            <text:p>working with computers</text:p>
          </table:table-cell>
          <table:table-cell office:value-type="string">
            <text:p>digital skills</text:p>
          </table:table-cell>
          <table:table-cell/>
          <table:table-cell office:value-type="string">
            <text:p>released</text:p>
          </table:table-cell>
          <table:table-cell/>
          <table:table-cell office:value-type="string">
            <text:p>Excludes:<text:line-break/>- Systems analysis<text:line-break/>- Installing, maintaining and repairing computer hardware.</text:p>
          </table:table-cell>
          <table:table-cell office:value-type="string">
            <text:p>http://data.europa.eu/esco/concept-scheme/skills<text:line-break/>http://data.europa.eu/esco/concept-scheme/skills-hierarchy</text:p>
          </table:table-cell>
          <table:table-cell office:value-type="string">
            <text:p>Using computers and other digital tools to develop, install and maintain ICT software and infrastructure and to browse, search, filter, organise, store, retrieve, and analyse data, to collaborate and communicate with others, to create and edit new content.</text:p>
          </table:table-cell>
          <table:table-cell office:value-type="string">
            <text:p>S5</text:p>
          </table:table-cell>
        </table:table-row>
        <table:table-row>
          <table:table-cell office:value-type="string">
            <text:p>SkillGroup</text:p>
          </table:table-cell>
          <table:table-cell office:value-type="string">
            <text:p>http://data.europa.eu/esco/skill/2486154b-e3fd-4938-8316-029f62afdcb9</text:p>
          </table:table-cell>
          <table:table-cell office:value-type="string">
            <text:p>assisting and caring</text:p>
          </table:table-cell>
          <table:table-cell office:value-type="string">
            <text:p>providing services</text:p>
          </table:table-cell>
          <table:table-cell/>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office:value-type="string">
            <text:p>Providing assistance, nurturing, care, service and support to people, and ensuring compliance to rules, standards, guidelines or laws.</text:p>
          </table:table-cell>
          <table:table-cell office:value-type="string">
            <text:p>S3.0</text:p>
          </table:table-cell>
        </table:table-row>
        <table:table-row>
          <table:table-cell office:value-type="string">
            <text:p>SkillGroup</text:p>
          </table:table-cell>
          <table:table-cell office:value-type="string">
            <text:p>http://data.europa.eu/esco/skill/24a39c1b-b8cc-4210-8b74-b388a90e8f59</text:p>
          </table:table-cell>
          <table:table-cell office:value-type="string">
            <text:p>joining parts using soldering, welding or brazing techniques</text:p>
          </table:table-cell>
          <table:table-cell table:number-columns-repeated="2"/>
          <table:table-cell office:value-type="string">
            <text:p>released</text:p>
          </table:table-cell>
          <table:table-cell/>
          <table:table-cell office:value-type="string">
            <text:p>Examples:<text:line-break/>- Apply arc welding techniques<text:line-break/>- Operate brazing equipment<text:line-break/>- Weld underwater<text:line-break/>- Solder components onto electronic board.</text:p>
          </table:table-cell>
          <table:table-cell office:value-type="string">
            <text:p>http://data.europa.eu/esco/concept-scheme/skills<text:line-break/>http://data.europa.eu/esco/concept-scheme/skills-hierarchy</text:p>
          </table:table-cell>
          <table:table-cell office:value-type="string">
            <text:p>Joining together pieces of metal by applying heat using soldering, welding or brazing techniques.</text:p>
          </table:table-cell>
          <table:table-cell office:value-type="string">
            <text:p>S7.1.6</text:p>
          </table:table-cell>
        </table:table-row>
        <table:table-row>
          <table:table-cell office:value-type="string">
            <text:p>SkillGroup</text:p>
          </table:table-cell>
          <table:table-cell office:value-type="string">
            <text:p>http://data.europa.eu/esco/skill/24aa32e7-5b7c-42fd-b045-11f0c3d9b6e3</text:p>
          </table:table-cell>
          <table:table-cell office:value-type="string">
            <text:p>setting up and protecting computer systems</text:p>
          </table:table-cell>
          <table:table-cell office:value-type="string">
            <text:p>installing and managing it safety</text:p>
          </table:table-cell>
          <table:table-cell/>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office:value-type="string">
            <text:p>Setting up, protecting and resolving problems with computer systems, networks, or similar information systems.</text:p>
          </table:table-cell>
          <table:table-cell office:value-type="string">
            <text:p>S5.2.0</text:p>
          </table:table-cell>
        </table:table-row>
        <table:table-row>
          <table:table-cell office:value-type="string">
            <text:p>SkillGroup</text:p>
          </table:table-cell>
          <table:table-cell office:value-type="string">
            <text:p>http://data.europa.eu/esco/skill/24ad2ffb-dece-4704-8155-63ea9428d038</text:p>
          </table:table-cell>
          <table:table-cell office:value-type="string">
            <text:p>advising and consulting</text:p>
          </table:table-cell>
          <table:table-cell table:number-columns-repeated="2"/>
          <table:table-cell office:value-type="string">
            <text:p>released</text:p>
          </table:table-cell>
          <table:table-cell/>
          <table:table-cell office:value-type="string">
            <text:p>Excludes:<text:line-break/>- Psychological, behavioural and social counselling; see S3.1.1.</text:p>
          </table:table-cell>
          <table:table-cell office:value-type="string">
            <text:p>http://data.europa.eu/esco/concept-scheme/skills<text:line-break/>http://data.europa.eu/esco/concept-scheme/skills-hierarchy</text:p>
          </table:table-cell>
          <table:table-cell office:value-type="string">
            <text:p>Providing guidance and advice to enable decision-making about tasks, situations, and processes.</text:p>
          </table:table-cell>
          <table:table-cell office:value-type="string">
            <text:p>S1.5</text:p>
          </table:table-cell>
        </table:table-row>
        <table:table-row>
          <table:table-cell office:value-type="string">
            <text:p>SkillGroup</text:p>
          </table:table-cell>
          <table:table-cell office:value-type="string">
            <text:p>http://data.europa.eu/esco/skill/258fea29-09db-4918-8235-0d7d529cd31c</text:p>
          </table:table-cell>
          <table:table-cell office:value-type="string">
            <text:p>browsing, searching and filtering digital data</text:p>
          </table:table-cell>
          <table:table-cell table:number-columns-repeated="2"/>
          <table:table-cell office:value-type="string">
            <text:p>released</text:p>
          </table:table-cell>
          <table:table-cell office:value-type="string">
            <text:p>2023-10-27T16:10:31.774Z</text:p>
          </table:table-cell>
          <table:table-cell office:value-type="string">
            <text:p>Examples:<text:line-break/>- Use search engines - Carry out internet research<text:line-break/>- Conduct search engine optimisation.</text:p>
          </table:table-cell>
          <table:table-cell office:value-type="string">
            <text:p>http://data.europa.eu/esco/concept-scheme/skills<text:line-break/>http://data.europa.eu/esco/concept-scheme/skills-hierarchy</text:p>
          </table:table-cell>
          <table:table-cell office:value-type="string">
            <text:p>Articulating information needs, searching for data, information and content in digital environments, accessing and navigating them. Creating and updating personal search strategies.</text:p>
          </table:table-cell>
          <table:table-cell office:value-type="string">
            <text:p>S5.5.1</text:p>
          </table:table-cell>
        </table:table-row>
        <table:table-row>
          <table:table-cell office:value-type="string">
            <text:p>SkillGroup</text:p>
          </table:table-cell>
          <table:table-cell office:value-type="string">
            <text:p>http://data.europa.eu/esco/skill/28d2ab6c-38a2-476e-85fe-7982fd242943</text:p>
          </table:table-cell>
          <table:table-cell office:value-type="string">
            <text:p>accessing and analysing digital data</text:p>
          </table:table-cell>
          <table:table-cell office:value-type="string">
            <text:p>managing digital information</text:p>
          </table:table-cell>
          <table:table-cell/>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office:value-type="string">
            <text:p>Using digital tools to browse, search, filter, organise, store, retrieve, and analyse data, information and digital content, to collaborate and communicate with others, and create and edit new content.</text:p>
          </table:table-cell>
          <table:table-cell office:value-type="string">
            <text:p>S5.5</text:p>
          </table:table-cell>
        </table:table-row>
        <table:table-row>
          <table:table-cell office:value-type="string">
            <text:p>SkillGroup</text:p>
          </table:table-cell>
          <table:table-cell office:value-type="string">
            <text:p>http://data.europa.eu/esco/skill/29dcc31e-a8d6-4a62-b3c1-2de81e966e39</text:p>
          </table:table-cell>
          <table:table-cell office:value-type="string">
            <text:p>gathering information from physical or electronic sources</text:p>
          </table:table-cell>
          <table:table-cell table:number-columns-repeated="2"/>
          <table:table-cell office:value-type="string">
            <text:p>released</text:p>
          </table:table-cell>
          <table:table-cell office:value-type="string">
            <text:p>2022-06-19T14:48:30.73Z</text:p>
          </table:table-cell>
          <table:table-cell office:value-type="string">
            <text:p>Examples:<text:line-break/>- collect customer data<text:line-break/>- gather reference materials<text:line-break/>- obtain financial information Excludes:<text:line-break/>- Skills in the use of specific ICT tools to process data.</text:p>
          </table:table-cell>
          <table:table-cell office:value-type="string">
            <text:p>http://data.europa.eu/esco/concept-scheme/skills<text:line-break/>http://data.europa.eu/esco/concept-scheme/skills-hierarchy</text:p>
          </table:table-cell>
          <table:table-cell office:value-type="string">
            <text:p>Collecting, compiling or gathering information from digital, paper or other sources.</text:p>
          </table:table-cell>
          <table:table-cell office:value-type="string">
            <text:p>S2.4.1</text:p>
          </table:table-cell>
        </table:table-row>
        <table:table-row>
          <table:table-cell office:value-type="string">
            <text:p>SkillGroup</text:p>
          </table:table-cell>
          <table:table-cell office:value-type="string">
            <text:p>http://data.europa.eu/esco/skill/29fbde52-e525-4653-96d0-acd59ccb28d8</text:p>
          </table:table-cell>
          <table:table-cell office:value-type="string">
            <text:p>assisting people to access services</text:p>
          </table:table-cell>
          <table:table-cell table:number-columns-repeated="2"/>
          <table:table-cell office:value-type="string">
            <text:p>released</text:p>
          </table:table-cell>
          <table:table-cell/>
          <table:table-cell office:value-type="string">
            <text:p>Examples:<text:line-break/>- refer service users to community resources.</text:p>
          </table:table-cell>
          <table:table-cell office:value-type="string">
            <text:p>http://data.europa.eu/esco/concept-scheme/skills<text:line-break/>http://data.europa.eu/esco/concept-scheme/skills-hierarchy</text:p>
          </table:table-cell>
          <table:table-cell office:value-type="string">
            <text:p>Assist others to gain access to social, legal or other services and benefits, including making referrals to other professionals and organisations.</text:p>
          </table:table-cell>
          <table:table-cell office:value-type="string">
            <text:p>S3.1.3</text:p>
          </table:table-cell>
        </table:table-row>
        <table:table-row>
          <table:table-cell office:value-type="string">
            <text:p>SkillGroup</text:p>
          </table:table-cell>
          <table:table-cell office:value-type="string">
            <text:p>http://data.europa.eu/esco/skill/2ad2ee1c-afc9-402f-91ab-c9c0911b209d</text:p>
          </table:table-cell>
          <table:table-cell office:value-type="string">
            <text:p>fabricating precision instruments or jewellery</text:p>
          </table:table-cell>
          <table:table-cell table:number-columns-repeated="2"/>
          <table:table-cell office:value-type="string">
            <text:p>released</text:p>
          </table:table-cell>
          <table:table-cell/>
          <table:table-cell office:value-type="string">
            <text:p>Excludes:<text:line-break/>- Operation of automated assembly equipment<text:line-break/>- Assembly of electrical and electronic products and components<text:line-break/>- Fabrication of decorative objects - Fabrication of medical, orthotic and prosthetic devices Examples:<text:line-break/>- Assemble jewellery parts<text:line-break/>- Attach pendulums<text:line-break/>- Customise guns<text:line-break/>- Repair musical instruments<text:line-break/>- Centre lenses.</text:p>
          </table:table-cell>
          <table:table-cell office:value-type="string">
            <text:p>http://data.europa.eu/esco/concept-scheme/skills<text:line-break/>http://data.europa.eu/esco/concept-scheme/skills-hierarchy</text:p>
          </table:table-cell>
          <table:table-cell office:value-type="string">
            <text:p>Assembling, fabricating or repairing precision instruments, such as optical devices, clocks and musical instruments, by hand or using hand-held tools and equipment.</text:p>
          </table:table-cell>
          <table:table-cell office:value-type="string">
            <text:p>S6.5.1</text:p>
          </table:table-cell>
        </table:table-row>
        <table:table-row>
          <table:table-cell office:value-type="string">
            <text:p>SkillGroup</text:p>
          </table:table-cell>
          <table:table-cell office:value-type="string">
            <text:p>http://data.europa.eu/esco/skill/2ae39fc8-0f1b-4284-9e73-3f2739471f63</text:p>
          </table:table-cell>
          <table:table-cell office:value-type="string">
            <text:p>constructing</text:p>
          </table:table-cell>
          <table:table-cell table:number-columns-repeated="2"/>
          <table:table-cell office:value-type="string">
            <text:p>released</text:p>
          </table:table-cell>
          <table:table-cell office:value-type="string">
            <text:p>2024-01-25T10:28:05.972Z</text:p>
          </table:table-cell>
          <table:table-cell/>
          <table:table-cell office:value-type="string">
            <text:p>http://data.europa.eu/esco/concept-scheme/skills<text:line-break/>http://data.europa.eu/esco/concept-scheme/skills-hierarchy</text:p>
          </table:table-cell>
          <table:table-cell office:value-type="string">
            <text:p>Building, repairing, installing and finishing interior and exterior structures.</text:p>
          </table:table-cell>
          <table:table-cell office:value-type="string">
            <text:p>S7</text:p>
          </table:table-cell>
        </table:table-row>
        <table:table-row>
          <table:table-cell office:value-type="string">
            <text:p>SkillGroup</text:p>
          </table:table-cell>
          <table:table-cell office:value-type="string">
            <text:p>http://data.europa.eu/esco/skill/2b2c3254-7f6c-47e2-84f1-aece946fbfae</text:p>
          </table:table-cell>
          <table:table-cell office:value-type="string">
            <text:p>maintaining a positive attitude</text:p>
          </table:table-cell>
          <table:table-cell office:value-type="string">
            <text:p>managing negative factors in life and work<text:line-break/>demonstrating resilience</text:p>
          </table:table-cell>
          <table:table-cell/>
          <table:table-cell office:value-type="string">
            <text:p>released</text:p>
          </table:table-cell>
          <table:table-cell office:value-type="string">
            <text:p>2021-08-30T16:03:19.52Z</text:p>
          </table:table-cell>
          <table:table-cell office:value-type="string">
            <text:p>Excludes coping with physical adversity.</text:p>
          </table:table-cell>
          <table:table-cell office:value-type="string">
            <text:p>http://data.europa.eu/esco/concept-scheme/skills<text:line-break/>http://data.europa.eu/esco/concept-scheme/skills-hierarchy<text:line-break/>http://data.europa.eu/esco/concept-scheme/skill-transversal-groups</text:p>
          </table:table-cell>
          <table:table-cell office:value-type="string">
            <text:p>Withstand adversity, demonstrate resilience and find ways to resolve or manage the effects of difficult life events.</text:p>
          </table:table-cell>
          <table:table-cell office:value-type="string">
            <text:p>T3.3</text:p>
          </table:table-cell>
        </table:table-row>
        <table:table-row>
          <table:table-cell office:value-type="string">
            <text:p>SkillGroup</text:p>
          </table:table-cell>
          <table:table-cell office:value-type="string">
            <text:p>http://data.europa.eu/esco/skill/2b6e15f5-dfa0-4e7c-9687-5665b07e56a4</text:p>
          </table:table-cell>
          <table:table-cell office:value-type="string">
            <text:p>protecting privacy and personal data</text:p>
          </table:table-cell>
          <table:table-cell table:number-columns-repeated="2"/>
          <table:table-cell office:value-type="string">
            <text:p>released</text:p>
          </table:table-cell>
          <table:table-cell office:value-type="string">
            <text:p>2024-01-29T16:26:16.498Z</text:p>
          </table:table-cell>
          <table:table-cell office:value-type="string">
            <text:p>Examples:<text:line-break/>- Protect personal data and privacy<text:line-break/>- Safeguard online privacy and identity - Ensure the privacy of guests.</text:p>
          </table:table-cell>
          <table:table-cell office:value-type="string">
            <text:p>http://data.europa.eu/esco/concept-scheme/skills<text:line-break/>http://data.europa.eu/esco/concept-scheme/skills-hierarchy</text:p>
          </table:table-cell>
          <table:table-cell office:value-type="string">
            <text:p>Using and sharing identifiable information about individuals or enterprises in a manner that respects data protection principles, privacy and confidentiality.</text:p>
          </table:table-cell>
          <table:table-cell office:value-type="string">
            <text:p>S3.3.6</text:p>
          </table:table-cell>
        </table:table-row>
        <table:table-row>
          <table:table-cell office:value-type="string">
            <text:p>SkillGroup</text:p>
          </table:table-cell>
          <table:table-cell office:value-type="string">
            <text:p>http://data.europa.eu/esco/skill/2b8a86c4-d063-44d5-863f-a9659024cefe</text:p>
          </table:table-cell>
          <table:table-cell office:value-type="string">
            <text:p>operating machinery for the manufacture of products</text:p>
          </table:table-cell>
          <table:table-cell office:value-type="string">
            <text:p>operating machinery for the manufacture of products</text:p>
          </table:table-cell>
          <table:table-cell/>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office:value-type="string">
            <text:p>Operating and monitoring various types of mechanically-controlled or computer-controlled stationary machinery for the manufacture of goods.</text:p>
          </table:table-cell>
          <table:table-cell office:value-type="string">
            <text:p>S8.5</text:p>
          </table:table-cell>
        </table:table-row>
        <table:table-row>
          <table:table-cell office:value-type="string">
            <text:p>SkillGroup</text:p>
          </table:table-cell>
          <table:table-cell office:value-type="string">
            <text:p>http://data.europa.eu/esco/skill/2bf2c727-ee42-4fc5-a4d7-2cd62b880433</text:p>
          </table:table-cell>
          <table:table-cell office:value-type="string">
            <text:p>cleaning</text:p>
          </table:table-cell>
          <table:table-cell table:number-columns-repeated="2"/>
          <table:table-cell office:value-type="string">
            <text:p>released</text:p>
          </table:table-cell>
          <table:table-cell office:value-type="string">
            <text:p>2021-08-06T10:25:31.866Z</text:p>
          </table:table-cell>
          <table:table-cell office:value-type="string">
            <text:p>Excludes:<text:line-break/>- Cleaning, laundering and maintaining textiles<text:line-break/>- Cleaning live animals.</text:p>
          </table:table-cell>
          <table:table-cell office:value-type="string">
            <text:p>http://data.europa.eu/esco/concept-scheme/skills<text:line-break/>http://data.europa.eu/esco/concept-scheme/skills-hierarchy</text:p>
          </table:table-cell>
          <table:table-cell office:value-type="string">
            <text:p>Cleaning buildings, work areas, equipment, machinery and vehicles.</text:p>
          </table:table-cell>
          <table:table-cell office:value-type="string">
            <text:p>S6.11.0</text:p>
          </table:table-cell>
        </table:table-row>
        <table:table-row>
          <table:table-cell office:value-type="string">
            <text:p>SkillGroup</text:p>
          </table:table-cell>
          <table:table-cell office:value-type="string">
            <text:p>http://data.europa.eu/esco/skill/2c7252b7-59b8-40eb-ac7c-17f78a94f7e7</text:p>
          </table:table-cell>
          <table:table-cell office:value-type="string">
            <text:p>installing interior or exterior infrastructure</text:p>
          </table:table-cell>
          <table:table-cell table:number-columns-repeated="2"/>
          <table:table-cell office:value-type="string">
            <text:p>released</text:p>
          </table:table-cell>
          <table:table-cell/>
          <table:table-cell office:value-type="string">
            <text:p>Excludes:<text:line-break/>- Installing electrical, electronic and telecommunications equipment and wiring.</text:p>
          </table:table-cell>
          <table:table-cell office:value-type="string">
            <text:p>http://data.europa.eu/esco/concept-scheme/skills<text:line-break/>http://data.europa.eu/esco/concept-scheme/skills-hierarchy</text:p>
          </table:table-cell>
          <table:table-cell office:value-type="string">
            <text:p>Installing, repairing and testing systems and their components in buildings and other structures such as trains and aircraft.</text:p>
          </table:table-cell>
          <table:table-cell office:value-type="string">
            <text:p>S7.2.0</text:p>
          </table:table-cell>
        </table:table-row>
        <table:table-row>
          <table:table-cell office:value-type="string">
            <text:p>SkillGroup</text:p>
          </table:table-cell>
          <table:table-cell office:value-type="string">
            <text:p>http://data.europa.eu/esco/skill/2d02d98c-20c4-4b46-bf44-e5f85a3f03ed</text:p>
          </table:table-cell>
          <table:table-cell office:value-type="string">
            <text:p>building and developing teams</text:p>
          </table:table-cell>
          <table:table-cell office:value-type="string">
            <text:p>managing teams</text:p>
          </table:table-cell>
          <table:table-cell/>
          <table:table-cell office:value-type="string">
            <text:p>released</text:p>
          </table:table-cell>
          <table:table-cell/>
          <table:table-cell office:value-type="string">
            <text:p>Excludes:<text:line-break/>- Training<text:line-break/>- Recruiting and hiring Examples:<text:line-break/>- Facilitate teamwork between students<text:line-break/>- Encourage teambuilding.</text:p>
          </table:table-cell>
          <table:table-cell office:value-type="string">
            <text:p>http://data.europa.eu/esco/concept-scheme/skills<text:line-break/>http://data.europa.eu/esco/concept-scheme/skills-hierarchy</text:p>
          </table:table-cell>
          <table:table-cell office:value-type="string">
            <text:p>Encouraging team members and building a relationship of mutual trust, respect and cooperation. Stimulating teambuilding activities.</text:p>
          </table:table-cell>
          <table:table-cell office:value-type="string">
            <text:p>S4.6</text:p>
          </table:table-cell>
        </table:table-row>
        <table:table-row>
          <table:table-cell office:value-type="string">
            <text:p>SkillGroup</text:p>
          </table:table-cell>
          <table:table-cell office:value-type="string">
            <text:p>http://data.europa.eu/esco/skill/2f661409-3e56-46ab-95d7-6ec7786fc1c0</text:p>
          </table:table-cell>
          <table:table-cell office:value-type="string">
            <text:p>writing and composing</text:p>
          </table:table-cell>
          <table:table-cell table:number-columns-repeated="2"/>
          <table:table-cell office:value-type="string">
            <text:p>released</text:p>
          </table:table-cell>
          <table:table-cell/>
          <table:table-cell office:value-type="string">
            <text:p>Excludes:<text:line-break/>- general writing abilities/literacy<text:line-break/>- writing computer programmes/coding.</text:p>
          </table:table-cell>
          <table:table-cell office:value-type="string">
            <text:p>http://data.europa.eu/esco/concept-scheme/skills<text:line-break/>http://data.europa.eu/esco/concept-scheme/skills-hierarchy</text:p>
          </table:table-cell>
          <table:table-cell office:value-type="string">
            <text:p>Writing text or composing music, creating original work with regard to format, style and content.</text:p>
          </table:table-cell>
          <table:table-cell office:value-type="string">
            <text:p>S1.13</text:p>
          </table:table-cell>
        </table:table-row>
        <table:table-row>
          <table:table-cell office:value-type="string">
            <text:p>SkillGroup</text:p>
          </table:table-cell>
          <table:table-cell office:value-type="string">
            <text:p>http://data.europa.eu/esco/skill/30b280e7-2468-440b-a78f-f1e7f515d60a</text:p>
          </table:table-cell>
          <table:table-cell office:value-type="string">
            <text:p>positioning materials, tools or equipment</text:p>
          </table:table-cell>
          <table:table-cell table:number-columns-repeated="2"/>
          <table:table-cell office:value-type="string">
            <text:p>released</text:p>
          </table:table-cell>
          <table:table-cell office:value-type="string">
            <text:p>2022-08-02T10:51:49.029Z</text:p>
          </table:table-cell>
          <table:table-cell/>
          <table:table-cell office:value-type="string">
            <text:p>http://data.europa.eu/esco/concept-scheme/skills<text:line-break/>http://data.europa.eu/esco/concept-scheme/skills-hierarchy</text:p>
          </table:table-cell>
          <table:table-cell office:value-type="string">
            <text:p>Placing workpieces, materials, tools or equipment in the correct position for assembly or further work.</text:p>
          </table:table-cell>
          <table:table-cell office:value-type="string">
            <text:p>S6.2.4</text:p>
          </table:table-cell>
        </table:table-row>
        <table:table-row>
          <table:table-cell office:value-type="string">
            <text:p>SkillGroup</text:p>
          </table:table-cell>
          <table:table-cell office:value-type="string">
            <text:p>http://data.europa.eu/esco/skill/31397e38-43b9-43ba-943f-192b834e6b54</text:p>
          </table:table-cell>
          <table:table-cell office:value-type="string">
            <text:p>obtaining information verbally</text:p>
          </table:table-cell>
          <table:table-cell office:value-type="string">
            <text:p>verbal interaction</text:p>
          </table:table-cell>
          <table:table-cell/>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office:value-type="string">
            <text:p>Asking questions and listening to others to obtain information.</text:p>
          </table:table-cell>
          <table:table-cell office:value-type="string">
            <text:p>S1.7.0</text:p>
          </table:table-cell>
        </table:table-row>
        <table:table-row>
          <table:table-cell office:value-type="string">
            <text:p>SkillGroup</text:p>
          </table:table-cell>
          <table:table-cell office:value-type="string">
            <text:p>http://data.europa.eu/esco/skill/316df5b7-31c4-4f4e-ae69-aad1b873b995</text:p>
          </table:table-cell>
          <table:table-cell office:value-type="string">
            <text:p>interpreting technical documentation and diagrams</text:p>
          </table:table-cell>
          <table:table-cell table:number-columns-repeated="2"/>
          <table:table-cell office:value-type="string">
            <text:p>released</text:p>
          </table:table-cell>
          <table:table-cell office:value-type="string">
            <text:p>2023-02-23T20:39:54.748Z</text:p>
          </table:table-cell>
          <table:table-cell office:value-type="string">
            <text:p>Examples:<text:line-break/>- read blueprints - interpret electrical diagrams.</text:p>
          </table:table-cell>
          <table:table-cell office:value-type="string">
            <text:p>http://data.europa.eu/esco/concept-scheme/skills<text:line-break/>http://data.europa.eu/esco/concept-scheme/skills-hierarchy</text:p>
          </table:table-cell>
          <table:table-cell office:value-type="string">
            <text:p>Reading and interpreting documentation such as blueprints, electrical wiring diagrams, architectural plans.</text:p>
          </table:table-cell>
          <table:table-cell office:value-type="string">
            <text:p>S2.1.3</text:p>
          </table:table-cell>
        </table:table-row>
        <table:table-row>
          <table:table-cell office:value-type="string">
            <text:p>SkillGroup</text:p>
          </table:table-cell>
          <table:table-cell office:value-type="string">
            <text:p>http://data.europa.eu/esco/skill/323b3684-86ec-40fa-81b4-bc52694ef168</text:p>
          </table:table-cell>
          <table:table-cell office:value-type="string">
            <text:p>negotiating</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office:value-type="string">
            <text:p>Exchanging ideas while analysing issues and interests at stake, enabling opposing sides to resolve disputes and reach agreement, or making decisions to resolve disputes or impose justice.</text:p>
          </table:table-cell>
          <table:table-cell office:value-type="string">
            <text:p>S1.1</text:p>
          </table:table-cell>
        </table:table-row>
        <table:table-row>
          <table:table-cell office:value-type="string">
            <text:p>SkillGroup</text:p>
          </table:table-cell>
          <table:table-cell office:value-type="string">
            <text:p>http://data.europa.eu/esco/skill/325a3d29-a235-4182-9128-782c0f4b2dcc</text:p>
          </table:table-cell>
          <table:table-cell office:value-type="string">
            <text:p>documenting and recording information</text:p>
          </table:table-cell>
          <table:table-cell table:number-columns-repeated="2"/>
          <table:table-cell office:value-type="string">
            <text:p>released</text:p>
          </table:table-cell>
          <table:table-cell/>
          <table:table-cell office:value-type="string">
            <text:p>Excludes:<text:line-break/>- Writing reports or documents requiring drafting of original text.</text:p>
          </table:table-cell>
          <table:table-cell office:value-type="string">
            <text:p>http://data.europa.eu/esco/concept-scheme/skills<text:line-break/>http://data.europa.eu/esco/concept-scheme/skills-hierarchy</text:p>
          </table:table-cell>
          <table:table-cell office:value-type="string">
            <text:p>Maintaining records of information, transactions and activities in digital, paper or other forms.</text:p>
          </table:table-cell>
          <table:table-cell office:value-type="string">
            <text:p>S2.2</text:p>
          </table:table-cell>
        </table:table-row>
        <table:table-row>
          <table:table-cell office:value-type="string">
            <text:p>SkillGroup</text:p>
          </table:table-cell>
          <table:table-cell office:value-type="string">
            <text:p>http://data.europa.eu/esco/skill/32c017fd-28ab-4051-bf68-74de952c2f77</text:p>
          </table:table-cell>
          <table:table-cell office:value-type="string">
            <text:p>managing information</text:p>
          </table:table-cell>
          <table:table-cell table:number-columns-repeated="2"/>
          <table:table-cell office:value-type="string">
            <text:p>released</text:p>
          </table:table-cell>
          <table:table-cell office:value-type="string">
            <text:p>2023-02-23T21:14:33.038Z</text:p>
          </table:table-cell>
          <table:table-cell office:value-type="string">
            <text:p>Examples:<text:line-break/>- Manage digital archives<text:line-break/>- Oversee record management<text:line-break/>- Organise information.</text:p>
          </table:table-cell>
          <table:table-cell office:value-type="string">
            <text:p>http://data.europa.eu/esco/concept-scheme/skills<text:line-break/>http://data.europa.eu/esco/concept-scheme/skills-hierarchy</text:p>
          </table:table-cell>
          <table:table-cell office:value-type="string">
            <text:p>Setting up and managing manual or electronic systems for storing , selecting, organizing, retrieving, distributing and safeguarding information.</text:p>
          </table:table-cell>
          <table:table-cell office:value-type="string">
            <text:p>S2.3.0</text:p>
          </table:table-cell>
        </table:table-row>
        <table:table-row>
          <table:table-cell office:value-type="string">
            <text:p>SkillGroup</text:p>
          </table:table-cell>
          <table:table-cell office:value-type="string">
            <text:p>http://data.europa.eu/esco/skill/32c854c1-6f1f-4f1c-8e4c-368a68a10db3</text:p>
          </table:table-cell>
          <table:table-cell office:value-type="string">
            <text:p>developing recipes or menus</text:p>
          </table:table-cell>
          <table:table-cell table:number-columns-repeated="2"/>
          <table:table-cell office:value-type="string">
            <text:p>released</text:p>
          </table:table-cell>
          <table:table-cell/>
          <table:table-cell office:value-type="string">
            <text:p>Examples:<text:line-break/>- compile cooking recipes<text:line-break/>- create new food products<text:line-break/>- develop new confectionery products.</text:p>
          </table:table-cell>
          <table:table-cell office:value-type="string">
            <text:p>http://data.europa.eu/esco/concept-scheme/skills<text:line-break/>http://data.europa.eu/esco/concept-scheme/skills-hierarchy</text:p>
          </table:table-cell>
          <table:table-cell office:value-type="string">
            <text:p>Combining innovative and creative ideas to come up with new recipes for food and beverage products and to create new menus.</text:p>
          </table:table-cell>
          <table:table-cell office:value-type="string">
            <text:p>S1.11.3</text:p>
          </table:table-cell>
        </table:table-row>
        <table:table-row>
          <table:table-cell office:value-type="string">
            <text:p>SkillGroup</text:p>
          </table:table-cell>
          <table:table-cell office:value-type="string">
            <text:p>http://data.europa.eu/esco/skill/335228d2-297d-4e0e-a6ee-bc6a8dc110d9</text:p>
          </table:table-cell>
          <table:table-cell office:value-type="string">
            <text:p>skills</text:p>
          </table:table-cell>
          <table:table-cell office:value-type="string">
            <text:p>skills</text:p>
          </table:table-cell>
          <table:table-cell/>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table:table-cell office:value-type="string">
            <text:p>S</text:p>
          </table:table-cell>
        </table:table-row>
        <table:table-row>
          <table:table-cell office:value-type="string">
            <text:p>SkillGroup</text:p>
          </table:table-cell>
          <table:table-cell office:value-type="string">
            <text:p>http://data.europa.eu/esco/skill/335be43a-3267-400e-b5cb-c9e234dc7544</text:p>
          </table:table-cell>
          <table:table-cell office:value-type="string">
            <text:p>teaching academic or vocational subjects</text:p>
          </table:table-cell>
          <table:table-cell table:number-columns-repeated="2"/>
          <table:table-cell office:value-type="string">
            <text:p>released</text:p>
          </table:table-cell>
          <table:table-cell office:value-type="string">
            <text:p>2023-12-20T15:16:40.141Z</text:p>
          </table:table-cell>
          <table:table-cell office:value-type="string">
            <text:p>Examples:<text:line-break/>- give theory lessons to pilots<text:line-break/>- teach biology<text:line-break/>- teach basic numeracy skills<text:line-break/>- teach industrial arts principles.</text:p>
          </table:table-cell>
          <table:table-cell office:value-type="string">
            <text:p>http://data.europa.eu/esco/concept-scheme/skills<text:line-break/>http://data.europa.eu/esco/concept-scheme/skills-hierarchy</text:p>
          </table:table-cell>
          <table:table-cell office:value-type="string">
            <text:p>Instruct students in the theory and practice of academic or vocational subjects.</text:p>
          </table:table-cell>
          <table:table-cell office:value-type="string">
            <text:p>S1.3.1</text:p>
          </table:table-cell>
        </table:table-row>
        <table:table-row>
          <table:table-cell office:value-type="string">
            <text:p>SkillGroup</text:p>
          </table:table-cell>
          <table:table-cell office:value-type="string">
            <text:p>http://data.europa.eu/esco/skill/3374fb57-056f-49e0-9fc5-000465e13794</text:p>
          </table:table-cell>
          <table:table-cell office:value-type="string">
            <text:p>teaching safety procedures</text:p>
          </table:table-cell>
          <table:table-cell table:number-columns-repeated="2"/>
          <table:table-cell office:value-type="string">
            <text:p>released</text:p>
          </table:table-cell>
          <table:table-cell/>
          <table:table-cell office:value-type="string">
            <text:p>Examples:<text:line-break/>- educate employees on occupational hazards<text:line-break/>- provide on-board safety training<text:line-break/>- train staff in safety procedures<text:line-break/>- educate public on fire safety.</text:p>
          </table:table-cell>
          <table:table-cell office:value-type="string">
            <text:p>http://data.europa.eu/esco/concept-scheme/skills<text:line-break/>http://data.europa.eu/esco/concept-scheme/skills-hierarchy</text:p>
          </table:table-cell>
          <table:table-cell office:value-type="string">
            <text:p>Teaching safety procedures or standards to other people.</text:p>
          </table:table-cell>
          <table:table-cell office:value-type="string">
            <text:p>S1.3.2</text:p>
          </table:table-cell>
        </table:table-row>
        <table:table-row>
          <table:table-cell office:value-type="string">
            <text:p>SkillGroup</text:p>
          </table:table-cell>
          <table:table-cell office:value-type="string">
            <text:p>http://data.europa.eu/esco/skill/3399045f-8078-4066-8b46-475b49b260ab</text:p>
          </table:table-cell>
          <table:table-cell office:value-type="string">
            <text:p>working with digital devices and applications</text:p>
          </table:table-cell>
          <table:table-cell office:value-type="string">
            <text:p>working with computers<text:line-break/>computer literacy<text:line-break/>digital competencies<text:line-break/>digital and technology-based competences</text:p>
          </table:table-cell>
          <table:table-cell office:value-type="string">
            <text:p>ICT<text:line-break/>information and communication technology<text:line-break/>IT affinity<text:line-break/>working at the PC</text:p>
          </table:table-cell>
          <table:table-cell office:value-type="string">
            <text:p>released</text:p>
          </table:table-cell>
          <table:table-cell office:value-type="string">
            <text:p>2021-08-30T13:29:19.698Z</text:p>
          </table:table-cell>
          <table:table-cell office:value-type="string">
            <text:p>The cluster is restricted to foundational digital skills increasingly becoming more important in learning, work and private life. It is building on the DigCOMP 2.1 framework, notably proficiency levels 1 and 2 . DigComp 2.1 skills of proficiency level 3 and above are not considered transversal. Skills referring to information and data literacy or media literacy are listed under 2.1.1 Critically evaluate information and its sources.</text:p>
          </table:table-cell>
          <table:table-cell office:value-type="string">
            <text:p>http://data.europa.eu/esco/concept-scheme/skills<text:line-break/>http://data.europa.eu/esco/concept-scheme/skills-hierarchy<text:line-break/>http://data.europa.eu/esco/concept-scheme/skill-transversal-groups</text:p>
          </table:table-cell>
          <table:table-cell office:value-type="string">
            <text:p>Carry out simple digital tasks like operating already configured hardware, finding information via web searches, using standard software for communicating or collaborating with others or for creating and editing simple content and choosing between standard measures for protecting devices, personal data and privacy in digital environments.</text:p>
          </table:table-cell>
          <table:table-cell office:value-type="string">
            <text:p>T1.3</text:p>
          </table:table-cell>
        </table:table-row>
        <table:table-row>
          <table:table-cell office:value-type="string">
            <text:p>SkillGroup</text:p>
          </table:table-cell>
          <table:table-cell office:value-type="string">
            <text:p>http://data.europa.eu/esco/skill/34691a8a-ec8e-4eaa-b6e7-f4dbf144c644</text:p>
          </table:table-cell>
          <table:table-cell office:value-type="string">
            <text:p>providing financial advice</text:p>
          </table:table-cell>
          <table:table-cell table:number-columns-repeated="2"/>
          <table:table-cell office:value-type="string">
            <text:p>released</text:p>
          </table:table-cell>
          <table:table-cell/>
          <table:table-cell office:value-type="string">
            <text:p>Examples:<text:line-break/>- advise on investment<text:line-break/>- explain financial technicalities to clients.</text:p>
          </table:table-cell>
          <table:table-cell office:value-type="string">
            <text:p>http://data.europa.eu/esco/concept-scheme/skills<text:line-break/>http://data.europa.eu/esco/concept-scheme/skills-hierarchy</text:p>
          </table:table-cell>
          <table:table-cell office:value-type="string">
            <text:p>Explaining financial information and providing financial advice.</text:p>
          </table:table-cell>
          <table:table-cell office:value-type="string">
            <text:p>S1.5.2</text:p>
          </table:table-cell>
        </table:table-row>
        <table:table-row>
          <table:table-cell office:value-type="string">
            <text:p>SkillGroup</text:p>
          </table:table-cell>
          <table:table-cell office:value-type="string">
            <text:p>http://data.europa.eu/esco/skill/347aa7ee-b640-41cc-ae7c-3c5eafda9fda</text:p>
          </table:table-cell>
          <table:table-cell office:value-type="string">
            <text:p>measuring physical properties</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office:value-type="string">
            <text:p>Measuring the dimensions, weight, density and other physical properties of objects, materials and spaces.</text:p>
          </table:table-cell>
          <table:table-cell office:value-type="string">
            <text:p>S2.5.0</text:p>
          </table:table-cell>
        </table:table-row>
        <table:table-row>
          <table:table-cell office:value-type="string">
            <text:p>SkillGroup</text:p>
          </table:table-cell>
          <table:table-cell office:value-type="string">
            <text:p>http://data.europa.eu/esco/skill/35045957-e9e4-44b1-801a-9a49f6efaece</text:p>
          </table:table-cell>
          <table:table-cell office:value-type="string">
            <text:p>marking materials or objects for identification</text:p>
          </table:table-cell>
          <table:table-cell table:number-columns-repeated="2"/>
          <table:table-cell office:value-type="string">
            <text:p>released</text:p>
          </table:table-cell>
          <table:table-cell office:value-type="string">
            <text:p>2023-10-27T13:47:25.299Z</text:p>
          </table:table-cell>
          <table:table-cell office:value-type="string">
            <text:p>Examples:<text:line-break/>- Assign codes to product items<text:line-break/>- Change shelf labels - Label samples.</text:p>
          </table:table-cell>
          <table:table-cell office:value-type="string">
            <text:p>http://data.europa.eu/esco/concept-scheme/skills<text:line-break/>http://data.europa.eu/esco/concept-scheme/skills-hierarchy</text:p>
          </table:table-cell>
          <table:table-cell office:value-type="string">
            <text:p>Marking or labelling objects or materials for identification by type or individually.</text:p>
          </table:table-cell>
          <table:table-cell office:value-type="string">
            <text:p>S6.1.2</text:p>
          </table:table-cell>
        </table:table-row>
        <table:table-row>
          <table:table-cell office:value-type="string">
            <text:p>SkillGroup</text:p>
          </table:table-cell>
          <table:table-cell office:value-type="string">
            <text:p>http://data.europa.eu/esco/skill/35dc2a23-cdc3-4291-930f-927ba2911949</text:p>
          </table:table-cell>
          <table:table-cell office:value-type="string">
            <text:p>ensuring compliance with legislation</text:p>
          </table:table-cell>
          <table:table-cell table:number-columns-repeated="2"/>
          <table:table-cell office:value-type="string">
            <text:p>released</text:p>
          </table:table-cell>
          <table:table-cell office:value-type="string">
            <text:p>2023-02-23T21:03:05.744Z</text:p>
          </table:table-cell>
          <table:table-cell office:value-type="string">
            <text:p>Examples:<text:line-break/>- apply immigration law<text:line-break/>- ensure customs compliance<text:line-break/>- meet building regulations Excludes:<text:line-break/>- adhere to organisational guidelines<text:line-break/>- protect biodiversity.</text:p>
          </table:table-cell>
          <table:table-cell office:value-type="string">
            <text:p>http://data.europa.eu/esco/concept-scheme/skills<text:line-break/>http://data.europa.eu/esco/concept-scheme/skills-hierarchy</text:p>
          </table:table-cell>
          <table:table-cell office:value-type="string">
            <text:p>Ensuring compliance with national or international laws and legislation.</text:p>
          </table:table-cell>
          <table:table-cell office:value-type="string">
            <text:p>S3.3.7</text:p>
          </table:table-cell>
        </table:table-row>
        <table:table-row>
          <table:table-cell office:value-type="string">
            <text:p>SkillGroup</text:p>
          </table:table-cell>
          <table:table-cell office:value-type="string">
            <text:p>http://data.europa.eu/esco/skill/36c9717b-e53a-4d16-b7df-b6555eff43f8</text:p>
          </table:table-cell>
          <table:table-cell office:value-type="string">
            <text:p>operating watercraft</text:p>
          </table:table-cell>
          <table:table-cell office:value-type="string">
            <text:p>operating ships and boats</text:p>
          </table:table-cell>
          <table:table-cell/>
          <table:table-cell office:value-type="string">
            <text:p>released</text:p>
          </table:table-cell>
          <table:table-cell/>
          <table:table-cell office:value-type="string">
            <text:p>Examples:<text:line-break/>- Operate mechanical equipment of ships<text:line-break/>- Operate small craft<text:line-break/>- Use fishing vessel equipment<text:line-break/>- Navigate European inland waterways<text:line-break/>- Steer vessels.</text:p>
          </table:table-cell>
          <table:table-cell office:value-type="string">
            <text:p>http://data.europa.eu/esco/concept-scheme/skills<text:line-break/>http://data.europa.eu/esco/concept-scheme/skills-hierarchy</text:p>
          </table:table-cell>
          <table:table-cell office:value-type="string">
            <text:p>Operating and controlling the movement of watercraft and underwater vessels, including ships, boats and other types of vessel.</text:p>
          </table:table-cell>
          <table:table-cell office:value-type="string">
            <text:p>S8.3.0</text:p>
          </table:table-cell>
        </table:table-row>
        <table:table-row>
          <table:table-cell office:value-type="string">
            <text:p>SkillGroup</text:p>
          </table:table-cell>
          <table:table-cell office:value-type="string">
            <text:p>http://data.europa.eu/esco/skill/37272760-957a-4c34-b4f3-780ee285334d</text:p>
          </table:table-cell>
          <table:table-cell office:value-type="string">
            <text:p>developing financial, business or marketing plans</text:p>
          </table:table-cell>
          <table:table-cell table:number-columns-repeated="2"/>
          <table:table-cell office:value-type="string">
            <text:p>released</text:p>
          </table:table-cell>
          <table:table-cell office:value-type="string">
            <text:p>2020-12-07T11:46:34.47Z</text:p>
          </table:table-cell>
          <table:table-cell office:value-type="string">
            <text:p>Examples:<text:line-break/>- Develop business case<text:line-break/>- Draw up marketing and sales plan<text:line-break/>- Create a financial plan.</text:p>
          </table:table-cell>
          <table:table-cell office:value-type="string">
            <text:p>http://data.europa.eu/esco/concept-scheme/skills<text:line-break/>http://data.europa.eu/esco/concept-scheme/skills-hierarchy</text:p>
          </table:table-cell>
          <table:table-cell office:value-type="string">
            <text:p>Envision and develop strategies and plans for companies and organisations aimed at purposes such as establishing new markets, refurbishing the equipment and machinery of a company, implementing pricing strategies, and restoring or maintaining financial viability.</text:p>
          </table:table-cell>
          <table:table-cell office:value-type="string">
            <text:p>S4.1.2</text:p>
          </table:table-cell>
        </table:table-row>
        <table:table-row>
          <table:table-cell office:value-type="string">
            <text:p>SkillGroup</text:p>
          </table:table-cell>
          <table:table-cell office:value-type="string">
            <text:p>http://data.europa.eu/esco/skill/3753e796-121e-46a3-9c27-dee31ce92c80</text:p>
          </table:table-cell>
          <table:table-cell office:value-type="string">
            <text:p>analysing and evaluating information and data</text:p>
          </table:table-cell>
          <table:table-cell office:value-type="string">
            <text:p>analysing information</text:p>
          </table:table-cell>
          <table:table-cell/>
          <table:table-cell office:value-type="string">
            <text:p>released</text:p>
          </table:table-cell>
          <table:table-cell office:value-type="string">
            <text:p>2023-06-30T07:35:32.811Z</text:p>
          </table:table-cell>
          <table:table-cell office:value-type="string">
            <text:p>Excludes:<text:line-break/>- Using ICT tools to analyse and process data.</text:p>
          </table:table-cell>
          <table:table-cell office:value-type="string">
            <text:p>http://data.europa.eu/esco/concept-scheme/skills<text:line-break/>http://data.europa.eu/esco/concept-scheme/skills-hierarchy</text:p>
          </table:table-cell>
          <table:table-cell office:value-type="string">
            <text:p>Examining data or facts to determine appropriate actions or recommendations; comparing and critically evaluating the credibility and reliability of sources of data; making and defending judgements based on internal evidence and external criteria.</text:p>
          </table:table-cell>
          <table:table-cell office:value-type="string">
            <text:p>S2.7</text:p>
          </table:table-cell>
        </table:table-row>
        <table:table-row>
          <table:table-cell office:value-type="string">
            <text:p>SkillGroup</text:p>
          </table:table-cell>
          <table:table-cell office:value-type="string">
            <text:p>http://data.europa.eu/esco/skill/37f2f637-1f54-4ea1-b677-5ca6cac24993</text:p>
          </table:table-cell>
          <table:table-cell office:value-type="string">
            <text:p>fabricating medical and prosthetic devices</text:p>
          </table:table-cell>
          <table:table-cell table:number-columns-repeated="2"/>
          <table:table-cell office:value-type="string">
            <text:p>released</text:p>
          </table:table-cell>
          <table:table-cell/>
          <table:table-cell office:value-type="string">
            <text:p>Excludes:<text:line-break/>- Operation of automated assembly equipment or machines<text:line-break/>- Fabricating or repairing optical devices Examples:<text:line-break/>- Manufacture dental prostheses<text:line-break/>- Create lifecasts<text:line-break/>- Repair orthopaedic goods.</text:p>
          </table:table-cell>
          <table:table-cell office:value-type="string">
            <text:p>http://data.europa.eu/esco/concept-scheme/skills<text:line-break/>http://data.europa.eu/esco/concept-scheme/skills-hierarchy</text:p>
          </table:table-cell>
          <table:table-cell office:value-type="string">
            <text:p>Fabricating, maintaining or repairing medical, dental, orthotic or prosthetic devices.</text:p>
          </table:table-cell>
          <table:table-cell office:value-type="string">
            <text:p>S6.5.2</text:p>
          </table:table-cell>
        </table:table-row>
        <table:table-row>
          <table:table-cell office:value-type="string">
            <text:p>SkillGroup</text:p>
          </table:table-cell>
          <table:table-cell office:value-type="string">
            <text:p>http://data.europa.eu/esco/skill/3926ec7d-64cd-4410-8283-493a1afdd57b</text:p>
          </table:table-cell>
          <table:table-cell office:value-type="string">
            <text:p>providing physical therapies</text:p>
          </table:table-cell>
          <table:table-cell table:number-columns-repeated="2"/>
          <table:table-cell office:value-type="string">
            <text:p>released</text:p>
          </table:table-cell>
          <table:table-cell/>
          <table:table-cell office:value-type="string">
            <text:p>Examples:<text:line-break/>- apply clinical physiotherapy skills<text:line-break/>- administer hydrotherapy<text:line-break/>- give shiatsu massages Excludes:<text:line-break/>- veterinary care<text:line-break/>- non-therapeutic massage.</text:p>
          </table:table-cell>
          <table:table-cell office:value-type="string">
            <text:p>http://data.europa.eu/esco/concept-scheme/skills<text:line-break/>http://data.europa.eu/esco/concept-scheme/skills-hierarchy</text:p>
          </table:table-cell>
          <table:table-cell office:value-type="string">
            <text:p>Treating injuries and health conditions through physiotherapy, massage, chiropractic and other physical therapies.</text:p>
          </table:table-cell>
          <table:table-cell office:value-type="string">
            <text:p>S3.2.3</text:p>
          </table:table-cell>
        </table:table-row>
        <table:table-row>
          <table:table-cell office:value-type="string">
            <text:p>SkillGroup</text:p>
          </table:table-cell>
          <table:table-cell office:value-type="string">
            <text:p>http://data.europa.eu/esco/skill/39499028-35bf-4d69-9275-fb98902ed88b</text:p>
          </table:table-cell>
          <table:table-cell office:value-type="string">
            <text:p>working with computers</text:p>
          </table:table-cell>
          <table:table-cell office:value-type="string">
            <text:p>digital skills</text:p>
          </table:table-cell>
          <table:table-cell/>
          <table:table-cell office:value-type="string">
            <text:p>released</text:p>
          </table:table-cell>
          <table:table-cell office:value-type="string">
            <text:p>2021-09-16T17:48:30.49Z</text:p>
          </table:table-cell>
          <table:table-cell office:value-type="string">
            <text:p>Excludes:<text:line-break/>- Systems analysis<text:line-break/>- Installing, maintaining and repairing computer hardware.</text:p>
          </table:table-cell>
          <table:table-cell office:value-type="string">
            <text:p>http://data.europa.eu/esco/concept-scheme/skills<text:line-break/>http://data.europa.eu/esco/concept-scheme/skills-hierarchy</text:p>
          </table:table-cell>
          <table:table-cell office:value-type="string">
            <text:p>Using computers and other digital tools to develop, install and maintain ICT software and infrastructure and to browse, search, filter, organise, store, retrieve, and analyse data, to collaborate and communicate with others, to create and edit new content.</text:p>
          </table:table-cell>
          <table:table-cell office:value-type="string">
            <text:p>S5.0.0</text:p>
          </table:table-cell>
        </table:table-row>
        <table:table-row>
          <table:table-cell office:value-type="string">
            <text:p>SkillGroup</text:p>
          </table:table-cell>
          <table:table-cell office:value-type="string">
            <text:p>http://data.europa.eu/esco/skill/395e42b8-f637-4e7e-96d8-9c1976c05d92</text:p>
          </table:table-cell>
          <table:table-cell office:value-type="string">
            <text:p>performing artistic or cultural activities</text:p>
          </table:table-cell>
          <table:table-cell table:number-columns-repeated="2"/>
          <table:table-cell office:value-type="string">
            <text:p>released</text:p>
          </table:table-cell>
          <table:table-cell office:value-type="string">
            <text:p>2022-06-22T10:50:09.473Z</text:p>
          </table:table-cell>
          <table:table-cell office:value-type="string">
            <text:p>Examples:<text:line-break/>- perform dance or music<text:line-break/>- tell stories<text:line-break/>- perform music in a recording studio - perform religious ceremonies<text:line-break/>- rehearse performances Excludes:<text:line-break/>- participate in sports performances<text:line-break/>- perform stunts.</text:p>
          </table:table-cell>
          <table:table-cell office:value-type="string">
            <text:p>http://data.europa.eu/esco/concept-scheme/skills<text:line-break/>http://data.europa.eu/esco/concept-scheme/skills-hierarchy</text:p>
          </table:table-cell>
          <table:table-cell office:value-type="string">
            <text:p>Performing, practising or rehearsing music, dance, drama, ceremonies or other types of performance (excluding athletic performance) for a live audience, or as part of a recording session.</text:p>
          </table:table-cell>
          <table:table-cell office:value-type="string">
            <text:p>S1.14.2</text:p>
          </table:table-cell>
        </table:table-row>
        <table:table-row>
          <table:table-cell office:value-type="string">
            <text:p>SkillGroup</text:p>
          </table:table-cell>
          <table:table-cell office:value-type="string">
            <text:p>http://data.europa.eu/esco/skill/39d83364-c86f-4942-96d1-e5df582face9</text:p>
          </table:table-cell>
          <table:table-cell office:value-type="string">
            <text:p>operating metal, plastic or rubber forming equipment</text:p>
          </table:table-cell>
          <table:table-cell table:number-columns-repeated="2"/>
          <table:table-cell office:value-type="string">
            <text:p>released</text:p>
          </table:table-cell>
          <table:table-cell office:value-type="string">
            <text:p>2021-01-21T14:40:09.665Z</text:p>
          </table:table-cell>
          <table:table-cell office:value-type="string">
            <text:p>Excludes:<text:line-break/>- Operating metal extrusion machines Examples:<text:line-break/>- Tend injection moulding machine<text:line-break/>- Tend mouldmaking machines.</text:p>
          </table:table-cell>
          <table:table-cell office:value-type="string">
            <text:p>http://data.europa.eu/esco/concept-scheme/skills<text:line-break/>http://data.europa.eu/esco/concept-scheme/skills-hierarchy</text:p>
          </table:table-cell>
          <table:table-cell office:value-type="string">
            <text:p>Operating and tending machinery to mould, press, or form metal, plastic, rubber or other materials into a particular shape.</text:p>
          </table:table-cell>
          <table:table-cell office:value-type="string">
            <text:p>S8.5.7</text:p>
          </table:table-cell>
        </table:table-row>
        <table:table-row>
          <table:table-cell office:value-type="string">
            <text:p>SkillGroup</text:p>
          </table:table-cell>
          <table:table-cell office:value-type="string">
            <text:p>http://data.europa.eu/esco/skill/39fa260c-4f85-48e3-83ce-e292e696c233</text:p>
          </table:table-cell>
          <table:table-cell office:value-type="string">
            <text:p>designing electrical or electronic systems or equipment</text:p>
          </table:table-cell>
          <table:table-cell table:number-columns-repeated="2"/>
          <table:table-cell office:value-type="string">
            <text:p>released</text:p>
          </table:table-cell>
          <table:table-cell office:value-type="string">
            <text:p>2020-12-09T10:43:42.257Z</text:p>
          </table:table-cell>
          <table:table-cell office:value-type="string">
            <text:p>Examples:<text:line-break/>- design circuit boards<text:line-break/>- design microelectromechanical systems<text:line-break/>- define firmware.</text:p>
          </table:table-cell>
          <table:table-cell office:value-type="string">
            <text:p>http://data.europa.eu/esco/concept-scheme/skills<text:line-break/>http://data.europa.eu/esco/concept-scheme/skills-hierarchy</text:p>
          </table:table-cell>
          <table:table-cell office:value-type="string">
            <text:p>Creating a plan or specification for the design and development of electrical, electronic or mechatronic systems, hardware, products, and components.</text:p>
          </table:table-cell>
          <table:table-cell office:value-type="string">
            <text:p>S1.11.2</text:p>
          </table:table-cell>
        </table:table-row>
        <table:table-row>
          <table:table-cell office:value-type="string">
            <text:p>SkillGroup</text:p>
          </table:table-cell>
          <table:table-cell office:value-type="string">
            <text:p>http://data.europa.eu/esco/skill/3afcf547-cefc-493a-8abb-aaa8b7088e4f</text:p>
          </table:table-cell>
          <table:table-cell office:value-type="string">
            <text:p>hunting, trapping and slaughtering animals</text:p>
          </table:table-cell>
          <table:table-cell table:number-columns-repeated="2"/>
          <table:table-cell office:value-type="string">
            <text:p>released</text:p>
          </table:table-cell>
          <table:table-cell office:value-type="string">
            <text:p>2021-09-15T09:04:46.824Z</text:p>
          </table:table-cell>
          <table:table-cell office:value-type="string">
            <text:p>Examples:<text:line-break/>- Hunt animals<text:line-break/>- Slaughter animals<text:line-break/>- Remove predators.</text:p>
          </table:table-cell>
          <table:table-cell office:value-type="string">
            <text:p>http://data.europa.eu/esco/concept-scheme/skills<text:line-break/>http://data.europa.eu/esco/concept-scheme/skills-hierarchy</text:p>
          </table:table-cell>
          <table:table-cell office:value-type="string">
            <text:p>Hunting, trapping or capturing animal wildlife or birds, or slaughter captive animals, for purposes such as gaining food or animal products, pest control or wildlife management.</text:p>
          </table:table-cell>
          <table:table-cell office:value-type="string">
            <text:p>S6.9.4</text:p>
          </table:table-cell>
        </table:table-row>
        <table:table-row>
          <table:table-cell office:value-type="string">
            <text:p>SkillGroup</text:p>
          </table:table-cell>
          <table:table-cell office:value-type="string">
            <text:p>http://data.europa.eu/esco/skill/3b86c15f-3f66-4e50-abf5-544f2a942a0b</text:p>
          </table:table-cell>
          <table:table-cell office:value-type="string">
            <text:p>cleaning outdoor spaces</text:p>
          </table:table-cell>
          <table:table-cell table:number-columns-repeated="2"/>
          <table:table-cell office:value-type="string">
            <text:p>released</text:p>
          </table:table-cell>
          <table:table-cell/>
          <table:table-cell office:value-type="string">
            <text:p>Examples:<text:line-break/>- Clean camping facilities<text:line-break/>- Perform street cleaning manually.</text:p>
          </table:table-cell>
          <table:table-cell office:value-type="string">
            <text:p>http://data.europa.eu/esco/concept-scheme/skills<text:line-break/>http://data.europa.eu/esco/concept-scheme/skills-hierarchy</text:p>
          </table:table-cell>
          <table:table-cell office:value-type="string">
            <text:p>Cleaning outdoor public spaces such as streets or parks.</text:p>
          </table:table-cell>
          <table:table-cell office:value-type="string">
            <text:p>S6.11.3</text:p>
          </table:table-cell>
        </table:table-row>
        <table:table-row>
          <table:table-cell office:value-type="string">
            <text:p>SkillGroup</text:p>
          </table:table-cell>
          <table:table-cell office:value-type="string">
            <text:p>http://data.europa.eu/esco/skill/3bf93195-5239-4f73-94a6-349be598d462</text:p>
          </table:table-cell>
          <table:table-cell office:value-type="string">
            <text:p>performing and entertaining</text:p>
          </table:table-cell>
          <table:table-cell table:number-columns-repeated="2"/>
          <table:table-cell office:value-type="string">
            <text:p>released</text:p>
          </table:table-cell>
          <table:table-cell office:value-type="string">
            <text:p>2022-06-19T15:45:14.266Z</text:p>
          </table:table-cell>
          <table:table-cell/>
          <table:table-cell office:value-type="string">
            <text:p>http://data.europa.eu/esco/concept-scheme/skills<text:line-break/>http://data.europa.eu/esco/concept-scheme/skills-hierarchy</text:p>
          </table:table-cell>
          <table:table-cell office:value-type="string">
            <text:p>Undertaking activities to entertain an audience or improve personal abilities.</text:p>
          </table:table-cell>
          <table:table-cell office:value-type="string">
            <text:p>S1.14.0</text:p>
          </table:table-cell>
        </table:table-row>
        <table:table-row>
          <table:table-cell office:value-type="string">
            <text:p>SkillGroup</text:p>
          </table:table-cell>
          <table:table-cell office:value-type="string">
            <text:p>http://data.europa.eu/esco/skill/3d54fec5-d9cb-45a0-bf8d-ffaf3790a5bb</text:p>
          </table:table-cell>
          <table:table-cell office:value-type="string">
            <text:p>applying health-related skills and competences</text:p>
          </table:table-cell>
          <table:table-cell office:value-type="string">
            <text:p>maintaining safety, health and welfare</text:p>
          </table:table-cell>
          <table:table-cell/>
          <table:table-cell office:value-type="string">
            <text:p>released</text:p>
          </table:table-cell>
          <table:table-cell office:value-type="string">
            <text:p>2021-09-13T12:45:19.726Z</text:p>
          </table:table-cell>
          <table:table-cell office:value-type="string">
            <text:p>The skills and competences under this heading address the ability to care for own and others’ mental and physical well-being.</text:p>
          </table:table-cell>
          <table:table-cell office:value-type="string">
            <text:p>http://data.europa.eu/esco/concept-scheme/skills<text:line-break/>http://data.europa.eu/esco/concept-scheme/skills-hierarchy<text:line-break/>http://data.europa.eu/esco/concept-scheme/skill-transversal-groups</text:p>
          </table:table-cell>
          <table:table-cell office:value-type="string">
            <text:p>Care for own and others’ mental and physical well-being and apply basic health standards, including hygiene. Obtain and use health information, and identify and access services and agencies that offer healthcare and guidance. Manage the negative effects of chronic health conditions.</text:p>
          </table:table-cell>
          <table:table-cell office:value-type="string">
            <text:p>T6.1</text:p>
          </table:table-cell>
        </table:table-row>
        <table:table-row>
          <table:table-cell office:value-type="string">
            <text:p>SkillGroup</text:p>
          </table:table-cell>
          <table:table-cell office:value-type="string">
            <text:p>http://data.europa.eu/esco/skill/3eacdaa9-fe4a-49ba-a085-c798097cf8d4</text:p>
          </table:table-cell>
          <table:table-cell office:value-type="string">
            <text:p>fabricating tobacco products</text:p>
          </table:table-cell>
          <table:table-cell table:number-columns-repeated="2"/>
          <table:table-cell office:value-type="string">
            <text:p>released</text:p>
          </table:table-cell>
          <table:table-cell/>
          <table:table-cell office:value-type="string">
            <text:p>Excludes:<text:line-break/>- Operation of machinery<text:line-break/>- Preparing and cooking food and drinks for immediate consumption Examples:<text:line-break/>- Cure tobacco leaves<text:line-break/>- Flavour tobacco leaves.</text:p>
          </table:table-cell>
          <table:table-cell office:value-type="string">
            <text:p>http://data.europa.eu/esco/concept-scheme/skills<text:line-break/>http://data.europa.eu/esco/concept-scheme/skills-hierarchy</text:p>
          </table:table-cell>
          <table:table-cell office:value-type="string">
            <text:p>Fabricating tobacco products by hand or using hand-held tools and equipment.</text:p>
          </table:table-cell>
          <table:table-cell office:value-type="string">
            <text:p>S6.5.8</text:p>
          </table:table-cell>
        </table:table-row>
        <table:table-row>
          <table:table-cell office:value-type="string">
            <text:p>SkillGroup</text:p>
          </table:table-cell>
          <table:table-cell office:value-type="string">
            <text:p>http://data.europa.eu/esco/skill/3eef7ff2-3ade-41d4-b084-2bd2a3949e1c</text:p>
          </table:table-cell>
          <table:table-cell office:value-type="string">
            <text:p>assessing land or real estate</text:p>
          </table:table-cell>
          <table:table-cell table:number-columns-repeated="2"/>
          <table:table-cell office:value-type="string">
            <text:p>released</text:p>
          </table:table-cell>
          <table:table-cell office:value-type="string">
            <text:p>2020-12-04T13:51:21.97Z</text:p>
          </table:table-cell>
          <table:table-cell office:value-type="string">
            <text:p>Excludes:<text:line-break/>- Using ICT tools to analyse and process data. Examples:<text:line-break/>- Conduct environmental site assessments<text:line-break/>- Survey sites for pipeline installation<text:line-break/>- Value properties.</text:p>
          </table:table-cell>
          <table:table-cell office:value-type="string">
            <text:p>http://data.europa.eu/esco/concept-scheme/skills<text:line-break/>http://data.europa.eu/esco/concept-scheme/skills-hierarchy</text:p>
          </table:table-cell>
          <table:table-cell office:value-type="string">
            <text:p>Assessing the suitability of land or buildings for future sale, use, development or conservation and estimating their value.</text:p>
          </table:table-cell>
          <table:table-cell office:value-type="string">
            <text:p>S2.7.1</text:p>
          </table:table-cell>
        </table:table-row>
        <table:table-row>
          <table:table-cell office:value-type="string">
            <text:p>SkillGroup</text:p>
          </table:table-cell>
          <table:table-cell office:value-type="string">
            <text:p>http://data.europa.eu/esco/skill/3f1f77a5-9c2d-4b71-afb3-0328d8cbb05e</text:p>
          </table:table-cell>
          <table:table-cell office:value-type="string">
            <text:p>operating machinery for the extraction and processing of raw materials</text:p>
          </table:table-cell>
          <table:table-cell office:value-type="string">
            <text:p>extraction and processing of raw materials</text:p>
          </table:table-cell>
          <table:table-cell/>
          <table:table-cell office:value-type="string">
            <text:p>released</text:p>
          </table:table-cell>
          <table:table-cell/>
          <table:table-cell office:value-type="string">
            <text:p>Excludes:<text:line-break/>- Operating centralized process control equipment.</text:p>
          </table:table-cell>
          <table:table-cell office:value-type="string">
            <text:p>http://data.europa.eu/esco/concept-scheme/skills<text:line-break/>http://data.europa.eu/esco/concept-scheme/skills-hierarchy</text:p>
          </table:table-cell>
          <table:table-cell office:value-type="string">
            <text:p>Operating and monitoring various types of mechanically-controlled or computer-controlled stationary machinery for the extraction or processing of raw materials.</text:p>
          </table:table-cell>
          <table:table-cell office:value-type="string">
            <text:p>S8.4.0</text:p>
          </table:table-cell>
        </table:table-row>
        <table:table-row>
          <table:table-cell office:value-type="string">
            <text:p>SkillGroup</text:p>
          </table:table-cell>
          <table:table-cell office:value-type="string">
            <text:p>http://data.europa.eu/esco/skill/3f641516-9846-4a7f-a7f4-e1274eef6688</text:p>
          </table:table-cell>
          <table:table-cell office:value-type="string">
            <text:p>presenting information</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office:value-type="string">
            <text:p>Presenting oral or visual material to an audience in order to provide or interpret information.</text:p>
          </table:table-cell>
          <table:table-cell office:value-type="string">
            <text:p>S1.4</text:p>
          </table:table-cell>
        </table:table-row>
        <table:table-row>
          <table:table-cell office:value-type="string">
            <text:p>SkillGroup</text:p>
          </table:table-cell>
          <table:table-cell office:value-type="string">
            <text:p>http://data.europa.eu/esco/skill/418e58f5-c50c-4147-baa0-83aeb43b796a</text:p>
          </table:table-cell>
          <table:table-cell office:value-type="string">
            <text:p>operating painting or coating machinery</text:p>
          </table:table-cell>
          <table:table-cell table:number-columns-repeated="2"/>
          <table:table-cell office:value-type="string">
            <text:p>released</text:p>
          </table:table-cell>
          <table:table-cell/>
          <table:table-cell office:value-type="string">
            <text:p>Excludes:<text:line-break/>- Operating handheld tools such as handheld spray guns Examples:<text:line-break/>- Galvanise metal workpiece<text:line-break/>- Tend coating machine<text:line-break/>- Tend dip tank.</text:p>
          </table:table-cell>
          <table:table-cell office:value-type="string">
            <text:p>http://data.europa.eu/esco/concept-scheme/skills<text:line-break/>http://data.europa.eu/esco/concept-scheme/skills-hierarchy</text:p>
          </table:table-cell>
          <table:table-cell office:value-type="string">
            <text:p>Operating machinery to apply paints or coatings to the surface of products or materials.</text:p>
          </table:table-cell>
          <table:table-cell office:value-type="string">
            <text:p>S8.5.1</text:p>
          </table:table-cell>
        </table:table-row>
        <table:table-row>
          <table:table-cell office:value-type="string">
            <text:p>SkillGroup</text:p>
          </table:table-cell>
          <table:table-cell office:value-type="string">
            <text:p>http://data.europa.eu/esco/skill/424cce4d-71c9-47d9-93d6-4068403139f0</text:p>
          </table:table-cell>
          <table:table-cell office:value-type="string">
            <text:p>shaping materials to create products</text:p>
          </table:table-cell>
          <table:table-cell table:number-columns-repeated="2"/>
          <table:table-cell office:value-type="string">
            <text:p>released</text:p>
          </table:table-cell>
          <table:table-cell office:value-type="string">
            <text:p>2022-06-19T15:45:14.266Z</text:p>
          </table:table-cell>
          <table:table-cell office:value-type="string">
            <text:p>Examples:<text:line-break/>- Shape clay<text:line-break/>- Shape sheet metal objects<text:line-break/>- Use wood chisel.</text:p>
          </table:table-cell>
          <table:table-cell office:value-type="string">
            <text:p>http://data.europa.eu/esco/concept-scheme/skills<text:line-break/>http://data.europa.eu/esco/concept-scheme/skills-hierarchy</text:p>
          </table:table-cell>
          <table:table-cell office:value-type="string">
            <text:p>Altering the shape of various types of materials by hand or using hand tools.</text:p>
          </table:table-cell>
          <table:table-cell office:value-type="string">
            <text:p>S6.7.2</text:p>
          </table:table-cell>
        </table:table-row>
        <table:table-row>
          <table:table-cell office:value-type="string">
            <text:p>SkillGroup</text:p>
          </table:table-cell>
          <table:table-cell office:value-type="string">
            <text:p>http://data.europa.eu/esco/skill/42f18b92-1c20-46ed-bde0-9bc64ff1e475</text:p>
          </table:table-cell>
          <table:table-cell office:value-type="string">
            <text:p>feeding and grooming animals</text:p>
          </table:table-cell>
          <table:table-cell table:number-columns-repeated="2"/>
          <table:table-cell office:value-type="string">
            <text:p>released</text:p>
          </table:table-cell>
          <table:table-cell/>
          <table:table-cell office:value-type="string">
            <text:p>Examples:<text:line-break/>- Feed livestock<text:line-break/>- Groom animals - Implement fin fish feeding regimes<text:line-break/>- Feed broodstock - Feed pets.</text:p>
          </table:table-cell>
          <table:table-cell office:value-type="string">
            <text:p>http://data.europa.eu/esco/concept-scheme/skills<text:line-break/>http://data.europa.eu/esco/concept-scheme/skills-hierarchy</text:p>
          </table:table-cell>
          <table:table-cell office:value-type="string">
            <text:p>Feeding and grooming domestic and captive animals of all types including aquatic.</text:p>
          </table:table-cell>
          <table:table-cell office:value-type="string">
            <text:p>S6.9.5</text:p>
          </table:table-cell>
        </table:table-row>
        <table:table-row>
          <table:table-cell office:value-type="string">
            <text:p>SkillGroup</text:p>
          </table:table-cell>
          <table:table-cell office:value-type="string">
            <text:p>http://data.europa.eu/esco/skill/4364e0cd-66ad-4f0c-b96d-0ea6796067cb</text:p>
          </table:table-cell>
          <table:table-cell office:value-type="string">
            <text:p>tending plants and crops</text:p>
          </table:table-cell>
          <table:table-cell office:value-type="string">
            <text:p>plants and crops</text:p>
          </table:table-cell>
          <table:table-cell/>
          <table:table-cell office:value-type="string">
            <text:p>released</text:p>
          </table:table-cell>
          <table:table-cell office:value-type="string">
            <text:p>2022-06-07T08:31:38.289Z</text:p>
          </table:table-cell>
          <table:table-cell/>
          <table:table-cell office:value-type="string">
            <text:p>http://data.europa.eu/esco/concept-scheme/skills<text:line-break/>http://data.europa.eu/esco/concept-scheme/skills-hierarchy</text:p>
          </table:table-cell>
          <table:table-cell office:value-type="string">
            <text:p>Propagating, cultivating, pruning, caring for and harvesting plants and crops.</text:p>
          </table:table-cell>
          <table:table-cell office:value-type="string">
            <text:p>S6.4</text:p>
          </table:table-cell>
        </table:table-row>
        <table:table-row>
          <table:table-cell office:value-type="string">
            <text:p>SkillGroup</text:p>
          </table:table-cell>
          <table:table-cell office:value-type="string">
            <text:p>http://data.europa.eu/esco/skill/43f425aa-f45d-4bb4-a200-6f82fa211b66</text:p>
          </table:table-cell>
          <table:table-cell office:value-type="string">
            <text:p>languages</text:p>
          </table:table-cell>
          <table:table-cell table:number-columns-repeated="2"/>
          <table:table-cell office:value-type="string">
            <text:p>released</text:p>
          </table:table-cell>
          <table:table-cell office:value-type="string">
            <text:p>2024-02-15T09:52:57.87Z</text:p>
          </table:table-cell>
          <table:table-cell/>
          <table:table-cell office:value-type="string">
            <text:p>http://data.europa.eu/esco/concept-scheme/skills<text:line-break/>http://data.europa.eu/esco/concept-scheme/skills-hierarchy</text:p>
          </table:table-cell>
          <table:table-cell office:value-type="string">
            <text:p>Ability to communicate through reading, writing, speaking and listening in the mother tongue and/or in a foreign language.</text:p>
          </table:table-cell>
          <table:table-cell office:value-type="string">
            <text:p>L1</text:p>
          </table:table-cell>
        </table:table-row>
        <table:table-row>
          <table:table-cell office:value-type="string">
            <text:p>SkillGroup</text:p>
          </table:table-cell>
          <table:table-cell office:value-type="string">
            <text:p>http://data.europa.eu/esco/skill/446a36a5-2376-439f-b46b-4a214ba0acdf</text:p>
          </table:table-cell>
          <table:table-cell office:value-type="string">
            <text:p>using word processing, publishing and presentation software</text:p>
          </table:table-cell>
          <table:table-cell table:number-columns-repeated="2"/>
          <table:table-cell office:value-type="string">
            <text:p>released</text:p>
          </table:table-cell>
          <table:table-cell/>
          <table:table-cell office:value-type="string">
            <text:p>Excludes:<text:line-break/>- Computer programming<text:line-break/>- Resolving computer problems Examples:<text:line-break/>- Use word processing software<text:line-break/>- Use typesetting software.</text:p>
          </table:table-cell>
          <table:table-cell office:value-type="string">
            <text:p>http://data.europa.eu/esco/concept-scheme/skills<text:line-break/>http://data.europa.eu/esco/concept-scheme/skills-hierarchy</text:p>
          </table:table-cell>
          <table:table-cell office:value-type="string">
            <text:p>Using ICT software and hardware to develop and edit the content of documents and audio-visual and prepare them for publication.</text:p>
          </table:table-cell>
          <table:table-cell office:value-type="string">
            <text:p>S5.6.2</text:p>
          </table:table-cell>
        </table:table-row>
        <table:table-row>
          <table:table-cell office:value-type="string">
            <text:p>SkillGroup</text:p>
          </table:table-cell>
          <table:table-cell office:value-type="string">
            <text:p>http://data.europa.eu/esco/skill/44c81158-f789-41ad-a988-e8af0884a443</text:p>
          </table:table-cell>
          <table:table-cell office:value-type="string">
            <text:p>operating aircraft</text:p>
          </table:table-cell>
          <table:table-cell table:number-columns-repeated="2"/>
          <table:table-cell office:value-type="string">
            <text:p>released</text:p>
          </table:table-cell>
          <table:table-cell/>
          <table:table-cell office:value-type="string">
            <text:p>Examples:<text:line-break/>- Perform take-off and landing<text:line-break/>- Drive helicopter under emergency conditions<text:line-break/>- Operate cockpit control panels.</text:p>
          </table:table-cell>
          <table:table-cell office:value-type="string">
            <text:p>http://data.europa.eu/esco/concept-scheme/skills<text:line-break/>http://data.europa.eu/esco/concept-scheme/skills-hierarchy</text:p>
          </table:table-cell>
          <table:table-cell office:value-type="string">
            <text:p>Controlling the movement of aircraft, including fixed wing aircraft, helicopters and drones.</text:p>
          </table:table-cell>
          <table:table-cell office:value-type="string">
            <text:p>S8.9.0</text:p>
          </table:table-cell>
        </table:table-row>
        <table:table-row>
          <table:table-cell office:value-type="string">
            <text:p>SkillGroup</text:p>
          </table:table-cell>
          <table:table-cell office:value-type="string">
            <text:p>http://data.europa.eu/esco/skill/44ff6716-7d71-4a16-821b-61d10e9e290d</text:p>
          </table:table-cell>
          <table:table-cell office:value-type="string">
            <text:p>applying general knowledge</text:p>
          </table:table-cell>
          <table:table-cell office:value-type="string">
            <text:p>general education<text:line-break/>general knoweldge</text:p>
          </table:table-cell>
          <table:table-cell/>
          <table:table-cell office:value-type="string">
            <text:p>released</text:p>
          </table:table-cell>
          <table:table-cell office:value-type="string">
            <text:p>2021-08-30T16:55:23.01Z</text:p>
          </table:table-cell>
          <table:table-cell office:value-type="string">
            <text:p>Skills and competences includes under this heading can be acquired either as part of a formal qualification or in non-formal and informal settings.</text:p>
          </table:table-cell>
          <table:table-cell office:value-type="string">
            <text:p>http://data.europa.eu/esco/concept-scheme/skills<text:line-break/>http://data.europa.eu/esco/concept-scheme/skills-hierarchy<text:line-break/>http://data.europa.eu/esco/concept-scheme/skill-transversal-groups</text:p>
          </table:table-cell>
          <table:table-cell office:value-type="string">
            <text:p>Access and apply basic knowledge related to science, technology and engineering, to social sciences and humanities and to philosophy, ethics and religion.</text:p>
          </table:table-cell>
          <table:table-cell office:value-type="string">
            <text:p>T6.6</text:p>
          </table:table-cell>
        </table:table-row>
        <table:table-row>
          <table:table-cell office:value-type="string">
            <text:p>SkillGroup</text:p>
          </table:table-cell>
          <table:table-cell office:value-type="string">
            <text:p>http://data.europa.eu/esco/skill/45ce91d6-574f-445e-a3d5-741f89bddb56</text:p>
          </table:table-cell>
          <table:table-cell office:value-type="string">
            <text:p>maintaining mechanical equipment and tools</text:p>
          </table:table-cell>
          <table:table-cell table:number-columns-repeated="2"/>
          <table:table-cell office:value-type="string">
            <text:p>released</text:p>
          </table:table-cell>
          <table:table-cell office:value-type="string">
            <text:p>2024-01-25T10:29:47.559Z</text:p>
          </table:table-cell>
          <table:table-cell office:value-type="string">
            <text:p>Examples:<text:line-break/>- Maintain farm equipment<text:line-break/>- Prevent pipeline deterioration.</text:p>
          </table:table-cell>
          <table:table-cell office:value-type="string">
            <text:p>http://data.europa.eu/esco/concept-scheme/skills<text:line-break/>http://data.europa.eu/esco/concept-scheme/skills-hierarchy</text:p>
          </table:table-cell>
          <table:table-cell office:value-type="string">
            <text:p>Performing maintenance of mechanical equipment, tools and devices to ensure optimal functioning.</text:p>
          </table:table-cell>
          <table:table-cell office:value-type="string">
            <text:p>S8.7.2</text:p>
          </table:table-cell>
        </table:table-row>
        <table:table-row>
          <table:table-cell office:value-type="string">
            <text:p>SkillGroup</text:p>
          </table:table-cell>
          <table:table-cell office:value-type="string">
            <text:p>http://data.europa.eu/esco/skill/462f8805-3c0b-43c6-8bef-592b87939763</text:p>
          </table:table-cell>
          <table:table-cell office:value-type="string">
            <text:p>transforming and blending materials</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office:value-type="string">
            <text:p>Transforming materials from one form to another by mixing, blending, heating or chemical reaction, by hand or using handheld tools and equipment.</text:p>
          </table:table-cell>
          <table:table-cell office:value-type="string">
            <text:p>S6.3</text:p>
          </table:table-cell>
        </table:table-row>
        <table:table-row>
          <table:table-cell office:value-type="string">
            <text:p>SkillGroup</text:p>
          </table:table-cell>
          <table:table-cell office:value-type="string">
            <text:p>http://data.europa.eu/esco/skill/4781b6b1-07bc-44be-8c2d-de0fa5db4250</text:p>
          </table:table-cell>
          <table:table-cell office:value-type="string">
            <text:p>conducting gaming activities</text:p>
          </table:table-cell>
          <table:table-cell table:number-columns-repeated="2"/>
          <table:table-cell office:value-type="string">
            <text:p>released</text:p>
          </table:table-cell>
          <table:table-cell office:value-type="string">
            <text:p>2021-10-14T12:50:46.363Z</text:p>
          </table:table-cell>
          <table:table-cell office:value-type="string">
            <text:p>Examples:<text:line-break/>- conduct gambling games.</text:p>
          </table:table-cell>
          <table:table-cell office:value-type="string">
            <text:p>http://data.europa.eu/esco/concept-scheme/skills<text:line-break/>http://data.europa.eu/esco/concept-scheme/skills-hierarchy</text:p>
          </table:table-cell>
          <table:table-cell office:value-type="string">
            <text:p>Carrying out gaming operations in gambling establishments and participating in gambling games.</text:p>
          </table:table-cell>
          <table:table-cell office:value-type="string">
            <text:p>S1.14.3</text:p>
          </table:table-cell>
        </table:table-row>
        <table:table-row>
          <table:table-cell office:value-type="string">
            <text:p>SkillGroup</text:p>
          </table:table-cell>
          <table:table-cell office:value-type="string">
            <text:p>http://data.europa.eu/esco/skill/47aa582a-3edb-45b5-9ef4-e87813ea327c</text:p>
          </table:table-cell>
          <table:table-cell office:value-type="string">
            <text:p>testing vehicles</text:p>
          </table:table-cell>
          <table:table-cell table:number-columns-repeated="2"/>
          <table:table-cell office:value-type="string">
            <text:p>released</text:p>
          </table:table-cell>
          <table:table-cell office:value-type="string">
            <text:p>2022-06-19T15:45:14.266Z</text:p>
          </table:table-cell>
          <table:table-cell/>
          <table:table-cell office:value-type="string">
            <text:p>http://data.europa.eu/esco/concept-scheme/skills<text:line-break/>http://data.europa.eu/esco/concept-scheme/skills-hierarchy</text:p>
          </table:table-cell>
          <table:table-cell office:value-type="string">
            <text:p>Inspecting vehicles and other heavy machinery used for transport, such as cargos, cars and other vehicles.</text:p>
          </table:table-cell>
          <table:table-cell office:value-type="string">
            <text:p>S2.8.11</text:p>
          </table:table-cell>
        </table:table-row>
        <table:table-row>
          <table:table-cell office:value-type="string">
            <text:p>SkillGroup</text:p>
          </table:table-cell>
          <table:table-cell office:value-type="string">
            <text:p>http://data.europa.eu/esco/skill/47b0d855-ea3c-45e9-8dcf-0e12e62261c4</text:p>
          </table:table-cell>
          <table:table-cell office:value-type="string">
            <text:p>calculating and estimating</text:p>
          </table:table-cell>
          <table:table-cell table:number-columns-repeated="2"/>
          <table:table-cell office:value-type="string">
            <text:p>released</text:p>
          </table:table-cell>
          <table:table-cell office:value-type="string">
            <text:p>2023-01-27T10:09:02.926Z</text:p>
          </table:table-cell>
          <table:table-cell/>
          <table:table-cell office:value-type="string">
            <text:p>http://data.europa.eu/esco/concept-scheme/skills<text:line-break/>http://data.europa.eu/esco/concept-scheme/skills-hierarchy</text:p>
          </table:table-cell>
          <table:table-cell office:value-type="string">
            <text:p>Performing mathematical calculations and estimating the results of an action or a series of actions.</text:p>
          </table:table-cell>
          <table:table-cell office:value-type="string">
            <text:p>S2.6.0</text:p>
          </table:table-cell>
        </table:table-row>
        <table:table-row>
          <table:table-cell office:value-type="string">
            <text:p>SkillGroup</text:p>
          </table:table-cell>
          <table:table-cell office:value-type="string">
            <text:p>http://data.europa.eu/esco/skill/480a0b1b-aae9-4b39-9a4f-1c2b8ddcbc46</text:p>
          </table:table-cell>
          <table:table-cell office:value-type="string">
            <text:p>making production moulds and casts</text:p>
          </table:table-cell>
          <table:table-cell table:number-columns-repeated="2"/>
          <table:table-cell office:value-type="string">
            <text:p>released</text:p>
          </table:table-cell>
          <table:table-cell/>
          <table:table-cell office:value-type="string">
            <text:p>Excludes:<text:line-break/>- Operation of automated assembly equipment or machines<text:line-break/>- Pouring of concrete for construction of buildings Examples:<text:line-break/>- Modify casts for prostheses<text:line-break/>- Mould chocolate<text:line-break/>- Cast jewellery metal - Prevent casting adhesion.</text:p>
          </table:table-cell>
          <table:table-cell office:value-type="string">
            <text:p>http://data.europa.eu/esco/concept-scheme/skills<text:line-break/>http://data.europa.eu/esco/concept-scheme/skills-hierarchy</text:p>
          </table:table-cell>
          <table:table-cell office:value-type="string">
            <text:p>Constructing moulds for the manufacture of objects in various materials, and making casts by filling moulds with liquid materials for solidification.</text:p>
          </table:table-cell>
          <table:table-cell office:value-type="string">
            <text:p>S6.6.1</text:p>
          </table:table-cell>
        </table:table-row>
        <table:table-row>
          <table:table-cell office:value-type="string">
            <text:p>SkillGroup</text:p>
          </table:table-cell>
          <table:table-cell office:value-type="string">
            <text:p>http://data.europa.eu/esco/skill/485b2e3b-f883-46d8-901f-ab521d4f8e58</text:p>
          </table:table-cell>
          <table:table-cell office:value-type="string">
            <text:p>sorting materials or products</text:p>
          </table:table-cell>
          <table:table-cell table:number-columns-repeated="2"/>
          <table:table-cell office:value-type="string">
            <text:p>released</text:p>
          </table:table-cell>
          <table:table-cell office:value-type="string">
            <text:p>2023-01-24T18:49:41.387Z</text:p>
          </table:table-cell>
          <table:table-cell office:value-type="string">
            <text:p>Examples:<text:line-break/>- Differentiate types of packages<text:line-break/>- Sort waste.</text:p>
          </table:table-cell>
          <table:table-cell office:value-type="string">
            <text:p>http://data.europa.eu/esco/concept-scheme/skills<text:line-break/>http://data.europa.eu/esco/concept-scheme/skills-hierarchy</text:p>
          </table:table-cell>
          <table:table-cell office:value-type="string">
            <text:p>Arranging materials into predetermined categories or groups, according to established patterns of procedures.</text:p>
          </table:table-cell>
          <table:table-cell office:value-type="string">
            <text:p>S6.1.1</text:p>
          </table:table-cell>
        </table:table-row>
        <table:table-row>
          <table:table-cell office:value-type="string">
            <text:p>SkillGroup</text:p>
          </table:table-cell>
          <table:table-cell office:value-type="string">
            <text:p>http://data.europa.eu/esco/skill/494b8057-daf5-46a0-b33b-416e0115c30a</text:p>
          </table:table-cell>
          <table:table-cell office:value-type="string">
            <text:p>using digital tools to control machinery</text:p>
          </table:table-cell>
          <table:table-cell office:value-type="string">
            <text:p>controlling machinery with digital tools</text:p>
          </table:table-cell>
          <table:table-cell/>
          <table:table-cell office:value-type="string">
            <text:p>released</text:p>
          </table:table-cell>
          <table:table-cell/>
          <table:table-cell office:value-type="string">
            <text:p>Excludes:<text:line-break/>- Writing computer code and programmes<text:line-break/>- Resolving computer problems. Examples:<text:line-break/>- Enter commands, instructions, or specifications into CNC equipment<text:line-break/>- Set up the controls of a machine.</text:p>
          </table:table-cell>
          <table:table-cell office:value-type="string">
            <text:p>http://data.europa.eu/esco/concept-scheme/skills<text:line-break/>http://data.europa.eu/esco/concept-scheme/skills-hierarchy</text:p>
          </table:table-cell>
          <table:table-cell office:value-type="string">
            <text:p>Issuing commands to computer controlled machines and equipment by despatching the appropriate data and input.</text:p>
          </table:table-cell>
          <table:table-cell office:value-type="string">
            <text:p>S5.7.0</text:p>
          </table:table-cell>
        </table:table-row>
        <table:table-row>
          <table:table-cell office:value-type="string">
            <text:p>SkillGroup</text:p>
          </table:table-cell>
          <table:table-cell office:value-type="string">
            <text:p>http://data.europa.eu/esco/skill/4bbdc5eb-b710-4b76-816d-04926f7ac4a1</text:p>
          </table:table-cell>
          <table:table-cell office:value-type="string">
            <text:p>providing psychological and occupational therapies</text:p>
          </table:table-cell>
          <table:table-cell table:number-columns-repeated="2"/>
          <table:table-cell office:value-type="string">
            <text:p>released</text:p>
          </table:table-cell>
          <table:table-cell office:value-type="string">
            <text:p>2022-07-15T14:44:44.924Z</text:p>
          </table:table-cell>
          <table:table-cell office:value-type="string">
            <text:p>Examples:<text:line-break/>- apply psychoanalysis<text:line-break/>- use psychotherapeutic interventions<text:line-break/>- remediate healthcare user's occupational performance<text:line-break/>- apply music therapy treatment methods.</text:p>
          </table:table-cell>
          <table:table-cell office:value-type="string">
            <text:p>http://data.europa.eu/esco/concept-scheme/skills<text:line-break/>http://data.europa.eu/esco/concept-scheme/skills-hierarchy</text:p>
          </table:table-cell>
          <table:table-cell office:value-type="string">
            <text:p>Treating human health conditions through provision psychological and occupational, music or related therapies.</text:p>
          </table:table-cell>
          <table:table-cell office:value-type="string">
            <text:p>S3.2.4</text:p>
          </table:table-cell>
        </table:table-row>
        <table:table-row>
          <table:table-cell office:value-type="string">
            <text:p>SkillGroup</text:p>
          </table:table-cell>
          <table:table-cell office:value-type="string">
            <text:p>http://data.europa.eu/esco/skill/4d6a48ae-352e-4823-bc3a-3f3e9e2cae86</text:p>
          </table:table-cell>
          <table:table-cell office:value-type="string">
            <text:p>accessing and analysing digital data</text:p>
          </table:table-cell>
          <table:table-cell office:value-type="string">
            <text:p>managing digital information</text:p>
          </table:table-cell>
          <table:table-cell/>
          <table:table-cell office:value-type="string">
            <text:p>released</text:p>
          </table:table-cell>
          <table:table-cell office:value-type="string">
            <text:p>2021-09-24T16:38:38.771Z</text:p>
          </table:table-cell>
          <table:table-cell/>
          <table:table-cell office:value-type="string">
            <text:p>http://data.europa.eu/esco/concept-scheme/skills<text:line-break/>http://data.europa.eu/esco/concept-scheme/skills-hierarchy</text:p>
          </table:table-cell>
          <table:table-cell office:value-type="string">
            <text:p>Using digital tools to browse, search, filter, organise, store, retrieve, and analyse data, information and digital content, to collaborate and communicate with others, and create and edit new content.</text:p>
          </table:table-cell>
          <table:table-cell office:value-type="string">
            <text:p>S5.5.0</text:p>
          </table:table-cell>
        </table:table-row>
        <table:table-row>
          <table:table-cell office:value-type="string">
            <text:p>SkillGroup</text:p>
          </table:table-cell>
          <table:table-cell office:value-type="string">
            <text:p>http://data.europa.eu/esco/skill/4d7fb3eb-554a-4cf1-a576-bf6e153bdba2</text:p>
          </table:table-cell>
          <table:table-cell office:value-type="string">
            <text:p>using precision instrumentation and equipment</text:p>
          </table:table-cell>
          <table:table-cell table:number-columns-repeated="2"/>
          <table:table-cell office:value-type="string">
            <text:p>released</text:p>
          </table:table-cell>
          <table:table-cell/>
          <table:table-cell office:value-type="string">
            <text:p>Excludes:<text:line-break/>- Installing and setting up precision equipment.</text:p>
          </table:table-cell>
          <table:table-cell office:value-type="string">
            <text:p>http://data.europa.eu/esco/concept-scheme/skills<text:line-break/>http://data.europa.eu/esco/concept-scheme/skills-hierarchy</text:p>
          </table:table-cell>
          <table:table-cell office:value-type="string">
            <text:p>Controlling, monitoring, and adjusting precision instrumentation and equipment for a wide range of purposes.</text:p>
          </table:table-cell>
          <table:table-cell office:value-type="string">
            <text:p>S8.6</text:p>
          </table:table-cell>
        </table:table-row>
        <table:table-row>
          <table:table-cell office:value-type="string">
            <text:p>SkillGroup</text:p>
          </table:table-cell>
          <table:table-cell office:value-type="string">
            <text:p>http://data.europa.eu/esco/skill/4ef78abc-e983-4cc7-84a1-52532a0159dc</text:p>
          </table:table-cell>
          <table:table-cell office:value-type="string">
            <text:p>life skills and competences</text:p>
          </table:table-cell>
          <table:table-cell office:value-type="string">
            <text:p>active citizenship</text:p>
          </table:table-cell>
          <table:table-cell/>
          <table:table-cell office:value-type="string">
            <text:p>released</text:p>
          </table:table-cell>
          <table:table-cell office:value-type="string">
            <text:p>2021-08-30T09:47:58.442Z</text:p>
          </table:table-cell>
          <table:table-cell/>
          <table:table-cell office:value-type="string">
            <text:p>http://data.europa.eu/esco/concept-scheme/skills<text:line-break/>http://data.europa.eu/esco/concept-scheme/skills-hierarchy<text:line-break/>http://data.europa.eu/esco/concept-scheme/skill-transversal-groups</text:p>
          </table:table-cell>
          <table:table-cell office:value-type="string">
            <text:p>Skills and competences relating to the ability to process and use knowledge and information which has transversal significance and facilitates active citizenship. They comprise the areas of health, environment, civic engagement, culture, finance and the application of general knowledge.</text:p>
          </table:table-cell>
          <table:table-cell office:value-type="string">
            <text:p>T6</text:p>
          </table:table-cell>
        </table:table-row>
        <table:table-row>
          <table:table-cell office:value-type="string">
            <text:p>SkillGroup</text:p>
          </table:table-cell>
          <table:table-cell office:value-type="string">
            <text:p>http://data.europa.eu/esco/skill/4feed491-dc09-4218-814a-0146e13ef4fe</text:p>
          </table:table-cell>
          <table:table-cell office:value-type="string">
            <text:p>solving problems</text:p>
          </table:table-cell>
          <table:table-cell office:value-type="string">
            <text:p>problem solving</text:p>
          </table:table-cell>
          <table:table-cell/>
          <table:table-cell office:value-type="string">
            <text:p>released</text:p>
          </table:table-cell>
          <table:table-cell/>
          <table:table-cell office:value-type="string">
            <text:p>Excludes:<text:line-break/>- Repairing and resolving technical problems with machinery and equipment<text:line-break/>- Using ICT tools for problem solving.</text:p>
          </table:table-cell>
          <table:table-cell office:value-type="string">
            <text:p>http://data.europa.eu/esco/concept-scheme/skills<text:line-break/>http://data.europa.eu/esco/concept-scheme/skills-hierarchy</text:p>
          </table:table-cell>
          <table:table-cell office:value-type="string">
            <text:p>Developing and implementing solutions to practical, operational or conceptual problems which arise in the execution of work in a wide range of contexts.</text:p>
          </table:table-cell>
          <table:table-cell office:value-type="string">
            <text:p>S1.9.0</text:p>
          </table:table-cell>
        </table:table-row>
        <table:table-row>
          <table:table-cell office:value-type="string">
            <text:p>SkillGroup</text:p>
          </table:table-cell>
          <table:table-cell office:value-type="string">
            <text:p>http://data.europa.eu/esco/skill/50e42de7-4a5c-4f94-b160-765f547d840c</text:p>
          </table:table-cell>
          <table:table-cell office:value-type="string">
            <text:p>fitting assistive devices</text:p>
          </table:table-cell>
          <table:table-cell table:number-columns-repeated="2"/>
          <table:table-cell office:value-type="string">
            <text:p>released</text:p>
          </table:table-cell>
          <table:table-cell office:value-type="string">
            <text:p>2021-03-30T12:16:14.895Z</text:p>
          </table:table-cell>
          <table:table-cell office:value-type="string">
            <text:p>Examples:<text:line-break/>- tailor orthopaedic footwear Excludes:<text:line-break/>- veterinary care.</text:p>
          </table:table-cell>
          <table:table-cell office:value-type="string">
            <text:p>http://data.europa.eu/esco/concept-scheme/skills<text:line-break/>http://data.europa.eu/esco/concept-scheme/skills-hierarchy</text:p>
          </table:table-cell>
          <table:table-cell office:value-type="string">
            <text:p>Fitting assistive devices such as prostheses or orthotics to patients or clients.</text:p>
          </table:table-cell>
          <table:table-cell office:value-type="string">
            <text:p>S3.2.6</text:p>
          </table:table-cell>
        </table:table-row>
        <table:table-row>
          <table:table-cell office:value-type="string">
            <text:p>SkillGroup</text:p>
          </table:table-cell>
          <table:table-cell office:value-type="string">
            <text:p>http://data.europa.eu/esco/skill/51ffd92f-7ff4-4c38-83d4-7350fcfd6968</text:p>
          </table:table-cell>
          <table:table-cell office:value-type="string">
            <text:p>smoothing surfaces of objects or equipment</text:p>
          </table:table-cell>
          <table:table-cell table:number-columns-repeated="2"/>
          <table:table-cell office:value-type="string">
            <text:p>released</text:p>
          </table:table-cell>
          <table:table-cell/>
          <table:table-cell office:value-type="string">
            <text:p>Examples:<text:line-break/>- Smooth burred surfaces<text:line-break/>- Polish furniture.</text:p>
          </table:table-cell>
          <table:table-cell office:value-type="string">
            <text:p>http://data.europa.eu/esco/concept-scheme/skills<text:line-break/>http://data.europa.eu/esco/concept-scheme/skills-hierarchy</text:p>
          </table:table-cell>
          <table:table-cell office:value-type="string">
            <text:p>Creating smooth surfaces on various types of materials and employing techniques such as grinding, planing, sanding and polishing, using handheld tools.</text:p>
          </table:table-cell>
          <table:table-cell office:value-type="string">
            <text:p>S6.7.3</text:p>
          </table:table-cell>
        </table:table-row>
        <table:table-row>
          <table:table-cell office:value-type="string">
            <text:p>SkillGroup</text:p>
          </table:table-cell>
          <table:table-cell office:value-type="string">
            <text:p>http://data.europa.eu/esco/skill/528c2f16-139f-4a5b-8880-a6f02ed33f2a</text:p>
          </table:table-cell>
          <table:table-cell office:value-type="string">
            <text:p>fabricating garments and textile products</text:p>
          </table:table-cell>
          <table:table-cell table:number-columns-repeated="2"/>
          <table:table-cell office:value-type="string">
            <text:p>released</text:p>
          </table:table-cell>
          <table:table-cell office:value-type="string">
            <text:p>2020-12-07T14:51:41.895Z</text:p>
          </table:table-cell>
          <table:table-cell office:value-type="string">
            <text:p>Excludes:<text:line-break/>- Operation of automated assembly equipment<text:line-break/>- Fabrication of decorative objects Examples:<text:line-break/>- Alter wearing apparel<text:line-break/>- Manufacture male suits<text:line-break/>- Repair shoes<text:line-break/>- Sew curtains.</text:p>
          </table:table-cell>
          <table:table-cell office:value-type="string">
            <text:p>http://data.europa.eu/esco/concept-scheme/skills<text:line-break/>http://data.europa.eu/esco/concept-scheme/skills-hierarchy</text:p>
          </table:table-cell>
          <table:table-cell office:value-type="string">
            <text:p>Fabricating, altering and repairing garments and textile products by hand or using hand-held tools and equipment.</text:p>
          </table:table-cell>
          <table:table-cell office:value-type="string">
            <text:p>S6.5.6</text:p>
          </table:table-cell>
        </table:table-row>
        <table:table-row>
          <table:table-cell office:value-type="string">
            <text:p>SkillGroup</text:p>
          </table:table-cell>
          <table:table-cell office:value-type="string">
            <text:p>http://data.europa.eu/esco/skill/548c3fbe-9eb1-4035-bc54-027fd5bc5315</text:p>
          </table:table-cell>
          <table:table-cell office:value-type="string">
            <text:p>working with others</text:p>
          </table:table-cell>
          <table:table-cell table:number-columns-repeated="2"/>
          <table:table-cell office:value-type="string">
            <text:p>released</text:p>
          </table:table-cell>
          <table:table-cell office:value-type="string">
            <text:p>2021-04-15T08:15:36.624Z</text:p>
          </table:table-cell>
          <table:table-cell office:value-type="string">
            <text:p>Excludes:<text:line-break/>- Management, supervision and coordination of teams.</text:p>
          </table:table-cell>
          <table:table-cell office:value-type="string">
            <text:p>http://data.europa.eu/esco/concept-scheme/skills<text:line-break/>http://data.europa.eu/esco/concept-scheme/skills-hierarchy</text:p>
          </table:table-cell>
          <table:table-cell office:value-type="string">
            <text:p>Working with other people, understanding and respecting the roles and competencies of others.</text:p>
          </table:table-cell>
          <table:table-cell office:value-type="string">
            <text:p>S1.8</text:p>
          </table:table-cell>
        </table:table-row>
        <table:table-row>
          <table:table-cell office:value-type="string">
            <text:p>SkillGroup</text:p>
          </table:table-cell>
          <table:table-cell office:value-type="string">
            <text:p>http://data.europa.eu/esco/skill/54f7432d-a8b6-4ed4-a50e-9ec882320595</text:p>
          </table:table-cell>
          <table:table-cell office:value-type="string">
            <text:p>monitoring, inspecting and testing</text:p>
          </table:table-cell>
          <table:table-cell table:number-columns-repeated="2"/>
          <table:table-cell office:value-type="string">
            <text:p>released</text:p>
          </table:table-cell>
          <table:table-cell office:value-type="string">
            <text:p>2021-03-31T12:02:58.558Z</text:p>
          </table:table-cell>
          <table:table-cell/>
          <table:table-cell office:value-type="string">
            <text:p>http://data.europa.eu/esco/concept-scheme/skills<text:line-break/>http://data.europa.eu/esco/concept-scheme/skills-hierarchy</text:p>
          </table:table-cell>
          <table:table-cell office:value-type="string">
            <text:p>Examining and investigating problems, sites or objects to assess functioning or compliance with standards, laws or regulations.</text:p>
          </table:table-cell>
          <table:table-cell office:value-type="string">
            <text:p>S2.8.0</text:p>
          </table:table-cell>
        </table:table-row>
        <table:table-row>
          <table:table-cell office:value-type="string">
            <text:p>SkillGroup</text:p>
          </table:table-cell>
          <table:table-cell office:value-type="string">
            <text:p>http://data.europa.eu/esco/skill/552c4f35-a2d1-49c2-8fda-afe26695c44a</text:p>
          </table:table-cell>
          <table:table-cell office:value-type="string">
            <text:p>social and communication skills and competences</text:p>
          </table:table-cell>
          <table:table-cell office:value-type="string">
            <text:p>interpersonal skills<text:line-break/>social interaction<text:line-break/>social interactions<text:line-break/>interpersonal abilities<text:line-break/>social skills</text:p>
          </table:table-cell>
          <table:table-cell office:value-type="string">
            <text:p>enjoy dealing with people<text:line-break/>well-groomed manners<text:line-break/>enjoy interacting with people<text:line-break/>perfect manners<text:line-break/>friendly being<text:line-break/>neat apperance<text:line-break/>interaction with people<text:line-break/>ability to relate<text:line-break/>sympathetic demeanour<text:line-break/>sociability<text:line-break/>relationship orientation<text:line-break/>interact and present<text:line-break/>friendliness<text:line-break/>warm personality<text:line-break/>show respect and positive regard for others<text:line-break/>neat look<text:line-break/>respectful interaction with people<text:line-break/>customer service<text:line-break/>ability to establish contact<text:line-break/>contact ability<text:line-break/>be outgoing<text:line-break/>ability to interact<text:line-break/>polite manners<text:line-break/>socially competent<text:line-break/>support and cooperate<text:line-break/>pay attention to netiquette<text:line-break/>charismatic appearance<text:line-break/>excellent social skills<text:line-break/>pleasant manners</text:p>
          </table:table-cell>
          <table:table-cell office:value-type="string">
            <text:p>released</text:p>
          </table:table-cell>
          <table:table-cell office:value-type="string">
            <text:p>2021-08-30T09:00:34.189Z</text:p>
          </table:table-cell>
          <table:table-cell/>
          <table:table-cell office:value-type="string">
            <text:p>http://data.europa.eu/esco/concept-scheme/skills<text:line-break/>http://data.europa.eu/esco/concept-scheme/skills-hierarchy<text:line-break/>http://data.europa.eu/esco/concept-scheme/skill-transversal-groups</text:p>
          </table:table-cell>
          <table:table-cell office:value-type="string">
            <text:p>Skills and competences relating to the ability to interact positively and productively with others. This is demonstrated by communicating ideas effectively and empathetically, coordinating one’s own objectives and actions with those of others and acting in ways which are structured according to values, ensuring the well-being and progress of others, and offering leadership.</text:p>
          </table:table-cell>
          <table:table-cell office:value-type="string">
            <text:p>T4</text:p>
          </table:table-cell>
        </table:table-row>
        <table:table-row>
          <table:table-cell office:value-type="string">
            <text:p>SkillGroup</text:p>
          </table:table-cell>
          <table:table-cell office:value-type="string">
            <text:p>http://data.europa.eu/esco/skill/56c3ea4b-7cea-44da-969c-c21b07a55030</text:p>
          </table:table-cell>
          <table:table-cell office:value-type="string">
            <text:p>washing and maintaining textiles and clothing</text:p>
          </table:table-cell>
          <table:table-cell office:value-type="string">
            <text:p>maintaining textiles and clothing</text:p>
          </table:table-cell>
          <table:table-cell/>
          <table:table-cell office:value-type="string">
            <text:p>released</text:p>
          </table:table-cell>
          <table:table-cell/>
          <table:table-cell office:value-type="string">
            <text:p>Excludes:<text:line-break/>- Repairing or adjusting clothes Examples:<text:line-break/>- Iron textiles - Eliminate stains - Clean household linens.</text:p>
          </table:table-cell>
          <table:table-cell office:value-type="string">
            <text:p>http://data.europa.eu/esco/concept-scheme/skills<text:line-break/>http://data.europa.eu/esco/concept-scheme/skills-hierarchy</text:p>
          </table:table-cell>
          <table:table-cell office:value-type="string">
            <text:p>Washing or cleaning clothing and other textile products by hand or using a washing or laundry machine, maintaining textile items in good order.</text:p>
          </table:table-cell>
          <table:table-cell office:value-type="string">
            <text:p>S6.12</text:p>
          </table:table-cell>
        </table:table-row>
        <table:table-row>
          <table:table-cell office:value-type="string">
            <text:p>SkillGroup</text:p>
          </table:table-cell>
          <table:table-cell office:value-type="string">
            <text:p>http://data.europa.eu/esco/skill/57216e88-a0d3-4b8c-af6c-b8232b4f48c2</text:p>
          </table:table-cell>
          <table:table-cell office:value-type="string">
            <text:p>using precision hand tools</text:p>
          </table:table-cell>
          <table:table-cell table:number-columns-repeated="2"/>
          <table:table-cell office:value-type="string">
            <text:p>released</text:p>
          </table:table-cell>
          <table:table-cell/>
          <table:table-cell office:value-type="string">
            <text:p>Examples:<text:line-break/>- Use watchmaker's tools<text:line-break/>- Use jewellery equipment.</text:p>
          </table:table-cell>
          <table:table-cell office:value-type="string">
            <text:p>http://data.europa.eu/esco/concept-scheme/skills<text:line-break/>http://data.europa.eu/esco/concept-scheme/skills-hierarchy</text:p>
          </table:table-cell>
          <table:table-cell office:value-type="string">
            <text:p>Using hand-held electronic, mechanical, electric, or optical tools for precision work.</text:p>
          </table:table-cell>
          <table:table-cell office:value-type="string">
            <text:p>S6.7.4</text:p>
          </table:table-cell>
        </table:table-row>
        <table:table-row>
          <table:table-cell office:value-type="string">
            <text:p>SkillGroup</text:p>
          </table:table-cell>
          <table:table-cell office:value-type="string">
            <text:p>http://data.europa.eu/esco/skill/5770f630-9b25-49f3-9d37-e93ec1799749</text:p>
          </table:table-cell>
          <table:table-cell office:value-type="string">
            <text:p>teaching and training</text:p>
          </table:table-cell>
          <table:table-cell table:number-columns-repeated="2"/>
          <table:table-cell office:value-type="string">
            <text:p>released</text:p>
          </table:table-cell>
          <table:table-cell/>
          <table:table-cell office:value-type="string">
            <text:p>Excludes:<text:line-break/>- Training animals.</text:p>
          </table:table-cell>
          <table:table-cell office:value-type="string">
            <text:p>http://data.europa.eu/esco/concept-scheme/skills<text:line-break/>http://data.europa.eu/esco/concept-scheme/skills-hierarchy</text:p>
          </table:table-cell>
          <table:table-cell office:value-type="string">
            <text:p>Facilitating the acquisition of new knowledge and skills. Leading and guiding individuals and groups through a process in which they are taught the necessary skills and knowledge for life, future learning or for a particular job or set of jobs.</text:p>
          </table:table-cell>
          <table:table-cell office:value-type="string">
            <text:p>S1.3</text:p>
          </table:table-cell>
        </table:table-row>
        <table:table-row>
          <table:table-cell office:value-type="string">
            <text:p>SkillGroup</text:p>
          </table:table-cell>
          <table:table-cell office:value-type="string">
            <text:p>http://data.europa.eu/esco/skill/577ce84f-0d21-4f25-8307-99c53f6f8437</text:p>
          </table:table-cell>
          <table:table-cell office:value-type="string">
            <text:p>moving and lifting</text:p>
          </table:table-cell>
          <table:table-cell table:number-columns-repeated="2"/>
          <table:table-cell office:value-type="string">
            <text:p>released</text:p>
          </table:table-cell>
          <table:table-cell office:value-type="string">
            <text:p>2022-08-24T13:51:21.612Z</text:p>
          </table:table-cell>
          <table:table-cell office:value-type="string">
            <text:p>Excludes:<text:line-break/>- Specific skills involving lifting and moving people and animals<text:line-break/>- Operation of machinery other than hand-held equipment.</text:p>
          </table:table-cell>
          <table:table-cell office:value-type="string">
            <text:p>http://data.europa.eu/esco/concept-scheme/skills<text:line-break/>http://data.europa.eu/esco/concept-scheme/skills-hierarchy</text:p>
          </table:table-cell>
          <table:table-cell office:value-type="string">
            <text:p>Performing physical activities to move, load, unload or store objects or to climb structures, by hand or with the aid of equipment.</text:p>
          </table:table-cell>
          <table:table-cell office:value-type="string">
            <text:p>S6.2.0</text:p>
          </table:table-cell>
        </table:table-row>
        <table:table-row>
          <table:table-cell office:value-type="string">
            <text:p>SkillGroup</text:p>
          </table:table-cell>
          <table:table-cell office:value-type="string">
            <text:p>http://data.europa.eu/esco/skill/57a45369-afc1-4f5a-b157-6f18de506bab</text:p>
          </table:table-cell>
          <table:table-cell office:value-type="string">
            <text:p>constructing</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office:value-type="string">
            <text:p>Building, repairing, installing and finishing interior and exterior structures.</text:p>
          </table:table-cell>
          <table:table-cell office:value-type="string">
            <text:p>S7.0</text:p>
          </table:table-cell>
        </table:table-row>
        <table:table-row>
          <table:table-cell office:value-type="string">
            <text:p>SkillGroup</text:p>
          </table:table-cell>
          <table:table-cell office:value-type="string">
            <text:p>http://data.europa.eu/esco/skill/57e6af87-8a6b-4ecb-88e5-7c80b582ddd7</text:p>
          </table:table-cell>
          <table:table-cell office:value-type="string">
            <text:p>using precision instrumentation and equipment</text:p>
          </table:table-cell>
          <table:table-cell table:number-columns-repeated="2"/>
          <table:table-cell office:value-type="string">
            <text:p>released</text:p>
          </table:table-cell>
          <table:table-cell office:value-type="string">
            <text:p>2022-06-19T15:45:14.266Z</text:p>
          </table:table-cell>
          <table:table-cell office:value-type="string">
            <text:p>Excludes:<text:line-break/>- Installing and setting up precision equipment.</text:p>
          </table:table-cell>
          <table:table-cell office:value-type="string">
            <text:p>http://data.europa.eu/esco/concept-scheme/skills<text:line-break/>http://data.europa.eu/esco/concept-scheme/skills-hierarchy</text:p>
          </table:table-cell>
          <table:table-cell office:value-type="string">
            <text:p>Controlling, monitoring, and adjusting precision instrumentation and equipment for a wide range of purposes.</text:p>
          </table:table-cell>
          <table:table-cell office:value-type="string">
            <text:p>S8.6.0</text:p>
          </table:table-cell>
        </table:table-row>
        <table:table-row>
          <table:table-cell office:value-type="string">
            <text:p>SkillGroup</text:p>
          </table:table-cell>
          <table:table-cell office:value-type="string">
            <text:p>http://data.europa.eu/esco/skill/583b1fb5-be8d-41f0-aa81-0b6bef4793c2</text:p>
          </table:table-cell>
          <table:table-cell office:value-type="string">
            <text:p>installing plumbing or piping equipment or systems</text:p>
          </table:table-cell>
          <table:table-cell table:number-columns-repeated="2"/>
          <table:table-cell office:value-type="string">
            <text:p>released</text:p>
          </table:table-cell>
          <table:table-cell/>
          <table:table-cell office:value-type="string">
            <text:p>Examples:<text:line-break/>- Install fire sprinklers<text:line-break/>- Install metal gas piping<text:line-break/>- Repair plumbing systems.</text:p>
          </table:table-cell>
          <table:table-cell office:value-type="string">
            <text:p>http://data.europa.eu/esco/concept-scheme/skills<text:line-break/>http://data.europa.eu/esco/concept-scheme/skills-hierarchy</text:p>
          </table:table-cell>
          <table:table-cell office:value-type="string">
            <text:p>Installing plumbing or piping equipment or systems.</text:p>
          </table:table-cell>
          <table:table-cell office:value-type="string">
            <text:p>S7.2.2</text:p>
          </table:table-cell>
        </table:table-row>
        <table:table-row>
          <table:table-cell office:value-type="string">
            <text:p>SkillGroup</text:p>
          </table:table-cell>
          <table:table-cell office:value-type="string">
            <text:p>http://data.europa.eu/esco/skill/587e1cd6-a376-4c8f-8369-187c128d72a3</text:p>
          </table:table-cell>
          <table:table-cell office:value-type="string">
            <text:p>processing information</text:p>
          </table:table-cell>
          <table:table-cell table:number-columns-repeated="2"/>
          <table:table-cell office:value-type="string">
            <text:p>released</text:p>
          </table:table-cell>
          <table:table-cell/>
          <table:table-cell office:value-type="string">
            <text:p>Excludes:<text:line-break/>- Skills in the use of specific ICT tools to process data.</text:p>
          </table:table-cell>
          <table:table-cell office:value-type="string">
            <text:p>http://data.europa.eu/esco/concept-scheme/skills<text:line-break/>http://data.europa.eu/esco/concept-scheme/skills-hierarchy</text:p>
          </table:table-cell>
          <table:table-cell office:value-type="string">
            <text:p>Inputting, recording, transcribing and updating data using electronic or manual information systems.</text:p>
          </table:table-cell>
          <table:table-cell office:value-type="string">
            <text:p>S2.4</text:p>
          </table:table-cell>
        </table:table-row>
        <table:table-row>
          <table:table-cell office:value-type="string">
            <text:p>SkillGroup</text:p>
          </table:table-cell>
          <table:table-cell office:value-type="string">
            <text:p>http://data.europa.eu/esco/skill/58bd927f-e4cc-4b61-a679-cb91b3f8075a</text:p>
          </table:table-cell>
          <table:table-cell office:value-type="string">
            <text:p>following instructions and procedures</text:p>
          </table:table-cell>
          <table:table-cell table:number-columns-repeated="2"/>
          <table:table-cell office:value-type="string">
            <text:p>released</text:p>
          </table:table-cell>
          <table:table-cell office:value-type="string">
            <text:p>2022-06-19T15:45:14.266Z</text:p>
          </table:table-cell>
          <table:table-cell office:value-type="string">
            <text:p>Examples:<text:line-break/>- follow a brief<text:line-break/>- follow signalling instructions<text:line-break/>- read job ticket instructions.</text:p>
          </table:table-cell>
          <table:table-cell office:value-type="string">
            <text:p>http://data.europa.eu/esco/concept-scheme/skills<text:line-break/>http://data.europa.eu/esco/concept-scheme/skills-hierarchy</text:p>
          </table:table-cell>
          <table:table-cell office:value-type="string">
            <text:p>Following instructions given verbally or in writing and following standard or agreed procedures.</text:p>
          </table:table-cell>
          <table:table-cell office:value-type="string">
            <text:p>S1.8.5</text:p>
          </table:table-cell>
        </table:table-row>
        <table:table-row>
          <table:table-cell office:value-type="string">
            <text:p>SkillGroup</text:p>
          </table:table-cell>
          <table:table-cell office:value-type="string">
            <text:p>http://data.europa.eu/esco/skill/58beed15-8cf0-4bea-a24a-ad595768bba6</text:p>
          </table:table-cell>
          <table:table-cell office:value-type="string">
            <text:p>building and repairing structures</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office:value-type="string">
            <text:p>Forming, shaping and joining materials to form structures such as buildings, bridges, or underground mines according to specifications and plans.</text:p>
          </table:table-cell>
          <table:table-cell office:value-type="string">
            <text:p>S7.1.0</text:p>
          </table:table-cell>
        </table:table-row>
        <table:table-row>
          <table:table-cell office:value-type="string">
            <text:p>SkillGroup</text:p>
          </table:table-cell>
          <table:table-cell office:value-type="string">
            <text:p>http://data.europa.eu/esco/skill/58edb789-d085-4e7d-8b6e-b70913bebfca</text:p>
          </table:table-cell>
          <table:table-cell office:value-type="string">
            <text:p>installing and assembling building fixtures</text:p>
          </table:table-cell>
          <table:table-cell table:number-columns-repeated="2"/>
          <table:table-cell office:value-type="string">
            <text:p>released</text:p>
          </table:table-cell>
          <table:table-cell/>
          <table:table-cell office:value-type="string">
            <text:p>Examples:<text:line-break/>- Install handrail<text:line-break/>- Place drywall<text:line-break/>- Install drop ceilings.</text:p>
          </table:table-cell>
          <table:table-cell office:value-type="string">
            <text:p>http://data.europa.eu/esco/concept-scheme/skills<text:line-break/>http://data.europa.eu/esco/concept-scheme/skills-hierarchy</text:p>
          </table:table-cell>
          <table:table-cell office:value-type="string">
            <text:p>Installing, assembling or constructing building fixtures such as drywall, doors, windows and staircases.</text:p>
          </table:table-cell>
          <table:table-cell office:value-type="string">
            <text:p>S7.1.7</text:p>
          </table:table-cell>
        </table:table-row>
        <table:table-row>
          <table:table-cell office:value-type="string">
            <text:p>SkillGroup</text:p>
          </table:table-cell>
          <table:table-cell office:value-type="string">
            <text:p>http://data.europa.eu/esco/skill/592525ab-b517-4c55-8c65-17e0f5d99205</text:p>
          </table:table-cell>
          <table:table-cell office:value-type="string">
            <text:p>assembling electrical and electronic products</text:p>
          </table:table-cell>
          <table:table-cell table:number-columns-repeated="2"/>
          <table:table-cell office:value-type="string">
            <text:p>released</text:p>
          </table:table-cell>
          <table:table-cell office:value-type="string">
            <text:p>2023-07-13T15:25:18.372Z</text:p>
          </table:table-cell>
          <table:table-cell office:value-type="string">
            <text:p>Excludes:<text:line-break/>- Operation of automated assembly equipment<text:line-break/>- Installation, repair and maintenance of devices<text:line-break/>- Fabrication of decorative objects - Fabrication of medical, orthotic and prosthetic devices Examples:<text:line-break/>- Assemble mechatronic devices<text:line-break/>- Assemble electrical components.</text:p>
          </table:table-cell>
          <table:table-cell office:value-type="string">
            <text:p>http://data.europa.eu/esco/concept-scheme/skills<text:line-break/>http://data.europa.eu/esco/concept-scheme/skills-hierarchy</text:p>
          </table:table-cell>
          <table:table-cell office:value-type="string">
            <text:p>Assembling electrical and electronic products, excluding medical or prosthetic devices, by hand or using hand-held tools and equipment.</text:p>
          </table:table-cell>
          <table:table-cell office:value-type="string">
            <text:p>S6.5.3</text:p>
          </table:table-cell>
        </table:table-row>
        <table:table-row>
          <table:table-cell office:value-type="string">
            <text:p>SkillGroup</text:p>
          </table:table-cell>
          <table:table-cell office:value-type="string">
            <text:p>http://data.europa.eu/esco/skill/59c46f34-bffd-4859-adf4-3839c2a73821</text:p>
          </table:table-cell>
          <table:table-cell office:value-type="string">
            <text:p>constructing</text:p>
          </table:table-cell>
          <table:table-cell table:number-columns-repeated="2"/>
          <table:table-cell office:value-type="string">
            <text:p>released</text:p>
          </table:table-cell>
          <table:table-cell office:value-type="string">
            <text:p>2020-12-10T13:23:35.251Z</text:p>
          </table:table-cell>
          <table:table-cell/>
          <table:table-cell office:value-type="string">
            <text:p>http://data.europa.eu/esco/concept-scheme/skills<text:line-break/>http://data.europa.eu/esco/concept-scheme/skills-hierarchy</text:p>
          </table:table-cell>
          <table:table-cell office:value-type="string">
            <text:p>Building, repairing, installing and finishing interior and exterior structures.</text:p>
          </table:table-cell>
          <table:table-cell office:value-type="string">
            <text:p>S7.0.0</text:p>
          </table:table-cell>
        </table:table-row>
        <table:table-row>
          <table:table-cell office:value-type="string">
            <text:p>SkillGroup</text:p>
          </table:table-cell>
          <table:table-cell office:value-type="string">
            <text:p>http://data.europa.eu/esco/skill/5bcec244-3efe-45ac-8891-0ab4a91e9c48</text:p>
          </table:table-cell>
          <table:table-cell office:value-type="string">
            <text:p>complying with health and safety procedures</text:p>
          </table:table-cell>
          <table:table-cell table:number-columns-repeated="2"/>
          <table:table-cell office:value-type="string">
            <text:p>released</text:p>
          </table:table-cell>
          <table:table-cell office:value-type="string">
            <text:p>2023-02-21T20:59:45.769Z</text:p>
          </table:table-cell>
          <table:table-cell office:value-type="string">
            <text:p>Examples:<text:line-break/>- follow hygienic work practices<text:line-break/>- use personal protection equipment<text:line-break/>- protect health and well-being while using digital technologies Excludes:<text:line-break/>- attend to personal hygiene.</text:p>
          </table:table-cell>
          <table:table-cell office:value-type="string">
            <text:p>http://data.europa.eu/esco/concept-scheme/skills<text:line-break/>http://data.europa.eu/esco/concept-scheme/skills-hierarchy</text:p>
          </table:table-cell>
          <table:table-cell office:value-type="string">
            <text:p>Ensuring compliance to rules, standards, guidelines laws or good practices relating to the health and safety of oneself, co-workers, employees and the public.</text:p>
          </table:table-cell>
          <table:table-cell office:value-type="string">
            <text:p>S3.3.1</text:p>
          </table:table-cell>
        </table:table-row>
        <table:table-row>
          <table:table-cell office:value-type="string">
            <text:p>SkillGroup</text:p>
          </table:table-cell>
          <table:table-cell office:value-type="string">
            <text:p>http://data.europa.eu/esco/skill/5c26881e-2759-4a38-b136-5e0f6071b524</text:p>
          </table:table-cell>
          <table:table-cell office:value-type="string">
            <text:p>organising, planning and scheduling work and activities</text:p>
          </table:table-cell>
          <table:table-cell office:value-type="string">
            <text:p>organising and planning</text:p>
          </table:table-cell>
          <table:table-cell/>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office:value-type="string">
            <text:p>Directing activities and tasks, establishing schedules and co-ordinating the activities of groups and individuals to complete objectives on time and within budget.</text:p>
          </table:table-cell>
          <table:table-cell office:value-type="string">
            <text:p>S4.2</text:p>
          </table:table-cell>
        </table:table-row>
        <table:table-row>
          <table:table-cell office:value-type="string">
            <text:p>SkillGroup</text:p>
          </table:table-cell>
          <table:table-cell office:value-type="string">
            <text:p>http://data.europa.eu/esco/skill/5c2d5780-23ed-4372-bb8d-c1846ee404ae</text:p>
          </table:table-cell>
          <table:table-cell office:value-type="string">
            <text:p>monitoring financial and economic resources and activity</text:p>
          </table:table-cell>
          <table:table-cell table:number-columns-repeated="2"/>
          <table:table-cell office:value-type="string">
            <text:p>released</text:p>
          </table:table-cell>
          <table:table-cell/>
          <table:table-cell office:value-type="string">
            <text:p>Excludes:<text:line-break/>- Testing and analysing substances Examples:<text:line-break/>- Monitor production costs<text:line-break/>- Monitor financial accounts<text:line-break/>- Monitor bond markets.</text:p>
          </table:table-cell>
          <table:table-cell office:value-type="string">
            <text:p>http://data.europa.eu/esco/concept-scheme/skills<text:line-break/>http://data.europa.eu/esco/concept-scheme/skills-hierarchy</text:p>
          </table:table-cell>
          <table:table-cell office:value-type="string">
            <text:p>Monitor parameters to maintain awareness of levels of financial resources and expenditure, stocks, and the economic environment.</text:p>
          </table:table-cell>
          <table:table-cell office:value-type="string">
            <text:p>S2.8.3</text:p>
          </table:table-cell>
        </table:table-row>
        <table:table-row>
          <table:table-cell office:value-type="string">
            <text:p>SkillGroup</text:p>
          </table:table-cell>
          <table:table-cell office:value-type="string">
            <text:p>http://data.europa.eu/esco/skill/5d1d2d04-5510-4918-a437-7f57d570483a</text:p>
          </table:table-cell>
          <table:table-cell office:value-type="string">
            <text:p>installing roofing</text:p>
          </table:table-cell>
          <table:table-cell table:number-columns-repeated="2"/>
          <table:table-cell office:value-type="string">
            <text:p>released</text:p>
          </table:table-cell>
          <table:table-cell/>
          <table:table-cell office:value-type="string">
            <text:p>Examples:<text:line-break/>- Install metal roofing<text:line-break/>- Install gutters<text:line-break/>- Attach roofing cover.</text:p>
          </table:table-cell>
          <table:table-cell office:value-type="string">
            <text:p>http://data.europa.eu/esco/concept-scheme/skills<text:line-break/>http://data.europa.eu/esco/concept-scheme/skills-hierarchy</text:p>
          </table:table-cell>
          <table:table-cell office:value-type="string">
            <text:p>Constructing, installing and maintaining roofs and gutters.</text:p>
          </table:table-cell>
          <table:table-cell office:value-type="string">
            <text:p>S7.1.5</text:p>
          </table:table-cell>
        </table:table-row>
        <table:table-row>
          <table:table-cell office:value-type="string">
            <text:p>SkillGroup</text:p>
          </table:table-cell>
          <table:table-cell office:value-type="string">
            <text:p>http://data.europa.eu/esco/skill/5dbb69d2-9e1b-4e0f-b8c0-0bac709729cf</text:p>
          </table:table-cell>
          <table:table-cell office:value-type="string">
            <text:p>weighing</text:p>
          </table:table-cell>
          <table:table-cell table:number-columns-repeated="2"/>
          <table:table-cell office:value-type="string">
            <text:p>released</text:p>
          </table:table-cell>
          <table:table-cell/>
          <table:table-cell office:value-type="string">
            <text:p>Examples:<text:line-break/>- weigh merchandise.</text:p>
          </table:table-cell>
          <table:table-cell office:value-type="string">
            <text:p>http://data.europa.eu/esco/concept-scheme/skills<text:line-break/>http://data.europa.eu/esco/concept-scheme/skills-hierarchy</text:p>
          </table:table-cell>
          <table:table-cell office:value-type="string">
            <text:p>Measuring the weight of objects and people.</text:p>
          </table:table-cell>
          <table:table-cell office:value-type="string">
            <text:p>S2.5.2</text:p>
          </table:table-cell>
        </table:table-row>
        <table:table-row>
          <table:table-cell office:value-type="string">
            <text:p>SkillGroup</text:p>
          </table:table-cell>
          <table:table-cell office:value-type="string">
            <text:p>http://data.europa.eu/esco/skill/5ea47148-5289-49f2-80f8-bb1f54b37de0</text:p>
          </table:table-cell>
          <table:table-cell office:value-type="string">
            <text:p>applying protective or decorative solutions or coatings</text:p>
          </table:table-cell>
          <table:table-cell table:number-columns-repeated="2"/>
          <table:table-cell office:value-type="string">
            <text:p>released</text:p>
          </table:table-cell>
          <table:table-cell/>
          <table:table-cell office:value-type="string">
            <text:p>Examples:<text:line-break/>- Paint surfaces - Hang wallpaper.</text:p>
          </table:table-cell>
          <table:table-cell office:value-type="string">
            <text:p>http://data.europa.eu/esco/concept-scheme/skills<text:line-break/>http://data.europa.eu/esco/concept-scheme/skills-hierarchy</text:p>
          </table:table-cell>
          <table:table-cell office:value-type="string">
            <text:p>Applying paint, lacquer, wallpaper or other coatings to surfaces or objects using brushes, rollers, paint spray guns or similar equipment.</text:p>
          </table:table-cell>
          <table:table-cell office:value-type="string">
            <text:p>S7.3.3</text:p>
          </table:table-cell>
        </table:table-row>
        <table:table-row>
          <table:table-cell office:value-type="string">
            <text:p>SkillGroup</text:p>
          </table:table-cell>
          <table:table-cell office:value-type="string">
            <text:p>http://data.europa.eu/esco/skill/5f92ff3e-288b-44aa-864d-5ebb1adb7925</text:p>
          </table:table-cell>
          <table:table-cell office:value-type="string">
            <text:p>styling hair and providing beauty treatments</text:p>
          </table:table-cell>
          <table:table-cell table:number-columns-repeated="2"/>
          <table:table-cell office:value-type="string">
            <text:p>released</text:p>
          </table:table-cell>
          <table:table-cell/>
          <table:table-cell office:value-type="string">
            <text:p>Examples:<text:line-break/>- apply nail polish<text:line-break/>- use hair removal techniques.</text:p>
          </table:table-cell>
          <table:table-cell office:value-type="string">
            <text:p>http://data.europa.eu/esco/concept-scheme/skills<text:line-break/>http://data.europa.eu/esco/concept-scheme/skills-hierarchy</text:p>
          </table:table-cell>
          <table:table-cell office:value-type="string">
            <text:p>Grooming, styling or removing hair, applying make-up and providing beauty treatments, to meet the appearance desired by clients or required for the purposes such as theatrical performance.</text:p>
          </table:table-cell>
          <table:table-cell office:value-type="string">
            <text:p>S3.6.4</text:p>
          </table:table-cell>
        </table:table-row>
        <table:table-row>
          <table:table-cell office:value-type="string">
            <text:p>SkillGroup</text:p>
          </table:table-cell>
          <table:table-cell office:value-type="string">
            <text:p>http://data.europa.eu/esco/skill/6107b01a-3dac-4a03-ac9c-1044e4af0307</text:p>
          </table:table-cell>
          <table:table-cell office:value-type="string">
            <text:p>counselling</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office:value-type="string">
            <text:p>Responding to clients' needs by interpreting their emotional and motivational states, and determining and providing appropriate support or interventions.</text:p>
          </table:table-cell>
          <table:table-cell office:value-type="string">
            <text:p>S3.1</text:p>
          </table:table-cell>
        </table:table-row>
        <table:table-row>
          <table:table-cell office:value-type="string">
            <text:p>SkillGroup</text:p>
          </table:table-cell>
          <table:table-cell office:value-type="string">
            <text:p>http://data.europa.eu/esco/skill/6115ff80-3d84-4e87-8e2b-6ede7ee004b4</text:p>
          </table:table-cell>
          <table:table-cell office:value-type="string">
            <text:p>applying cultural skills and competences</text:p>
          </table:table-cell>
          <table:table-cell office:value-type="string">
            <text:p>appreciating and expressing cultural, artistic or musical concepts</text:p>
          </table:table-cell>
          <table:table-cell/>
          <table:table-cell office:value-type="string">
            <text:p>released</text:p>
          </table:table-cell>
          <table:table-cell office:value-type="string">
            <text:p>2021-08-30T16:54:02.907Z</text:p>
          </table:table-cell>
          <table:table-cell office:value-type="string">
            <text:p>Creativity and respecting diversity underpin the skills and competences under this heading.</text:p>
          </table:table-cell>
          <table:table-cell office:value-type="string">
            <text:p>http://data.europa.eu/esco/concept-scheme/skills<text:line-break/>http://data.europa.eu/esco/concept-scheme/skills-hierarchy<text:line-break/>http://data.europa.eu/esco/concept-scheme/skill-transversal-groups</text:p>
          </table:table-cell>
          <table:table-cell office:value-type="string">
            <text:p>Express and interpret ideas, experiences and emotions creatively. Adopt an openness to learning from different cultural and artistic expressions.</text:p>
          </table:table-cell>
          <table:table-cell office:value-type="string">
            <text:p>T6.4</text:p>
          </table:table-cell>
        </table:table-row>
        <table:table-row>
          <table:table-cell office:value-type="string">
            <text:p>SkillGroup</text:p>
          </table:table-cell>
          <table:table-cell office:value-type="string">
            <text:p>http://data.europa.eu/esco/skill/61d1dab2-6007-4b7c-9380-cd88207fa30f</text:p>
          </table:table-cell>
          <table:table-cell office:value-type="string">
            <text:p>disposing of non-hazardous waste or debris</text:p>
          </table:table-cell>
          <table:table-cell table:number-columns-repeated="2"/>
          <table:table-cell office:value-type="string">
            <text:p>released</text:p>
          </table:table-cell>
          <table:table-cell office:value-type="string">
            <text:p>2020-12-10T16:56:34.388Z</text:p>
          </table:table-cell>
          <table:table-cell office:value-type="string">
            <text:p>Examples:<text:line-break/>- Handle fish harvesting waste - Collect domestic waste.</text:p>
          </table:table-cell>
          <table:table-cell office:value-type="string">
            <text:p>http://data.europa.eu/esco/concept-scheme/skills<text:line-break/>http://data.europa.eu/esco/concept-scheme/skills-hierarchy</text:p>
          </table:table-cell>
          <table:table-cell office:value-type="string">
            <text:p>Collecting and disposing of unwanted non-hazardous materials according to established waste management procedures.</text:p>
          </table:table-cell>
          <table:table-cell office:value-type="string">
            <text:p>S6.13.2</text:p>
          </table:table-cell>
        </table:table-row>
        <table:table-row>
          <table:table-cell office:value-type="string">
            <text:p>SkillGroup</text:p>
          </table:table-cell>
          <table:table-cell office:value-type="string">
            <text:p>http://data.europa.eu/esco/skill/62023d5b-22ea-442e-ac46-39eb83c986fb</text:p>
          </table:table-cell>
          <table:table-cell office:value-type="string">
            <text:p>assembling furniture</text:p>
          </table:table-cell>
          <table:table-cell table:number-columns-repeated="2"/>
          <table:table-cell office:value-type="string">
            <text:p>released</text:p>
          </table:table-cell>
          <table:table-cell/>
          <table:table-cell office:value-type="string">
            <text:p>Excludes:<text:line-break/>- Operation of automated assembly equipment<text:line-break/>- Fabrication of decorative objects Examples:<text:line-break/>- Assemble prefabricated furniture<text:line-break/>- Repair furniture frames.</text:p>
          </table:table-cell>
          <table:table-cell office:value-type="string">
            <text:p>http://data.europa.eu/esco/concept-scheme/skills<text:line-break/>http://data.europa.eu/esco/concept-scheme/skills-hierarchy</text:p>
          </table:table-cell>
          <table:table-cell office:value-type="string">
            <text:p>Assembling and repairing furniture by hand or using hand-held tools and equipment.</text:p>
          </table:table-cell>
          <table:table-cell office:value-type="string">
            <text:p>S6.5.5</text:p>
          </table:table-cell>
        </table:table-row>
        <table:table-row>
          <table:table-cell office:value-type="string">
            <text:p>SkillGroup</text:p>
          </table:table-cell>
          <table:table-cell office:value-type="string">
            <text:p>http://data.europa.eu/esco/skill/62afcfdd-a2a6-4143-bafb-59c77e15a01c</text:p>
          </table:table-cell>
          <table:table-cell office:value-type="string">
            <text:p>advising on products and services</text:p>
          </table:table-cell>
          <table:table-cell table:number-columns-repeated="2"/>
          <table:table-cell office:value-type="string">
            <text:p>released</text:p>
          </table:table-cell>
          <table:table-cell office:value-type="string">
            <text:p>2023-01-24T19:03:05.231Z</text:p>
          </table:table-cell>
          <table:table-cell office:value-type="string">
            <text:p>Examples:<text:line-break/>- advise customers on new equipment<text:line-break/>- provide advice on travel destinations.</text:p>
          </table:table-cell>
          <table:table-cell office:value-type="string">
            <text:p>http://data.europa.eu/esco/concept-scheme/skills<text:line-break/>http://data.europa.eu/esco/concept-scheme/skills-hierarchy</text:p>
          </table:table-cell>
          <table:table-cell office:value-type="string">
            <text:p>Advising others on products or services explaining technical details.</text:p>
          </table:table-cell>
          <table:table-cell office:value-type="string">
            <text:p>S1.5.3</text:p>
          </table:table-cell>
        </table:table-row>
        <table:table-row>
          <table:table-cell office:value-type="string">
            <text:p>SkillGroup</text:p>
          </table:table-cell>
          <table:table-cell office:value-type="string">
            <text:p>http://data.europa.eu/esco/skill/64acded2-d944-4f85-a703-cfe9375f706a</text:p>
          </table:table-cell>
          <table:table-cell office:value-type="string">
            <text:p>operating agricultural or forestry equipment</text:p>
          </table:table-cell>
          <table:table-cell table:number-columns-repeated="2"/>
          <table:table-cell office:value-type="string">
            <text:p>released</text:p>
          </table:table-cell>
          <table:table-cell/>
          <table:table-cell office:value-type="string">
            <text:p>Examples:<text:line-break/>- Operate agricultural machinery<text:line-break/>- Operate tractor<text:line-break/>- Operate forestry machinery.</text:p>
          </table:table-cell>
          <table:table-cell office:value-type="string">
            <text:p>http://data.europa.eu/esco/concept-scheme/skills<text:line-break/>http://data.europa.eu/esco/concept-scheme/skills-hierarchy</text:p>
          </table:table-cell>
          <table:table-cell office:value-type="string">
            <text:p>Operating mobile equipment specifically designed for agricultural or forestry purposes, such as cultivating land or harvesting crops and trees.</text:p>
          </table:table-cell>
          <table:table-cell office:value-type="string">
            <text:p>S8.1.2</text:p>
          </table:table-cell>
        </table:table-row>
        <table:table-row>
          <table:table-cell office:value-type="string">
            <text:p>SkillGroup</text:p>
          </table:table-cell>
          <table:table-cell office:value-type="string">
            <text:p>http://data.europa.eu/esco/skill/64aeee4d-3791-4448-8ed8-9b49ad04f2fb</text:p>
          </table:table-cell>
          <table:table-cell office:value-type="string">
            <text:p>translating and interpreting</text:p>
          </table:table-cell>
          <table:table-cell table:number-columns-repeated="2"/>
          <table:table-cell office:value-type="string">
            <text:p>released</text:p>
          </table:table-cell>
          <table:table-cell office:value-type="string">
            <text:p>2021-09-20T12:11:22.451Z</text:p>
          </table:table-cell>
          <table:table-cell office:value-type="string">
            <text:p>Examples:<text:line-break/>- translate spoken language<text:line-break/>- translate texts<text:line-break/>- interpret languages in conferences Excludes:<text:line-break/>- skills and knowledge related to a specific language or dialect.</text:p>
          </table:table-cell>
          <table:table-cell office:value-type="string">
            <text:p>http://data.europa.eu/esco/concept-scheme/skills<text:line-break/>http://data.europa.eu/esco/concept-scheme/skills-hierarchy</text:p>
          </table:table-cell>
          <table:table-cell office:value-type="string">
            <text:p>Translate one language into another language in written or spoken form. Match words and expressions with their corresponding brothers in other languages, while making sure that the message and nuances of the original text are preserved.</text:p>
          </table:table-cell>
          <table:table-cell office:value-type="string">
            <text:p>S1.15.2</text:p>
          </table:table-cell>
        </table:table-row>
        <table:table-row>
          <table:table-cell office:value-type="string">
            <text:p>SkillGroup</text:p>
          </table:table-cell>
          <table:table-cell office:value-type="string">
            <text:p>http://data.europa.eu/esco/skill/663d82aa-4c0d-46bc-90f5-03770f068bb1</text:p>
          </table:table-cell>
          <table:table-cell office:value-type="string">
            <text:p>driving vehicles</text:p>
          </table:table-cell>
          <table:table-cell table:number-columns-repeated="2"/>
          <table:table-cell office:value-type="string">
            <text:p>released</text:p>
          </table:table-cell>
          <table:table-cell/>
          <table:table-cell office:value-type="string">
            <text:p>Includes driving vehicles on and off road capabilities whose purpose is the transportation of goods or people Examples:<text:line-break/>- Drive at high speed.</text:p>
          </table:table-cell>
          <table:table-cell office:value-type="string">
            <text:p>http://data.europa.eu/esco/concept-scheme/skills<text:line-break/>http://data.europa.eu/esco/concept-scheme/skills-hierarchy</text:p>
          </table:table-cell>
          <table:table-cell office:value-type="string">
            <text:p>Driving vehicles on or off road, such as motorcycles, cars, vans, trucks and buses, for the transportation of goods or people by road.</text:p>
          </table:table-cell>
          <table:table-cell office:value-type="string">
            <text:p>S8.2</text:p>
          </table:table-cell>
        </table:table-row>
        <table:table-row>
          <table:table-cell office:value-type="string">
            <text:p>SkillGroup</text:p>
          </table:table-cell>
          <table:table-cell office:value-type="string">
            <text:p>http://data.europa.eu/esco/skill/663e753c-2fc4-4bf6-9a06-a6ab2d705238</text:p>
          </table:table-cell>
          <table:table-cell office:value-type="string">
            <text:p>purchasing goods or services</text:p>
          </table:table-cell>
          <table:table-cell table:number-columns-repeated="2"/>
          <table:table-cell office:value-type="string">
            <text:p>released</text:p>
          </table:table-cell>
          <table:table-cell office:value-type="string">
            <text:p>2022-06-19T15:06:42.666Z</text:p>
          </table:table-cell>
          <table:table-cell office:value-type="string">
            <text:p>Excludes:<text:line-break/>- Performing financial transactions Examples:<text:line-break/>- Buy advertising space<text:line-break/>- Order construction supplies<text:line-break/>- Procure electrical machinery<text:line-break/>- Purchase fruits and vegetables.</text:p>
          </table:table-cell>
          <table:table-cell office:value-type="string">
            <text:p>http://data.europa.eu/esco/concept-scheme/skills<text:line-break/>http://data.europa.eu/esco/concept-scheme/skills-hierarchy</text:p>
          </table:table-cell>
          <table:table-cell office:value-type="string">
            <text:p>Buying and ordering goods, services and supplies.</text:p>
          </table:table-cell>
          <table:table-cell office:value-type="string">
            <text:p>S1.6.3</text:p>
          </table:table-cell>
        </table:table-row>
        <table:table-row>
          <table:table-cell office:value-type="string">
            <text:p>SkillGroup</text:p>
          </table:table-cell>
          <table:table-cell office:value-type="string">
            <text:p>http://data.europa.eu/esco/skill/66fdc34c-2326-4baa-b8ff-7a1d1015fe3a</text:p>
          </table:table-cell>
          <table:table-cell office:value-type="string">
            <text:p>planning and organising</text:p>
          </table:table-cell>
          <table:table-cell office:value-type="string">
            <text:p>organisational skills<text:line-break/>work planning<text:line-break/>planning skills<text:line-break/>planning activities<text:line-break/>planning abilities</text:p>
          </table:table-cell>
          <table:table-cell office:value-type="string">
            <text:p>planning thinking</text:p>
          </table:table-cell>
          <table:table-cell office:value-type="string">
            <text:p>released</text:p>
          </table:table-cell>
          <table:table-cell office:value-type="string">
            <text:p>2021-08-30T14:01:57.38Z</text:p>
          </table:table-cell>
          <table:table-cell/>
          <table:table-cell office:value-type="string">
            <text:p>http://data.europa.eu/esco/concept-scheme/skills<text:line-break/>http://data.europa.eu/esco/concept-scheme/skills-hierarchy<text:line-break/>http://data.europa.eu/esco/concept-scheme/skill-transversal-groups</text:p>
          </table:table-cell>
          <table:table-cell office:value-type="string">
            <text:p>Direct activities and tasks, establish schedules and coordinate the activities of groups and individuals to complete objectives on time and within budget.</text:p>
          </table:table-cell>
          <table:table-cell office:value-type="string">
            <text:p>T2.2</text:p>
          </table:table-cell>
        </table:table-row>
        <table:table-row>
          <table:table-cell office:value-type="string">
            <text:p>SkillGroup</text:p>
          </table:table-cell>
          <table:table-cell office:value-type="string">
            <text:p>http://data.europa.eu/esco/skill/682bb7ca-dbe9-4c33-9c7a-1ae56e28516e</text:p>
          </table:table-cell>
          <table:table-cell office:value-type="string">
            <text:p>loading and unloading goods and, materials</text:p>
          </table:table-cell>
          <table:table-cell table:number-columns-repeated="2"/>
          <table:table-cell office:value-type="string">
            <text:p>released</text:p>
          </table:table-cell>
          <table:table-cell office:value-type="string">
            <text:p>2023-01-27T11:01:49.53Z</text:p>
          </table:table-cell>
          <table:table-cell office:value-type="string">
            <text:p>Excludes:<text:line-break/>- Operation of machinery other than hand-held equipment Examples:<text:line-break/>- Stow cargo<text:line-break/>- Secure cargo on ships<text:line-break/>- Unload supplies.</text:p>
          </table:table-cell>
          <table:table-cell office:value-type="string">
            <text:p>http://data.europa.eu/esco/concept-scheme/skills<text:line-break/>http://data.europa.eu/esco/concept-scheme/skills-hierarchy</text:p>
          </table:table-cell>
          <table:table-cell office:value-type="string">
            <text:p>Loading, securing or unloading products, materials, or equipment for transportation, storage or further processing by hand or using hand-held or manually operated equipment.</text:p>
          </table:table-cell>
          <table:table-cell office:value-type="string">
            <text:p>S6.2.1</text:p>
          </table:table-cell>
        </table:table-row>
        <table:table-row>
          <table:table-cell office:value-type="string">
            <text:p>SkillGroup</text:p>
          </table:table-cell>
          <table:table-cell office:value-type="string">
            <text:p>http://data.europa.eu/esco/skill/6889a21c-837b-49a2-be61-bb6010ab63f4</text:p>
          </table:table-cell>
          <table:table-cell office:value-type="string">
            <text:p>obtaining information verbally</text:p>
          </table:table-cell>
          <table:table-cell office:value-type="string">
            <text:p>verbal interaction</text:p>
          </table:table-cell>
          <table:table-cell/>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office:value-type="string">
            <text:p>Asking questions and listening to others to obtain information.</text:p>
          </table:table-cell>
          <table:table-cell office:value-type="string">
            <text:p>S1.7</text:p>
          </table:table-cell>
        </table:table-row>
        <table:table-row>
          <table:table-cell office:value-type="string">
            <text:p>SkillGroup</text:p>
          </table:table-cell>
          <table:table-cell office:value-type="string">
            <text:p>http://data.europa.eu/esco/skill/6a7fc30d-af16-4cc5-a957-29d174bdb61c</text:p>
          </table:table-cell>
          <table:table-cell office:value-type="string">
            <text:p>managing, gathering and storing digital data</text:p>
          </table:table-cell>
          <table:table-cell table:number-columns-repeated="2"/>
          <table:table-cell office:value-type="string">
            <text:p>released</text:p>
          </table:table-cell>
          <table:table-cell office:value-type="string">
            <text:p>2023-10-27T16:10:20.781Z</text:p>
          </table:table-cell>
          <table:table-cell office:value-type="string">
            <text:p>Examples:<text:line-break/>- Create digital files - Digitise documents<text:line-break/>- Use spreadsheet software<text:line-break/>- Perform data cleansing.</text:p>
          </table:table-cell>
          <table:table-cell office:value-type="string">
            <text:p>http://data.europa.eu/esco/concept-scheme/skills<text:line-break/>http://data.europa.eu/esco/concept-scheme/skills-hierarchy</text:p>
          </table:table-cell>
          <table:table-cell office:value-type="string">
            <text:p>Using digital tools to organise, gather, store, retrieve, and archive data, information and digital content.</text:p>
          </table:table-cell>
          <table:table-cell office:value-type="string">
            <text:p>S5.5.2</text:p>
          </table:table-cell>
        </table:table-row>
        <table:table-row>
          <table:table-cell office:value-type="string">
            <text:p>SkillGroup</text:p>
          </table:table-cell>
          <table:table-cell office:value-type="string">
            <text:p>http://data.europa.eu/esco/skill/6c4fa8c8-e9e1-49b5-897f-6b61fe649488</text:p>
          </table:table-cell>
          <table:table-cell office:value-type="string">
            <text:p>training on operational procedures</text:p>
          </table:table-cell>
          <table:table-cell table:number-columns-repeated="2"/>
          <table:table-cell office:value-type="string">
            <text:p>released</text:p>
          </table:table-cell>
          <table:table-cell office:value-type="string">
            <text:p>2023-06-20T13:39:25.098Z</text:p>
          </table:table-cell>
          <table:table-cell office:value-type="string">
            <text:p>Examples:<text:line-break/>- teach air cabin crew procedures<text:line-break/>- train operators in using mine machinery<text:line-break/>- demonstrate functionality of software products Excludes:<text:line-break/>- teaching vocational subjects as part of formal learning<text:line-break/>- teaching safety procedures and standards<text:line-break/>- coaching.</text:p>
          </table:table-cell>
          <table:table-cell office:value-type="string">
            <text:p>http://data.europa.eu/esco/concept-scheme/skills<text:line-break/>http://data.europa.eu/esco/concept-scheme/skills-hierarchy</text:p>
          </table:table-cell>
          <table:table-cell office:value-type="string">
            <text:p>Training employees, students or clients on operational procedures in the work place or and demonstrating the use of equipment or products.</text:p>
          </table:table-cell>
          <table:table-cell office:value-type="string">
            <text:p>S1.3.3</text:p>
          </table:table-cell>
        </table:table-row>
        <table:table-row>
          <table:table-cell office:value-type="string">
            <text:p>SkillGroup</text:p>
          </table:table-cell>
          <table:table-cell office:value-type="string">
            <text:p>http://data.europa.eu/esco/skill/6c6957bf-cf1f-4483-9c7e-1655f251b01a</text:p>
          </table:table-cell>
          <table:table-cell office:value-type="string">
            <text:p>applying entrepreneurial and financial skills and competences</text:p>
          </table:table-cell>
          <table:table-cell office:value-type="string">
            <text:p>financial and entrepreneurial literacy</text:p>
          </table:table-cell>
          <table:table-cell/>
          <table:table-cell office:value-type="string">
            <text:p>released</text:p>
          </table:table-cell>
          <table:table-cell office:value-type="string">
            <text:p>2021-08-30T16:54:20.061Z</text:p>
          </table:table-cell>
          <table:table-cell/>
          <table:table-cell office:value-type="string">
            <text:p>http://data.europa.eu/esco/concept-scheme/skills<text:line-break/>http://data.europa.eu/esco/concept-scheme/skills-hierarchy<text:line-break/>http://data.europa.eu/esco/concept-scheme/skill-transversal-groups</text:p>
          </table:table-cell>
          <table:table-cell office:value-type="string">
            <text:p>Manage own and others finances and resources. Demonstrate perseverance, openness to opportunity and risks, the ability to mobilize resources and willingness to learn from experience.</text:p>
          </table:table-cell>
          <table:table-cell office:value-type="string">
            <text:p>T6.5</text:p>
          </table:table-cell>
        </table:table-row>
        <table:table-row>
          <table:table-cell office:value-type="string">
            <text:p>SkillGroup</text:p>
          </table:table-cell>
          <table:table-cell office:value-type="string">
            <text:p>http://data.europa.eu/esco/skill/6d0cad66-82dd-4854-a03a-68232942c68d</text:p>
          </table:table-cell>
          <table:table-cell office:value-type="string">
            <text:p>installing wooden and metal components</text:p>
          </table:table-cell>
          <table:table-cell table:number-columns-repeated="2"/>
          <table:table-cell office:value-type="string">
            <text:p>released</text:p>
          </table:table-cell>
          <table:table-cell office:value-type="string">
            <text:p>2023-03-16T15:33:50.175Z</text:p>
          </table:table-cell>
          <table:table-cell office:value-type="string">
            <text:p>Examples:<text:line-break/>- Assemble truss constructions<text:line-break/>- Reinforce concrete Excludes:<text:line-break/>- Installing metal roofing.</text:p>
          </table:table-cell>
          <table:table-cell office:value-type="string">
            <text:p>http://data.europa.eu/esco/concept-scheme/skills<text:line-break/>http://data.europa.eu/esco/concept-scheme/skills-hierarchy</text:p>
          </table:table-cell>
          <table:table-cell office:value-type="string">
            <text:p>Installing, assembling and repairing structural timber or metal parts.</text:p>
          </table:table-cell>
          <table:table-cell office:value-type="string">
            <text:p>S7.1.2</text:p>
          </table:table-cell>
        </table:table-row>
        <table:table-row>
          <table:table-cell office:value-type="string">
            <text:p>SkillGroup</text:p>
          </table:table-cell>
          <table:table-cell office:value-type="string">
            <text:p>http://data.europa.eu/esco/skill/6d535249-ac7c-4e44-8ada-09305c3a3900</text:p>
          </table:table-cell>
          <table:table-cell office:value-type="string">
            <text:p>making moulds, casts, models and patterns</text:p>
          </table:table-cell>
          <table:table-cell table:number-columns-repeated="2"/>
          <table:table-cell office:value-type="string">
            <text:p>released</text:p>
          </table:table-cell>
          <table:table-cell/>
          <table:table-cell office:value-type="string">
            <text:p>Excludes:<text:line-break/>- Operation of automated assembly equipment or machines<text:line-break/>- Repair of building structures and mechanical, electrical, electronic products and components.</text:p>
          </table:table-cell>
          <table:table-cell office:value-type="string">
            <text:p>http://data.europa.eu/esco/concept-scheme/skills<text:line-break/>http://data.europa.eu/esco/concept-scheme/skills-hierarchy</text:p>
          </table:table-cell>
          <table:table-cell office:value-type="string">
            <text:p>Making moulds, casts and two-dimensional patterns or templates and making three-dimensional models of products.</text:p>
          </table:table-cell>
          <table:table-cell office:value-type="string">
            <text:p>S6.6.0</text:p>
          </table:table-cell>
        </table:table-row>
        <table:table-row>
          <table:table-cell office:value-type="string">
            <text:p>SkillGroup</text:p>
          </table:table-cell>
          <table:table-cell office:value-type="string">
            <text:p>http://data.europa.eu/esco/skill/6e62e776-fbfa-486c-a6df-58cd239c86fe</text:p>
          </table:table-cell>
          <table:table-cell office:value-type="string">
            <text:p>technical or academic writing</text:p>
          </table:table-cell>
          <table:table-cell table:number-columns-repeated="2"/>
          <table:table-cell office:value-type="string">
            <text:p>released</text:p>
          </table:table-cell>
          <table:table-cell office:value-type="string">
            <text:p>2022-06-19T15:45:14.266Z</text:p>
          </table:table-cell>
          <table:table-cell office:value-type="string">
            <text:p>Examples:<text:line-break/>- write manuals<text:line-break/>- draft legislation<text:line-break/>- provide user documentation Excludes:<text:line-break/>- revise translations<text:line-break/>- write computer programmes / coding.</text:p>
          </table:table-cell>
          <table:table-cell office:value-type="string">
            <text:p>http://data.europa.eu/esco/concept-scheme/skills<text:line-break/>http://data.europa.eu/esco/concept-scheme/skills-hierarchy</text:p>
          </table:table-cell>
          <table:table-cell office:value-type="string">
            <text:p>Writing original text of a primarily functional, technical or academic nature; editing text.</text:p>
          </table:table-cell>
          <table:table-cell office:value-type="string">
            <text:p>S1.13.3</text:p>
          </table:table-cell>
        </table:table-row>
        <table:table-row>
          <table:table-cell office:value-type="string">
            <text:p>SkillGroup</text:p>
          </table:table-cell>
          <table:table-cell office:value-type="string">
            <text:p>http://data.europa.eu/esco/skill/6ee936b0-4e0c-4e04-97c7-1f4ee9230d67</text:p>
          </table:table-cell>
          <table:table-cell office:value-type="string">
            <text:p>developing objectives and strategies</text:p>
          </table:table-cell>
          <table:table-cell office:value-type="string">
            <text:p>strategic planning</text:p>
          </table:table-cell>
          <table:table-cell/>
          <table:table-cell office:value-type="string">
            <text:p>released</text:p>
          </table:table-cell>
          <table:table-cell office:value-type="string">
            <text:p>2020-12-11T09:19:59.825Z</text:p>
          </table:table-cell>
          <table:table-cell/>
          <table:table-cell office:value-type="string">
            <text:p>http://data.europa.eu/esco/concept-scheme/skills<text:line-break/>http://data.europa.eu/esco/concept-scheme/skills-hierarchy</text:p>
          </table:table-cell>
          <table:table-cell office:value-type="string">
            <text:p>Envisioning a future state and developing strategies, goals, objectives and action plans to achieve it.</text:p>
          </table:table-cell>
          <table:table-cell office:value-type="string">
            <text:p>S4.1.0</text:p>
          </table:table-cell>
        </table:table-row>
        <table:table-row>
          <table:table-cell office:value-type="string">
            <text:p>SkillGroup</text:p>
          </table:table-cell>
          <table:table-cell office:value-type="string">
            <text:p>http://data.europa.eu/esco/skill/6f142deb-03a9-4cd7-94ce-e0f023ae2169</text:p>
          </table:table-cell>
          <table:table-cell office:value-type="string">
            <text:p>communicating</text:p>
          </table:table-cell>
          <table:table-cell office:value-type="string">
            <text:p>communication<text:line-break/>using language, symbols and text effectively<text:line-break/>communication skills<text:line-break/>verbal skils<text:line-break/>argumentation skills<text:line-break/>writing skills<text:line-break/>conversational skills</text:p>
          </table:table-cell>
          <table:table-cell office:value-type="string">
            <text:p>able to communicate<text:line-break/>communicate ideas and information effectively in writing<text:line-break/>communications Style<text:line-break/>lead conversations confidently<text:line-break/>written expression<text:line-break/>written communication</text:p>
          </table:table-cell>
          <table:table-cell office:value-type="string">
            <text:p>released</text:p>
          </table:table-cell>
          <table:table-cell office:value-type="string">
            <text:p>2021-08-30T16:23:39.992Z</text:p>
          </table:table-cell>
          <table:table-cell/>
          <table:table-cell office:value-type="string">
            <text:p>http://data.europa.eu/esco/concept-scheme/skills<text:line-break/>http://data.europa.eu/esco/concept-scheme/skills-hierarchy<text:line-break/>http://data.europa.eu/esco/concept-scheme/skill-transversal-groups</text:p>
          </table:table-cell>
          <table:table-cell office:value-type="string">
            <text:p>Express and exchange information, ideas, concepts, thoughts, and feelings, and resolve disagreements in formal and informal contexts, through the use of shared systems of words, signs, and rules.</text:p>
          </table:table-cell>
          <table:table-cell office:value-type="string">
            <text:p>T4.1</text:p>
          </table:table-cell>
        </table:table-row>
        <table:table-row>
          <table:table-cell office:value-type="string">
            <text:p>SkillGroup</text:p>
          </table:table-cell>
          <table:table-cell office:value-type="string">
            <text:p>http://data.europa.eu/esco/skill/6f89dcbe-4315-4533-8801-3aadf9190b86</text:p>
          </table:table-cell>
          <table:table-cell office:value-type="string">
            <text:p>developing objectives and strategies</text:p>
          </table:table-cell>
          <table:table-cell office:value-type="string">
            <text:p>strategic planning</text:p>
          </table:table-cell>
          <table:table-cell/>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office:value-type="string">
            <text:p>Envisioning a future state and developing strategies, goals, objectives and action plans to achieve it.</text:p>
          </table:table-cell>
          <table:table-cell office:value-type="string">
            <text:p>S4.1</text:p>
          </table:table-cell>
        </table:table-row>
        <table:table-row>
          <table:table-cell office:value-type="string">
            <text:p>SkillGroup</text:p>
          </table:table-cell>
          <table:table-cell office:value-type="string">
            <text:p>http://data.europa.eu/esco/skill/70ac2c90-656a-4fa3-886c-5b9305db2087</text:p>
          </table:table-cell>
          <table:table-cell office:value-type="string">
            <text:p>processing information</text:p>
          </table:table-cell>
          <table:table-cell table:number-columns-repeated="2"/>
          <table:table-cell office:value-type="string">
            <text:p>released</text:p>
          </table:table-cell>
          <table:table-cell office:value-type="string">
            <text:p>2021-12-17T12:48:25.958Z</text:p>
          </table:table-cell>
          <table:table-cell office:value-type="string">
            <text:p>Excludes:<text:line-break/>- Skills in the use of specific ICT tools to process data.</text:p>
          </table:table-cell>
          <table:table-cell office:value-type="string">
            <text:p>http://data.europa.eu/esco/concept-scheme/skills<text:line-break/>http://data.europa.eu/esco/concept-scheme/skills-hierarchy</text:p>
          </table:table-cell>
          <table:table-cell office:value-type="string">
            <text:p>Inputting, recording, transcribing and updating data using electronic or manual information systems.</text:p>
          </table:table-cell>
          <table:table-cell office:value-type="string">
            <text:p>S2.4.0</text:p>
          </table:table-cell>
        </table:table-row>
        <table:table-row>
          <table:table-cell office:value-type="string">
            <text:p>SkillGroup</text:p>
          </table:table-cell>
          <table:table-cell office:value-type="string">
            <text:p>http://data.europa.eu/esco/skill/7194cdea-bca7-4c4a-8d49-3cb54b89d5a0</text:p>
          </table:table-cell>
          <table:table-cell office:value-type="string">
            <text:p>providing therapy or veterinary treatment for animals</text:p>
          </table:table-cell>
          <table:table-cell table:number-columns-repeated="2"/>
          <table:table-cell office:value-type="string">
            <text:p>released</text:p>
          </table:table-cell>
          <table:table-cell office:value-type="string">
            <text:p>2023-02-22T20:06:32.497Z</text:p>
          </table:table-cell>
          <table:table-cell office:value-type="string">
            <text:p>Examples:<text:line-break/>- Perform surgical procedures on animals<text:line-break/>- Perform artificial insemination - Manage care of veterinary patients in accommodation<text:line-break/>- Trim bovine hooves.</text:p>
          </table:table-cell>
          <table:table-cell office:value-type="string">
            <text:p>http://data.europa.eu/esco/concept-scheme/skills<text:line-break/>http://data.europa.eu/esco/concept-scheme/skills-hierarchy</text:p>
          </table:table-cell>
          <table:table-cell office:value-type="string">
            <text:p>Diagnosing and treating health conditions in animals and providing veterinary services such as artificial insemination and implanting microchips.</text:p>
          </table:table-cell>
          <table:table-cell office:value-type="string">
            <text:p>S6.9.7</text:p>
          </table:table-cell>
        </table:table-row>
        <table:table-row>
          <table:table-cell office:value-type="string">
            <text:p>SkillGroup</text:p>
          </table:table-cell>
          <table:table-cell office:value-type="string">
            <text:p>http://data.europa.eu/esco/skill/72fe5d9f-4ec8-4fc4-b1d3-0dd83be0aa1a</text:p>
          </table:table-cell>
          <table:table-cell office:value-type="string">
            <text:p>cutting materials and drilling holes</text:p>
          </table:table-cell>
          <table:table-cell table:number-columns-repeated="2"/>
          <table:table-cell office:value-type="string">
            <text:p>released</text:p>
          </table:table-cell>
          <table:table-cell/>
          <table:table-cell office:value-type="string">
            <text:p>Excludes:<text:line-break/>- Cutting or pruning trees or other live plants<text:line-break/>- Surgical procedures on humans and animals Examples:<text:line-break/>- Cut carpet<text:line-break/>- Drill holes in tile.</text:p>
          </table:table-cell>
          <table:table-cell office:value-type="string">
            <text:p>http://data.europa.eu/esco/concept-scheme/skills<text:line-break/>http://data.europa.eu/esco/concept-scheme/skills-hierarchy</text:p>
          </table:table-cell>
          <table:table-cell office:value-type="string">
            <text:p>Cutting various types of materials using handheld tools and equipment.</text:p>
          </table:table-cell>
          <table:table-cell office:value-type="string">
            <text:p>S6.7.1</text:p>
          </table:table-cell>
        </table:table-row>
        <table:table-row>
          <table:table-cell office:value-type="string">
            <text:p>SkillGroup</text:p>
          </table:table-cell>
          <table:table-cell office:value-type="string">
            <text:p>http://data.europa.eu/esco/skill/73dba04a-7c18-439f-8757-b5f60532ba74</text:p>
          </table:table-cell>
          <table:table-cell office:value-type="string">
            <text:p>recruiting and hiring</text:p>
          </table:table-cell>
          <table:table-cell office:value-type="string">
            <text:p>recruiting</text:p>
          </table:table-cell>
          <table:table-cell/>
          <table:table-cell office:value-type="string">
            <text:p>released</text:p>
          </table:table-cell>
          <table:table-cell/>
          <table:table-cell office:value-type="string">
            <text:p>Excludes:<text:line-break/>- Interviewing candidates Examples:<text:line-break/>- Recruit employees<text:line-break/>- Carry out auditions.</text:p>
          </table:table-cell>
          <table:table-cell office:value-type="string">
            <text:p>http://data.europa.eu/esco/concept-scheme/skills<text:line-break/>http://data.europa.eu/esco/concept-scheme/skills-hierarchy</text:p>
          </table:table-cell>
          <table:table-cell office:value-type="string">
            <text:p>Acquiring the right talent to achieve the organization's mission.</text:p>
          </table:table-cell>
          <table:table-cell office:value-type="string">
            <text:p>S4.7</text:p>
          </table:table-cell>
        </table:table-row>
        <table:table-row>
          <table:table-cell office:value-type="string">
            <text:p>SkillGroup</text:p>
          </table:table-cell>
          <table:table-cell office:value-type="string">
            <text:p>http://data.europa.eu/esco/skill/73e602a0-f80f-4f56-8e21-3db4fd08709d</text:p>
          </table:table-cell>
          <table:table-cell office:value-type="string">
            <text:p>providing medical, dental and nursing care</text:p>
          </table:table-cell>
          <table:table-cell table:number-columns-repeated="2"/>
          <table:table-cell office:value-type="string">
            <text:p>released</text:p>
          </table:table-cell>
          <table:table-cell office:value-type="string">
            <text:p>2023-11-06T13:40:22.277Z</text:p>
          </table:table-cell>
          <table:table-cell office:value-type="string">
            <text:p>Examples:<text:line-break/>- provide professional care in nursing<text:line-break/>- administer prescribed medication<text:line-break/>- carry out wound care<text:line-break/>- manage acute pain<text:line-break/>- rehabilitate worn dentition Excludes:<text:line-break/>- veterinary care<text:line-break/>- performing surgery<text:line-break/>- physiotherapy<text:line-break/>- occupational therapy<text:line-break/>- psychotherapy.</text:p>
          </table:table-cell>
          <table:table-cell office:value-type="string">
            <text:p>http://data.europa.eu/esco/concept-scheme/skills<text:line-break/>http://data.europa.eu/esco/concept-scheme/skills-hierarchy</text:p>
          </table:table-cell>
          <table:table-cell office:value-type="string">
            <text:p>Treating injuries and health conditions among humans, through administering medication and providing other medical treatments and nursing care.</text:p>
          </table:table-cell>
          <table:table-cell office:value-type="string">
            <text:p>S3.2.1</text:p>
          </table:table-cell>
        </table:table-row>
        <table:table-row>
          <table:table-cell office:value-type="string">
            <text:p>SkillGroup</text:p>
          </table:table-cell>
          <table:table-cell office:value-type="string">
            <text:p>http://data.europa.eu/esco/skill/74052f13-4cae-4600-a4d3-8103004683f3</text:p>
          </table:table-cell>
          <table:table-cell office:value-type="string">
            <text:p>using hand tools</text:p>
          </table:table-cell>
          <table:table-cell table:number-columns-repeated="2"/>
          <table:table-cell office:value-type="string">
            <text:p>released</text:p>
          </table:table-cell>
          <table:table-cell/>
          <table:table-cell office:value-type="string">
            <text:p>Excludes:<text:line-break/>- Fabricating products by hand<text:line-break/>- Operating a lawn-mower.</text:p>
          </table:table-cell>
          <table:table-cell office:value-type="string">
            <text:p>http://data.europa.eu/esco/concept-scheme/skills<text:line-break/>http://data.europa.eu/esco/concept-scheme/skills-hierarchy</text:p>
          </table:table-cell>
          <table:table-cell office:value-type="string">
            <text:p>Using the hands and tools that can be held in the hands, including power tools.</text:p>
          </table:table-cell>
          <table:table-cell office:value-type="string">
            <text:p>S6.7.0</text:p>
          </table:table-cell>
        </table:table-row>
        <table:table-row>
          <table:table-cell office:value-type="string">
            <text:p>SkillGroup</text:p>
          </table:table-cell>
          <table:table-cell office:value-type="string">
            <text:p>http://data.europa.eu/esco/skill/74b7938e-f667-48ff-a26d-faed294ac6c9</text:p>
          </table:table-cell>
          <table:table-cell office:value-type="string">
            <text:p>making models</text:p>
          </table:table-cell>
          <table:table-cell table:number-columns-repeated="2"/>
          <table:table-cell office:value-type="string">
            <text:p>released</text:p>
          </table:table-cell>
          <table:table-cell/>
          <table:table-cell office:value-type="string">
            <text:p>Excludes:<text:line-break/>- Creation of virtual or conceptual models Examples:<text:line-break/>- Create set models<text:line-break/>- Build jewellery models<text:line-break/>- Make architectural mock-ups.</text:p>
          </table:table-cell>
          <table:table-cell office:value-type="string">
            <text:p>http://data.europa.eu/esco/concept-scheme/skills<text:line-break/>http://data.europa.eu/esco/concept-scheme/skills-hierarchy</text:p>
          </table:table-cell>
          <table:table-cell office:value-type="string">
            <text:p>Constructing physical three-dimensional models of products.</text:p>
          </table:table-cell>
          <table:table-cell office:value-type="string">
            <text:p>S6.6.3</text:p>
          </table:table-cell>
        </table:table-row>
        <table:table-row>
          <table:table-cell office:value-type="string">
            <text:p>SkillGroup</text:p>
          </table:table-cell>
          <table:table-cell office:value-type="string">
            <text:p>http://data.europa.eu/esco/skill/75c1ab73-5b00-48a0-818e-93487ebdd7e1</text:p>
          </table:table-cell>
          <table:table-cell office:value-type="string">
            <text:p>setting up and protecting computer systems</text:p>
          </table:table-cell>
          <table:table-cell office:value-type="string">
            <text:p>installing and managing it safety</text:p>
          </table:table-cell>
          <table:table-cell/>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office:value-type="string">
            <text:p>Setting up, protecting and resolving problems with computer systems, networks, or similar information systems.</text:p>
          </table:table-cell>
          <table:table-cell office:value-type="string">
            <text:p>S5.2</text:p>
          </table:table-cell>
        </table:table-row>
        <table:table-row>
          <table:table-cell office:value-type="string">
            <text:p>SkillGroup</text:p>
          </table:table-cell>
          <table:table-cell office:value-type="string">
            <text:p>http://data.europa.eu/esco/skill/762f3830-baa8-4a7e-a5de-b49037d80885</text:p>
          </table:table-cell>
          <table:table-cell office:value-type="string">
            <text:p>tending plants and crops</text:p>
          </table:table-cell>
          <table:table-cell office:value-type="string">
            <text:p>plants and crops</text:p>
          </table:table-cell>
          <table:table-cell/>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office:value-type="string">
            <text:p>Propagating, cultivating, pruning, caring for and harvesting plants and crops.</text:p>
          </table:table-cell>
          <table:table-cell office:value-type="string">
            <text:p>S6.4.0</text:p>
          </table:table-cell>
        </table:table-row>
        <table:table-row>
          <table:table-cell office:value-type="string">
            <text:p>SkillGroup</text:p>
          </table:table-cell>
          <table:table-cell office:value-type="string">
            <text:p>http://data.europa.eu/esco/skill/775be776-b6ce-4322-a96f-11b2df84ce07</text:p>
          </table:table-cell>
          <table:table-cell office:value-type="string">
            <text:p>creating artistic, visual or instructive materials</text:p>
          </table:table-cell>
          <table:table-cell office:value-type="string">
            <text:p>creating artistic and visual materials</text:p>
          </table:table-cell>
          <table:table-cell/>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office:value-type="string">
            <text:p>Creating and developing visual representations and displays, instructional or promotional materials, or artistic designs or performances.</text:p>
          </table:table-cell>
          <table:table-cell office:value-type="string">
            <text:p>S1.12.0</text:p>
          </table:table-cell>
        </table:table-row>
        <table:table-row>
          <table:table-cell office:value-type="string">
            <text:p>SkillGroup</text:p>
          </table:table-cell>
          <table:table-cell office:value-type="string">
            <text:p>http://data.europa.eu/esco/skill/77a2918f-5969-4545-a632-d3e6a853b2c5</text:p>
          </table:table-cell>
          <table:table-cell office:value-type="string">
            <text:p>training animals</text:p>
          </table:table-cell>
          <table:table-cell table:number-columns-repeated="2"/>
          <table:table-cell office:value-type="string">
            <text:p>released</text:p>
          </table:table-cell>
          <table:table-cell/>
          <table:table-cell office:value-type="string">
            <text:p>Examples:<text:line-break/>- Train horses<text:line-break/>- Train gun dogs.</text:p>
          </table:table-cell>
          <table:table-cell office:value-type="string">
            <text:p>http://data.europa.eu/esco/concept-scheme/skills<text:line-break/>http://data.europa.eu/esco/concept-scheme/skills-hierarchy</text:p>
          </table:table-cell>
          <table:table-cell office:value-type="string">
            <text:p>Training animals to facilitate their routine husbandry, for professional purposes or as companion animals, for treatment, and/or public demonstrations.</text:p>
          </table:table-cell>
          <table:table-cell office:value-type="string">
            <text:p>S6.9.6</text:p>
          </table:table-cell>
        </table:table-row>
        <table:table-row>
          <table:table-cell office:value-type="string">
            <text:p>SkillGroup</text:p>
          </table:table-cell>
          <table:table-cell office:value-type="string">
            <text:p>http://data.europa.eu/esco/skill/77e41477-4ecf-425b-8163-b18a5a54e593</text:p>
          </table:table-cell>
          <table:table-cell office:value-type="string">
            <text:p>recruiting and hiring</text:p>
          </table:table-cell>
          <table:table-cell office:value-type="string">
            <text:p>recruiting</text:p>
          </table:table-cell>
          <table:table-cell/>
          <table:table-cell office:value-type="string">
            <text:p>released</text:p>
          </table:table-cell>
          <table:table-cell/>
          <table:table-cell office:value-type="string">
            <text:p>Examples:<text:line-break/>- recruit employees<text:line-break/>- carry out auditions Excludes:<text:line-break/>- interview candidates.</text:p>
          </table:table-cell>
          <table:table-cell office:value-type="string">
            <text:p>http://data.europa.eu/esco/concept-scheme/skills<text:line-break/>http://data.europa.eu/esco/concept-scheme/skills-hierarchy</text:p>
          </table:table-cell>
          <table:table-cell office:value-type="string">
            <text:p>Acquiring the right talent to achieve the organization's mission.</text:p>
          </table:table-cell>
          <table:table-cell office:value-type="string">
            <text:p>S4.7.0</text:p>
          </table:table-cell>
        </table:table-row>
        <table:table-row>
          <table:table-cell office:value-type="string">
            <text:p>SkillGroup</text:p>
          </table:table-cell>
          <table:table-cell office:value-type="string">
            <text:p>http://data.europa.eu/esco/skill/77ee8fad-188f-44cf-88ba-4e495a52d604</text:p>
          </table:table-cell>
          <table:table-cell office:value-type="string">
            <text:p>assisting with personal needs</text:p>
          </table:table-cell>
          <table:table-cell table:number-columns-repeated="2"/>
          <table:table-cell office:value-type="string">
            <text:p>released</text:p>
          </table:table-cell>
          <table:table-cell/>
          <table:table-cell office:value-type="string">
            <text:p>Excludes:<text:line-break/>- Administration of medical treatments and therapies<text:line-break/>- Therapeutic massage<text:line-break/>- Caring for children Examples:<text:line-break/>- Provide basic support to patients<text:line-break/>- Give non-therapeutic massages<text:line-break/>- Provide domestic care.</text:p>
          </table:table-cell>
          <table:table-cell office:value-type="string">
            <text:p>http://data.europa.eu/esco/concept-scheme/skills<text:line-break/>http://data.europa.eu/esco/concept-scheme/skills-hierarchy</text:p>
          </table:table-cell>
          <table:table-cell office:value-type="string">
            <text:p>Assisting others with personal needs and care such as bathing, dressing, feeding, relaxation and comfort.</text:p>
          </table:table-cell>
          <table:table-cell office:value-type="string">
            <text:p>S3.6.2</text:p>
          </table:table-cell>
        </table:table-row>
        <table:table-row>
          <table:table-cell office:value-type="string">
            <text:p>SkillGroup</text:p>
          </table:table-cell>
          <table:table-cell office:value-type="string">
            <text:p>http://data.europa.eu/esco/skill/79f3d574-fcf2-445e-a087-cc774f19b861</text:p>
          </table:table-cell>
          <table:table-cell office:value-type="string">
            <text:p>operating pumping systems or equipment</text:p>
          </table:table-cell>
          <table:table-cell table:number-columns-repeated="2"/>
          <table:table-cell office:value-type="string">
            <text:p>released</text:p>
          </table:table-cell>
          <table:table-cell/>
          <table:table-cell office:value-type="string">
            <text:p>Examples:<text:line-break/>- Operate hydraulic pumps<text:line-break/>- Operate latex transfer pump.</text:p>
          </table:table-cell>
          <table:table-cell office:value-type="string">
            <text:p>http://data.europa.eu/esco/concept-scheme/skills<text:line-break/>http://data.europa.eu/esco/concept-scheme/skills-hierarchy</text:p>
          </table:table-cell>
          <table:table-cell office:value-type="string">
            <text:p>Operating machinery and equipment for pumping liquids.</text:p>
          </table:table-cell>
          <table:table-cell office:value-type="string">
            <text:p>S8.4.3</text:p>
          </table:table-cell>
        </table:table-row>
        <table:table-row>
          <table:table-cell office:value-type="string">
            <text:p>SkillGroup</text:p>
          </table:table-cell>
          <table:table-cell office:value-type="string">
            <text:p>http://data.europa.eu/esco/skill/7a00c77c-4a1c-4fd6-a83f-004bda65d81a</text:p>
          </table:table-cell>
          <table:table-cell office:value-type="string">
            <text:p>supervising people</text:p>
          </table:table-cell>
          <table:table-cell table:number-columns-repeated="2"/>
          <table:table-cell office:value-type="string">
            <text:p>released</text:p>
          </table:table-cell>
          <table:table-cell/>
          <table:table-cell office:value-type="string">
            <text:p>Excludes:<text:line-break/>- Define roles of team members<text:line-break/>- Supervise children.</text:p>
          </table:table-cell>
          <table:table-cell office:value-type="string">
            <text:p>http://data.europa.eu/esco/concept-scheme/skills<text:line-break/>http://data.europa.eu/esco/concept-scheme/skills-hierarchy</text:p>
          </table:table-cell>
          <table:table-cell office:value-type="string">
            <text:p>Assigning responsibilities to others and directing and monitoring their performance.</text:p>
          </table:table-cell>
          <table:table-cell office:value-type="string">
            <text:p>S4.8</text:p>
          </table:table-cell>
        </table:table-row>
        <table:table-row>
          <table:table-cell office:value-type="string">
            <text:p>SkillGroup</text:p>
          </table:table-cell>
          <table:table-cell office:value-type="string">
            <text:p>http://data.europa.eu/esco/skill/7a163630-7536-4748-a259-aa820d3be44b</text:p>
          </table:table-cell>
          <table:table-cell office:value-type="string">
            <text:p>providing health care or medical treatments</text:p>
          </table:table-cell>
          <table:table-cell office:value-type="string">
            <text:p>healthcare</text:p>
          </table:table-cell>
          <table:table-cell/>
          <table:table-cell office:value-type="string">
            <text:p>released</text:p>
          </table:table-cell>
          <table:table-cell/>
          <table:table-cell office:value-type="string">
            <text:p>Excludes:<text:line-break/>- Veterinary care<text:line-break/>- Diagnosing health conditions.</text:p>
          </table:table-cell>
          <table:table-cell office:value-type="string">
            <text:p>http://data.europa.eu/esco/concept-scheme/skills<text:line-break/>http://data.europa.eu/esco/concept-scheme/skills-hierarchy</text:p>
          </table:table-cell>
          <table:table-cell office:value-type="string">
            <text:p>Treating injuries and health conditions through the provision of health care and medical treatments to people.</text:p>
          </table:table-cell>
          <table:table-cell office:value-type="string">
            <text:p>S3.2</text:p>
          </table:table-cell>
        </table:table-row>
        <table:table-row>
          <table:table-cell office:value-type="string">
            <text:p>SkillGroup</text:p>
          </table:table-cell>
          <table:table-cell office:value-type="string">
            <text:p>http://data.europa.eu/esco/skill/7a8c9402-0550-4966-9ff6-0d65b0f6b1fb</text:p>
          </table:table-cell>
          <table:table-cell office:value-type="string">
            <text:p>cleaning tools, equipment, workpieces and vehicles</text:p>
          </table:table-cell>
          <table:table-cell table:number-columns-repeated="2"/>
          <table:table-cell office:value-type="string">
            <text:p>released</text:p>
          </table:table-cell>
          <table:table-cell/>
          <table:table-cell office:value-type="string">
            <text:p>Examples:<text:line-break/>- Clean ventilation system - Clean concrete pumps<text:line-break/>- Sterilise fermentation tanks<text:line-break/>- Clean chimneys<text:line-break/>- Wash vehicles.</text:p>
          </table:table-cell>
          <table:table-cell office:value-type="string">
            <text:p>http://data.europa.eu/esco/concept-scheme/skills<text:line-break/>http://data.europa.eu/esco/concept-scheme/skills-hierarchy</text:p>
          </table:table-cell>
          <table:table-cell office:value-type="string">
            <text:p>Performing cleaning routines after tools, equipment, machinery and vehicles have been used and cleaning workpieces during or after fabrication.</text:p>
          </table:table-cell>
          <table:table-cell office:value-type="string">
            <text:p>S6.11.1</text:p>
          </table:table-cell>
        </table:table-row>
        <table:table-row>
          <table:table-cell office:value-type="string">
            <text:p>SkillGroup</text:p>
          </table:table-cell>
          <table:table-cell office:value-type="string">
            <text:p>http://data.europa.eu/esco/skill/7b942071-f688-4600-8d9f-ad4c0306abc7</text:p>
          </table:table-cell>
          <table:table-cell office:value-type="string">
            <text:p>installing, maintaining and repairing electrical, electronic and precision equipment</text:p>
          </table:table-cell>
          <table:table-cell office:value-type="string">
            <text:p>installing and maintaining electrical, electronic and precision equipment</text:p>
          </table:table-cell>
          <table:table-cell/>
          <table:table-cell office:value-type="string">
            <text:p>released</text:p>
          </table:table-cell>
          <table:table-cell/>
          <table:table-cell office:value-type="string">
            <text:p>Excludes:<text:line-break/>- Installing computer software, and configuring computer networks.</text:p>
          </table:table-cell>
          <table:table-cell office:value-type="string">
            <text:p>http://data.europa.eu/esco/concept-scheme/skills<text:line-break/>http://data.europa.eu/esco/concept-scheme/skills-hierarchy</text:p>
          </table:table-cell>
          <table:table-cell office:value-type="string">
            <text:p>Installing, setting-up, maintaining and repairing electrical and electronic equipment, and control systems, scientific devices, instrumentation and precision equipment.</text:p>
          </table:table-cell>
          <table:table-cell office:value-type="string">
            <text:p>S8.8</text:p>
          </table:table-cell>
        </table:table-row>
        <table:table-row>
          <table:table-cell office:value-type="string">
            <text:p>SkillGroup</text:p>
          </table:table-cell>
          <table:table-cell office:value-type="string">
            <text:p>http://data.europa.eu/esco/skill/7ca69606-5ffc-4668-ae53-713c1f1612e6</text:p>
          </table:table-cell>
          <table:table-cell office:value-type="string">
            <text:p>operating scientific and laboratory equipment</text:p>
          </table:table-cell>
          <table:table-cell table:number-columns-repeated="2"/>
          <table:table-cell office:value-type="string">
            <text:p>released</text:p>
          </table:table-cell>
          <table:table-cell office:value-type="string">
            <text:p>2023-07-05T09:15:14.695Z</text:p>
          </table:table-cell>
          <table:table-cell office:value-type="string">
            <text:p>Excludes:<text:line-break/>- Installing and setting up precision equipment Examples:<text:line-break/>- Operate microscope<text:line-break/>- Use chemical analysis equipment<text:line-break/>- Operate meteorological instruments.</text:p>
          </table:table-cell>
          <table:table-cell office:value-type="string">
            <text:p>http://data.europa.eu/esco/concept-scheme/skills<text:line-break/>http://data.europa.eu/esco/concept-scheme/skills-hierarchy</text:p>
          </table:table-cell>
          <table:table-cell office:value-type="string">
            <text:p>Controlling, monitoring, and adjusting precision instrumentation and equipment for the conduct of scientific experiments and diagnostic tests.</text:p>
          </table:table-cell>
          <table:table-cell office:value-type="string">
            <text:p>S8.6.3</text:p>
          </table:table-cell>
        </table:table-row>
        <table:table-row>
          <table:table-cell office:value-type="string">
            <text:p>SkillGroup</text:p>
          </table:table-cell>
          <table:table-cell office:value-type="string">
            <text:p>http://data.europa.eu/esco/skill/7de7e3f6-d222-4f08-b3f0-e2deff7ef798</text:p>
          </table:table-cell>
          <table:table-cell office:value-type="string">
            <text:p>providing information and support to the public and clients</text:p>
          </table:table-cell>
          <table:table-cell office:value-type="string">
            <text:p>providing information and support</text:p>
          </table:table-cell>
          <table:table-cell/>
          <table:table-cell office:value-type="string">
            <text:p>released</text:p>
          </table:table-cell>
          <table:table-cell office:value-type="string">
            <text:p>2022-06-19T15:20:39.399Z</text:p>
          </table:table-cell>
          <table:table-cell office:value-type="string">
            <text:p>Excludes:<text:line-break/>- Provide high quality client service<text:line-break/>- Satisfy customers.</text:p>
          </table:table-cell>
          <table:table-cell office:value-type="string">
            <text:p>http://data.europa.eu/esco/concept-scheme/skills<text:line-break/>http://data.europa.eu/esco/concept-scheme/skills-hierarchy</text:p>
          </table:table-cell>
          <table:table-cell office:value-type="string">
            <text:p>Assisting the public by answering questions, making recommendations, and providing information or support in response to requests.</text:p>
          </table:table-cell>
          <table:table-cell office:value-type="string">
            <text:p>S3.4.0</text:p>
          </table:table-cell>
        </table:table-row>
        <table:table-row>
          <table:table-cell office:value-type="string">
            <text:p>SkillGroup</text:p>
          </table:table-cell>
          <table:table-cell office:value-type="string">
            <text:p>http://data.europa.eu/esco/skill/7e0b93e0-0de7-4607-b07f-27a6828d3ff0</text:p>
          </table:table-cell>
          <table:table-cell office:value-type="string">
            <text:p>developing educational programmes</text:p>
          </table:table-cell>
          <table:table-cell table:number-columns-repeated="2"/>
          <table:table-cell office:value-type="string">
            <text:p>released</text:p>
          </table:table-cell>
          <table:table-cell/>
          <table:table-cell office:value-type="string">
            <text:p>Examples:<text:line-break/>- develop curriculum<text:line-break/>- construct individual learning plans<text:line-break/>- develop training programmes.</text:p>
          </table:table-cell>
          <table:table-cell office:value-type="string">
            <text:p>http://data.europa.eu/esco/concept-scheme/skills<text:line-break/>http://data.europa.eu/esco/concept-scheme/skills-hierarchy</text:p>
          </table:table-cell>
          <table:table-cell office:value-type="string">
            <text:p>Developing education and training programs, plans, or procedures for society in general, specific groups or tailored to an individual's learning needs.</text:p>
          </table:table-cell>
          <table:table-cell office:value-type="string">
            <text:p>S4.1.6</text:p>
          </table:table-cell>
        </table:table-row>
        <table:table-row>
          <table:table-cell office:value-type="string">
            <text:p>SkillGroup</text:p>
          </table:table-cell>
          <table:table-cell office:value-type="string">
            <text:p>http://data.europa.eu/esco/skill/7e153e1d-2b12-43ad-89f3-0cf82ebc4a30</text:p>
          </table:table-cell>
          <table:table-cell office:value-type="string">
            <text:p>performing risk analysis and management</text:p>
          </table:table-cell>
          <table:table-cell table:number-columns-repeated="2"/>
          <table:table-cell office:value-type="string">
            <text:p>released</text:p>
          </table:table-cell>
          <table:table-cell office:value-type="string">
            <text:p>2023-07-06T10:08:28.9Z</text:p>
          </table:table-cell>
          <table:table-cell office:value-type="string">
            <text:p>Excludes:<text:line-break/>- Using ICT tools to analyse and process data. Examples:<text:line-break/>- Draw up risk assessment<text:line-break/>- Apply risk management processes.</text:p>
          </table:table-cell>
          <table:table-cell office:value-type="string">
            <text:p>http://data.europa.eu/esco/concept-scheme/skills<text:line-break/>http://data.europa.eu/esco/concept-scheme/skills-hierarchy</text:p>
          </table:table-cell>
          <table:table-cell office:value-type="string">
            <text:p>Identify and assess factors that may have negative financial consequences, jeopardise the success of a project or activity, expose individuals to danger, cause damage to property and equipment or threaten an organisation's functioning. Implement procedures to avoid or minimise their impact.</text:p>
          </table:table-cell>
          <table:table-cell office:value-type="string">
            <text:p>S2.7.5</text:p>
          </table:table-cell>
        </table:table-row>
        <table:table-row>
          <table:table-cell office:value-type="string">
            <text:p>SkillGroup</text:p>
          </table:table-cell>
          <table:table-cell office:value-type="string">
            <text:p>http://data.europa.eu/esco/skill/7eafec38-621a-4b6e-9298-bfe70ec0b253</text:p>
          </table:table-cell>
          <table:table-cell office:value-type="string">
            <text:p>conducting academic or market research</text:p>
          </table:table-cell>
          <table:table-cell table:number-columns-repeated="2"/>
          <table:table-cell office:value-type="string">
            <text:p>released</text:p>
          </table:table-cell>
          <table:table-cell office:value-type="string">
            <text:p>2024-07-03T13:25:14.076Z</text:p>
          </table:table-cell>
          <table:table-cell office:value-type="string">
            <text:p>Examples:<text:line-break/>- Conduct public surveys<text:line-break/>- Conduct literature research Excludes:<text:line-break/>- Detect financial crime<text:line-break/>- Investigate road accidents.</text:p>
          </table:table-cell>
          <table:table-cell office:value-type="string">
            <text:p>http://data.europa.eu/esco/concept-scheme/skills<text:line-break/>http://data.europa.eu/esco/concept-scheme/skills-hierarchy</text:p>
          </table:table-cell>
          <table:table-cell office:value-type="string">
            <text:p>Conducting research studies, investigations or surveys to increase knowledge and understanding within the academic or business field.</text:p>
          </table:table-cell>
          <table:table-cell office:value-type="string">
            <text:p>S2.1.1</text:p>
          </table:table-cell>
        </table:table-row>
        <table:table-row>
          <table:table-cell office:value-type="string">
            <text:p>SkillGroup</text:p>
          </table:table-cell>
          <table:table-cell office:value-type="string">
            <text:p>http://data.europa.eu/esco/skill/7ec00c15-c9bb-4b74-9b8b-681424e9ea2c</text:p>
          </table:table-cell>
          <table:table-cell office:value-type="string">
            <text:p>operating packaging machinery</text:p>
          </table:table-cell>
          <table:table-cell table:number-columns-repeated="2"/>
          <table:table-cell office:value-type="string">
            <text:p>released</text:p>
          </table:table-cell>
          <table:table-cell/>
          <table:table-cell office:value-type="string">
            <text:p>Examples:<text:line-break/>- Tend bottle cork machine<text:line-break/>- Tend meat packaging machine.</text:p>
          </table:table-cell>
          <table:table-cell office:value-type="string">
            <text:p>http://data.europa.eu/esco/concept-scheme/skills<text:line-break/>http://data.europa.eu/esco/concept-scheme/skills-hierarchy</text:p>
          </table:table-cell>
          <table:table-cell office:value-type="string">
            <text:p>Operating, tending and monitoring machinery for packaging or bottling products.</text:p>
          </table:table-cell>
          <table:table-cell office:value-type="string">
            <text:p>S8.5.2</text:p>
          </table:table-cell>
        </table:table-row>
        <table:table-row>
          <table:table-cell office:value-type="string">
            <text:p>SkillGroup</text:p>
          </table:table-cell>
          <table:table-cell office:value-type="string">
            <text:p>http://data.europa.eu/esco/skill/802deca0-b880-4d1a-b366-e13b27621baf</text:p>
          </table:table-cell>
          <table:table-cell office:value-type="string">
            <text:p>complying with operational procedures</text:p>
          </table:table-cell>
          <table:table-cell table:number-columns-repeated="2"/>
          <table:table-cell office:value-type="string">
            <text:p>released</text:p>
          </table:table-cell>
          <table:table-cell office:value-type="string">
            <text:p>2023-10-26T09:08:06.707Z</text:p>
          </table:table-cell>
          <table:table-cell office:value-type="string">
            <text:p>Examples:<text:line-break/>- adhere to organisational guidelines<text:line-break/>- apply socially just working principles Excludes:<text:line-break/>- comply with legislation in social services<text:line-break/>- ensure compliance with gaming laws<text:line-break/>- follow hygienic practices in fishery operations.</text:p>
          </table:table-cell>
          <table:table-cell office:value-type="string">
            <text:p>http://data.europa.eu/esco/concept-scheme/skills<text:line-break/>http://data.europa.eu/esco/concept-scheme/skills-hierarchy</text:p>
          </table:table-cell>
          <table:table-cell office:value-type="string">
            <text:p>Ensuring compliance with operational procedures, standards or guidelines at company level related to matters other than health, safety and the environment.</text:p>
          </table:table-cell>
          <table:table-cell office:value-type="string">
            <text:p>S3.3.3</text:p>
          </table:table-cell>
        </table:table-row>
        <table:table-row>
          <table:table-cell office:value-type="string">
            <text:p>SkillGroup</text:p>
          </table:table-cell>
          <table:table-cell office:value-type="string">
            <text:p>http://data.europa.eu/esco/skill/8064ae65-5d1b-44e1-9aaf-246a4285a9a6</text:p>
          </table:table-cell>
          <table:table-cell office:value-type="string">
            <text:p>complying with environmental protection laws and standards</text:p>
          </table:table-cell>
          <table:table-cell table:number-columns-repeated="2"/>
          <table:table-cell office:value-type="string">
            <text:p>released</text:p>
          </table:table-cell>
          <table:table-cell office:value-type="string">
            <text:p>2023-07-05T15:35:28.89Z</text:p>
          </table:table-cell>
          <table:table-cell office:value-type="string">
            <text:p>Examples:<text:line-break/>- follow environmentally-sustainable work practices<text:line-break/>- implement environmental protection measures<text:line-break/>- protect biodiversity Excludes: - ensure customs compliance.</text:p>
          </table:table-cell>
          <table:table-cell office:value-type="string">
            <text:p>http://data.europa.eu/esco/concept-scheme/skills<text:line-break/>http://data.europa.eu/esco/concept-scheme/skills-hierarchy</text:p>
          </table:table-cell>
          <table:table-cell office:value-type="string">
            <text:p>Ensuring compliance with regulations, standards, guidelines, laws or practices relating to the protection of the environment.</text:p>
          </table:table-cell>
          <table:table-cell office:value-type="string">
            <text:p>S3.3.2</text:p>
          </table:table-cell>
        </table:table-row>
        <table:table-row>
          <table:table-cell office:value-type="string">
            <text:p>SkillGroup</text:p>
          </table:table-cell>
          <table:table-cell office:value-type="string">
            <text:p>http://data.europa.eu/esco/skill/8066edda-60e7-4e41-966b-4be09b049ab3</text:p>
          </table:table-cell>
          <table:table-cell office:value-type="string">
            <text:p>preparing industrial materials for processing or use</text:p>
          </table:table-cell>
          <table:table-cell table:number-columns-repeated="2"/>
          <table:table-cell office:value-type="string">
            <text:p>released</text:p>
          </table:table-cell>
          <table:table-cell office:value-type="string">
            <text:p>2023-06-30T09:28:59.215Z</text:p>
          </table:table-cell>
          <table:table-cell office:value-type="string">
            <text:p>Examples:<text:line-break/>- Heat jewellery metals<text:line-break/>- Heat lacquer mixture<text:line-break/>- Prepare surface for coating.</text:p>
          </table:table-cell>
          <table:table-cell office:value-type="string">
            <text:p>http://data.europa.eu/esco/concept-scheme/skills<text:line-break/>http://data.europa.eu/esco/concept-scheme/skills-hierarchy</text:p>
          </table:table-cell>
          <table:table-cell office:value-type="string">
            <text:p>Preparing various types of materials for further processing or for use, by employing techniques such as heating, skimming to remove impurities or immersing objects in cleaning or coating solutions.</text:p>
          </table:table-cell>
          <table:table-cell office:value-type="string">
            <text:p>S6.3.3</text:p>
          </table:table-cell>
        </table:table-row>
        <table:table-row>
          <table:table-cell office:value-type="string">
            <text:p>SkillGroup</text:p>
          </table:table-cell>
          <table:table-cell office:value-type="string">
            <text:p>http://data.europa.eu/esco/skill/80cf002a-6586-4db7-9c9a-88325a9a5e1b</text:p>
          </table:table-cell>
          <table:table-cell office:value-type="string">
            <text:p>applying environmental skills and competences</text:p>
          </table:table-cell>
          <table:table-cell office:value-type="string">
            <text:p>adopting environmentally-friendly practices</text:p>
          </table:table-cell>
          <table:table-cell/>
          <table:table-cell office:value-type="string">
            <text:p>released</text:p>
          </table:table-cell>
          <table:table-cell office:value-type="string">
            <text:p>2021-09-13T17:37:26.558Z</text:p>
          </table:table-cell>
          <table:table-cell office:value-type="string">
            <text:p>The skills and competences under this heading address the different modes and activities relevant for a greener working and living.</text:p>
          </table:table-cell>
          <table:table-cell office:value-type="string">
            <text:p>http://data.europa.eu/esco/concept-scheme/skills<text:line-break/>http://data.europa.eu/esco/concept-scheme/skills-hierarchy<text:line-break/>http://data.europa.eu/esco/concept-scheme/skill-transversal-groups</text:p>
          </table:table-cell>
          <table:table-cell office:value-type="string">
            <text:p>Reflect on the short and long-term impact of individual behaviours on the physical and social environment and adopt a sustainable work and lifestyle. Recognize the individual and collective responsibility for the protection and restoration of the local and global environment and inspire others.</text:p>
          </table:table-cell>
          <table:table-cell office:value-type="string">
            <text:p>T6.2</text:p>
          </table:table-cell>
        </table:table-row>
        <table:table-row>
          <table:table-cell office:value-type="string">
            <text:p>SkillGroup</text:p>
          </table:table-cell>
          <table:table-cell office:value-type="string">
            <text:p>http://data.europa.eu/esco/skill/81d95361-e7dd-4f75-a243-d646a7dd6a28</text:p>
          </table:table-cell>
          <table:table-cell office:value-type="string">
            <text:p>finishing interior or exterior of structures</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office:value-type="string">
            <text:p>Applying interior and exterior finishes to buildings and other structures.</text:p>
          </table:table-cell>
          <table:table-cell office:value-type="string">
            <text:p>S7.3.0</text:p>
          </table:table-cell>
        </table:table-row>
        <table:table-row>
          <table:table-cell office:value-type="string">
            <text:p>SkillGroup</text:p>
          </table:table-cell>
          <table:table-cell office:value-type="string">
            <text:p>http://data.europa.eu/esco/skill/81f29457-6d0d-4f46-9e0a-7295c7c6f090</text:p>
          </table:table-cell>
          <table:table-cell office:value-type="string">
            <text:p>responding to complaints</text:p>
          </table:table-cell>
          <table:table-cell table:number-columns-repeated="2"/>
          <table:table-cell office:value-type="string">
            <text:p>released</text:p>
          </table:table-cell>
          <table:table-cell/>
          <table:table-cell office:value-type="string">
            <text:p>Examples:<text:line-break/>- handle customer complaints<text:line-break/>- manage employee complaints.</text:p>
          </table:table-cell>
          <table:table-cell office:value-type="string">
            <text:p>http://data.europa.eu/esco/concept-scheme/skills<text:line-break/>http://data.europa.eu/esco/concept-scheme/skills-hierarchy</text:p>
          </table:table-cell>
          <table:table-cell office:value-type="string">
            <text:p>Handling and responding to complaints from clients or staff.</text:p>
          </table:table-cell>
          <table:table-cell office:value-type="string">
            <text:p>S1.1.3</text:p>
          </table:table-cell>
        </table:table-row>
        <table:table-row>
          <table:table-cell office:value-type="string">
            <text:p>SkillGroup</text:p>
          </table:table-cell>
          <table:table-cell office:value-type="string">
            <text:p>http://data.europa.eu/esco/skill/821ecf8f-3c2a-4b89-a9f1-b2aa7fb0b625</text:p>
          </table:table-cell>
          <table:table-cell office:value-type="string">
            <text:p>cleaning</text:p>
          </table:table-cell>
          <table:table-cell table:number-columns-repeated="2"/>
          <table:table-cell office:value-type="string">
            <text:p>released</text:p>
          </table:table-cell>
          <table:table-cell/>
          <table:table-cell office:value-type="string">
            <text:p>Excludes:<text:line-break/>- Cleaning, laundering and maintaining textiles<text:line-break/>- Cleaning live animals.</text:p>
          </table:table-cell>
          <table:table-cell office:value-type="string">
            <text:p>http://data.europa.eu/esco/concept-scheme/skills<text:line-break/>http://data.europa.eu/esco/concept-scheme/skills-hierarchy</text:p>
          </table:table-cell>
          <table:table-cell office:value-type="string">
            <text:p>Cleaning buildings, work areas, equipment, machinery and vehicles.</text:p>
          </table:table-cell>
          <table:table-cell office:value-type="string">
            <text:p>S6.11</text:p>
          </table:table-cell>
        </table:table-row>
        <table:table-row>
          <table:table-cell office:value-type="string">
            <text:p>SkillGroup</text:p>
          </table:table-cell>
          <table:table-cell office:value-type="string">
            <text:p>http://data.europa.eu/esco/skill/82463bb1-85d1-4e99-a4ce-08508fc3b2a3</text:p>
          </table:table-cell>
          <table:table-cell office:value-type="string">
            <text:p>supporting others</text:p>
          </table:table-cell>
          <table:table-cell office:value-type="string">
            <text:p>helpfulness<text:line-break/>support others<text:line-break/>providing support to others</text:p>
          </table:table-cell>
          <table:table-cell office:value-type="string">
            <text:p>selflessness<text:line-break/>kindness<text:line-break/>courteous behaviour<text:line-break/>caring</text:p>
          </table:table-cell>
          <table:table-cell office:value-type="string">
            <text:p>released</text:p>
          </table:table-cell>
          <table:table-cell office:value-type="string">
            <text:p>2023-10-26T08:00:39.789Z</text:p>
          </table:table-cell>
          <table:table-cell/>
          <table:table-cell office:value-type="string">
            <text:p>http://data.europa.eu/esco/concept-scheme/skills<text:line-break/>http://data.europa.eu/esco/concept-scheme/skills-hierarchy<text:line-break/>http://data.europa.eu/esco/concept-scheme/skill-transversal-groups</text:p>
          </table:table-cell>
          <table:table-cell office:value-type="string">
            <text:p>Guide or help less experienced or less knowledgeable people, and provide support to distressed people.</text:p>
          </table:table-cell>
          <table:table-cell office:value-type="string">
            <text:p>T4.2</text:p>
          </table:table-cell>
        </table:table-row>
        <table:table-row>
          <table:table-cell office:value-type="string">
            <text:p>SkillGroup</text:p>
          </table:table-cell>
          <table:table-cell office:value-type="string">
            <text:p>http://data.europa.eu/esco/skill/8267ecb5-c976-4b6a-809b-4ceecb954967</text:p>
          </table:table-cell>
          <table:table-cell office:value-type="string">
            <text:p>thinking skills and competences</text:p>
          </table:table-cell>
          <table:table-cell office:value-type="string">
            <text:p>use of reason and logic<text:line-break/>cognitive skills and competences</text:p>
          </table:table-cell>
          <table:table-cell/>
          <table:table-cell office:value-type="string">
            <text:p>released</text:p>
          </table:table-cell>
          <table:table-cell office:value-type="string">
            <text:p>2021-08-30T08:20:35.122Z</text:p>
          </table:table-cell>
          <table:table-cell/>
          <table:table-cell office:value-type="string">
            <text:p>http://data.europa.eu/esco/concept-scheme/skills<text:line-break/>http://data.europa.eu/esco/concept-scheme/skills-hierarchy<text:line-break/>http://data.europa.eu/esco/concept-scheme/skill-transversal-groups</text:p>
          </table:table-cell>
          <table:table-cell office:value-type="string">
            <text:p>Skills and competences relating to the ability to apply the mental processes of gathering, conceptualizing, analysing, synthesizing, and/or evaluating information gathered from, or generated by, observation, experience, reflection, reasoning, or communication. They include the ability to evaluate and use information of different kinds to plan activities, achieve goals, solve problems, deal with issues and perform complex tasks in routine and novel ways.</text:p>
          </table:table-cell>
          <table:table-cell office:value-type="string">
            <text:p>T2</text:p>
          </table:table-cell>
        </table:table-row>
        <table:table-row>
          <table:table-cell office:value-type="string">
            <text:p>SkillGroup</text:p>
          </table:table-cell>
          <table:table-cell office:value-type="string">
            <text:p>http://data.europa.eu/esco/skill/827de17d-3fc1-4ba5-b4e0-850c51e750c8</text:p>
          </table:table-cell>
          <table:table-cell office:value-type="string">
            <text:p>assembling and fabricating products</text:p>
          </table:table-cell>
          <table:table-cell table:number-columns-repeated="2"/>
          <table:table-cell office:value-type="string">
            <text:p>released</text:p>
          </table:table-cell>
          <table:table-cell/>
          <table:table-cell office:value-type="string">
            <text:p>Excludes:<text:line-break/>- Operation of automated assembly equipment or machines -repair of building structures and mechanical, electrical, electronic products and components. Examples:<text:line-break/>- Assemble metal parts - Apply assembly techniques.</text:p>
          </table:table-cell>
          <table:table-cell office:value-type="string">
            <text:p>http://data.europa.eu/esco/concept-scheme/skills<text:line-break/>http://data.europa.eu/esco/concept-scheme/skills-hierarchy</text:p>
          </table:table-cell>
          <table:table-cell office:value-type="string">
            <text:p>Fabricating, assembling or repairing products or work aids by hand, or using hand-held tools and equipment.</text:p>
          </table:table-cell>
          <table:table-cell office:value-type="string">
            <text:p>S6.5.0</text:p>
          </table:table-cell>
        </table:table-row>
        <table:table-row>
          <table:table-cell office:value-type="string">
            <text:p>SkillGroup</text:p>
          </table:table-cell>
          <table:table-cell office:value-type="string">
            <text:p>http://data.europa.eu/esco/skill/82c084ea-15e9-4d55-98dc-ede0f767baee</text:p>
          </table:table-cell>
          <table:table-cell office:value-type="string">
            <text:p>information skills</text:p>
          </table:table-cell>
          <table:table-cell office:value-type="string">
            <text:p>working with information</text:p>
          </table:table-cell>
          <table:table-cell/>
          <table:table-cell office:value-type="string">
            <text:p>released</text:p>
          </table:table-cell>
          <table:table-cell office:value-type="string">
            <text:p>2023-07-06T10:17:07.253Z</text:p>
          </table:table-cell>
          <table:table-cell/>
          <table:table-cell office:value-type="string">
            <text:p>http://data.europa.eu/esco/concept-scheme/skills<text:line-break/>http://data.europa.eu/esco/concept-scheme/skills-hierarchy</text:p>
          </table:table-cell>
          <table:table-cell office:value-type="string">
            <text:p>Collecting, storing, monitoring, and using information; Conducting studies, investigations and tests; maintaining records; managing, evaluating, processing, analysing and monitoring information and projecting outcomes.</text:p>
          </table:table-cell>
          <table:table-cell office:value-type="string">
            <text:p>S2.0</text:p>
          </table:table-cell>
        </table:table-row>
        <table:table-row>
          <table:table-cell office:value-type="string">
            <text:p>SkillGroup</text:p>
          </table:table-cell>
          <table:table-cell office:value-type="string">
            <text:p>http://data.europa.eu/esco/skill/8369011d-de43-4800-bcce-be12e19828a5</text:p>
          </table:table-cell>
          <table:table-cell office:value-type="string">
            <text:p>accepting feedback</text:p>
          </table:table-cell>
          <table:table-cell table:number-columns-repeated="2"/>
          <table:table-cell office:value-type="string">
            <text:p>released</text:p>
          </table:table-cell>
          <table:table-cell office:value-type="string">
            <text:p>2022-06-19T14:48:30.73Z</text:p>
          </table:table-cell>
          <table:table-cell office:value-type="string">
            <text:p>Examples:<text:line-break/>- accept constructive criticism.</text:p>
          </table:table-cell>
          <table:table-cell office:value-type="string">
            <text:p>http://data.europa.eu/esco/concept-scheme/skills<text:line-break/>http://data.europa.eu/esco/concept-scheme/skills-hierarchy</text:p>
          </table:table-cell>
          <table:table-cell office:value-type="string">
            <text:p>React to valid and well-reasoned opinions and directions about one's work in a positive manner.</text:p>
          </table:table-cell>
          <table:table-cell office:value-type="string">
            <text:p>S1.8.4</text:p>
          </table:table-cell>
        </table:table-row>
        <table:table-row>
          <table:table-cell office:value-type="string">
            <text:p>SkillGroup</text:p>
          </table:table-cell>
          <table:table-cell office:value-type="string">
            <text:p>http://data.europa.eu/esco/skill/8427894f-2622-4b97-9366-72234a5fab50</text:p>
          </table:table-cell>
          <table:table-cell office:value-type="string">
            <text:p>operating watercraft</text:p>
          </table:table-cell>
          <table:table-cell office:value-type="string">
            <text:p>operating ships and boats</text:p>
          </table:table-cell>
          <table:table-cell/>
          <table:table-cell office:value-type="string">
            <text:p>released</text:p>
          </table:table-cell>
          <table:table-cell office:value-type="string">
            <text:p>2020-12-02T16:19:04.329Z</text:p>
          </table:table-cell>
          <table:table-cell office:value-type="string">
            <text:p>Examples:<text:line-break/>- Operate mechanical equipment of ships<text:line-break/>- Operate small craft<text:line-break/>- Use fishing vessel equipment<text:line-break/>- Navigate European inland waterways<text:line-break/>- Steer vessels.</text:p>
          </table:table-cell>
          <table:table-cell office:value-type="string">
            <text:p>http://data.europa.eu/esco/concept-scheme/skills<text:line-break/>http://data.europa.eu/esco/concept-scheme/skills-hierarchy</text:p>
          </table:table-cell>
          <table:table-cell office:value-type="string">
            <text:p>Operating and controlling the movement of watercraft and underwater vessels, including ships, boats and other types of vessel.</text:p>
          </table:table-cell>
          <table:table-cell office:value-type="string">
            <text:p>S8.3</text:p>
          </table:table-cell>
        </table:table-row>
        <table:table-row>
          <table:table-cell office:value-type="string">
            <text:p>SkillGroup</text:p>
          </table:table-cell>
          <table:table-cell office:value-type="string">
            <text:p>http://data.europa.eu/esco/skill/842ebeb2-d252-4bde-98fe-e0463f7009db</text:p>
          </table:table-cell>
          <table:table-cell office:value-type="string">
            <text:p>using digital tools to control machinery</text:p>
          </table:table-cell>
          <table:table-cell office:value-type="string">
            <text:p>controlling machinery with digital tools</text:p>
          </table:table-cell>
          <table:table-cell/>
          <table:table-cell office:value-type="string">
            <text:p>released</text:p>
          </table:table-cell>
          <table:table-cell/>
          <table:table-cell office:value-type="string">
            <text:p>Excludes:<text:line-break/>- Writing computer code and programmes<text:line-break/>- Resolving computer problems. Examples:<text:line-break/>- Enter commands, instructions, or specifications into CNC equipment<text:line-break/>- Set up the controls of a machine.</text:p>
          </table:table-cell>
          <table:table-cell office:value-type="string">
            <text:p>http://data.europa.eu/esco/concept-scheme/skills<text:line-break/>http://data.europa.eu/esco/concept-scheme/skills-hierarchy</text:p>
          </table:table-cell>
          <table:table-cell office:value-type="string">
            <text:p>Issuing commands to computer controlled machines and equipment by despatching the appropriate data and input.</text:p>
          </table:table-cell>
          <table:table-cell office:value-type="string">
            <text:p>S5.7</text:p>
          </table:table-cell>
        </table:table-row>
        <table:table-row>
          <table:table-cell office:value-type="string">
            <text:p>SkillGroup</text:p>
          </table:table-cell>
          <table:table-cell office:value-type="string">
            <text:p>http://data.europa.eu/esco/skill/848c0306-8cbe-4693-a275-d99807c0173c</text:p>
          </table:table-cell>
          <table:table-cell office:value-type="string">
            <text:p>liaising and networking</text:p>
          </table:table-cell>
          <table:table-cell table:number-columns-repeated="2"/>
          <table:table-cell office:value-type="string">
            <text:p>released</text:p>
          </table:table-cell>
          <table:table-cell office:value-type="string">
            <text:p>2022-06-19T14:48:30.73Z</text:p>
          </table:table-cell>
          <table:table-cell/>
          <table:table-cell office:value-type="string">
            <text:p>http://data.europa.eu/esco/concept-scheme/skills<text:line-break/>http://data.europa.eu/esco/concept-scheme/skills-hierarchy</text:p>
          </table:table-cell>
          <table:table-cell office:value-type="string">
            <text:p>Developing alliances, contacts or partnerships, and exchanging information with others.</text:p>
          </table:table-cell>
          <table:table-cell office:value-type="string">
            <text:p>S1.2.0</text:p>
          </table:table-cell>
        </table:table-row>
        <table:table-row>
          <table:table-cell office:value-type="string">
            <text:p>SkillGroup</text:p>
          </table:table-cell>
          <table:table-cell office:value-type="string">
            <text:p>http://data.europa.eu/esco/skill/85b379e7-e0b7-48b8-baa7-631f50a7cdd5</text:p>
          </table:table-cell>
          <table:table-cell office:value-type="string">
            <text:p>communication, collaboration and creativity</text:p>
          </table:table-cell>
          <table:table-cell office:value-type="string">
            <text:p>communication and creativity</text:p>
          </table:table-cell>
          <table:table-cell/>
          <table:table-cell office:value-type="string">
            <text:p>released</text:p>
          </table:table-cell>
          <table:table-cell/>
          <table:table-cell office:value-type="string">
            <text:p>Excludes:<text:line-break/>- Communication or interaction with animals.</text:p>
          </table:table-cell>
          <table:table-cell office:value-type="string">
            <text:p>http://data.europa.eu/esco/concept-scheme/skills<text:line-break/>http://data.europa.eu/esco/concept-scheme/skills-hierarchy</text:p>
          </table:table-cell>
          <table:table-cell office:value-type="string">
            <text:p>Communicating, collaborating, liaising, and negotiating with other people, developing solutions to problems, creating plans or specifications for the design of objects and systems, composing text or music, performing to entertain an audience, and imparting knowledge to others.</text:p>
          </table:table-cell>
          <table:table-cell office:value-type="string">
            <text:p>S1.0</text:p>
          </table:table-cell>
        </table:table-row>
        <table:table-row>
          <table:table-cell office:value-type="string">
            <text:p>SkillGroup</text:p>
          </table:table-cell>
          <table:table-cell office:value-type="string">
            <text:p>http://data.europa.eu/esco/skill/869fc2ce-478f-4420-8766-e1f02cec4fb2</text:p>
          </table:table-cell>
          <table:table-cell office:value-type="string">
            <text:p>management skills</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office:value-type="string">
            <text:p>Managing people, activities, resources, and organisation; developing objectives and strategies, organising work activities, allocating and controlling resources and leading, motivating, recruiting and supervising people and teams.</text:p>
          </table:table-cell>
          <table:table-cell office:value-type="string">
            <text:p>S4</text:p>
          </table:table-cell>
        </table:table-row>
        <table:table-row>
          <table:table-cell office:value-type="string">
            <text:p>SkillGroup</text:p>
          </table:table-cell>
          <table:table-cell office:value-type="string">
            <text:p>http://data.europa.eu/esco/skill/872c0ddb-f056-4f51-afac-fc3d6fae0f5b</text:p>
          </table:table-cell>
          <table:table-cell office:value-type="string">
            <text:p>operating medical equipment</text:p>
          </table:table-cell>
          <table:table-cell table:number-columns-repeated="2"/>
          <table:table-cell office:value-type="string">
            <text:p>released</text:p>
          </table:table-cell>
          <table:table-cell/>
          <table:table-cell office:value-type="string">
            <text:p>Excludes:<text:line-break/>- Installing and setting up precision equipment<text:line-break/>- Operating equipment used in laboratory tests, including pathology Examples:<text:line-break/>- Operate medical imaging equipment<text:line-break/>- Operate heart-lung machines.</text:p>
          </table:table-cell>
          <table:table-cell office:value-type="string">
            <text:p>http://data.europa.eu/esco/concept-scheme/skills<text:line-break/>http://data.europa.eu/esco/concept-scheme/skills-hierarchy</text:p>
          </table:table-cell>
          <table:table-cell office:value-type="string">
            <text:p>Controlling, monitoring, and adjusting precision instrumentation and equipment used for diagnosing and treatment of medical conditions.</text:p>
          </table:table-cell>
          <table:table-cell office:value-type="string">
            <text:p>S8.6.1</text:p>
          </table:table-cell>
        </table:table-row>
        <table:table-row>
          <table:table-cell office:value-type="string">
            <text:p>SkillGroup</text:p>
          </table:table-cell>
          <table:table-cell office:value-type="string">
            <text:p>http://data.europa.eu/esco/skill/87dff904-fb74-4d59-972e-1c2387579d94</text:p>
          </table:table-cell>
          <table:table-cell office:value-type="string">
            <text:p>directing operational activities</text:p>
          </table:table-cell>
          <table:table-cell table:number-columns-repeated="2"/>
          <table:table-cell office:value-type="string">
            <text:p>released</text:p>
          </table:table-cell>
          <table:table-cell office:value-type="string">
            <text:p>2023-01-27T11:28:14.096Z</text:p>
          </table:table-cell>
          <table:table-cell office:value-type="string">
            <text:p>Examples:<text:line-break/>- coordinate rescue missions<text:line-break/>- coordinate operational activities<text:line-break/>- oversee pre-assembly operations Excludes:<text:line-break/>- coordinate dock operations<text:line-break/>- forecast workload<text:line-break/>- manage ICT project.</text:p>
          </table:table-cell>
          <table:table-cell office:value-type="string">
            <text:p>http://data.europa.eu/esco/concept-scheme/skills<text:line-break/>http://data.europa.eu/esco/concept-scheme/skills-hierarchy</text:p>
          </table:table-cell>
          <table:table-cell office:value-type="string">
            <text:p>Directing, supervising and coordinating operational activities, projects and tasks in an organisation.</text:p>
          </table:table-cell>
          <table:table-cell office:value-type="string">
            <text:p>S4.2.1</text:p>
          </table:table-cell>
        </table:table-row>
        <table:table-row>
          <table:table-cell office:value-type="string">
            <text:p>SkillGroup</text:p>
          </table:table-cell>
          <table:table-cell office:value-type="string">
            <text:p>http://data.europa.eu/esco/skill/8826b057-0e80-4e3d-9efc-1e179d597f40</text:p>
          </table:table-cell>
          <table:table-cell office:value-type="string">
            <text:p>assisting people with mobility</text:p>
          </table:table-cell>
          <table:table-cell table:number-columns-repeated="2"/>
          <table:table-cell office:value-type="string">
            <text:p>released</text:p>
          </table:table-cell>
          <table:table-cell/>
          <table:table-cell office:value-type="string">
            <text:p>Examples:<text:line-break/>- transfer patients Excludes:<text:line-break/>- drive vehicles.</text:p>
          </table:table-cell>
          <table:table-cell office:value-type="string">
            <text:p>http://data.europa.eu/esco/concept-scheme/skills<text:line-break/>http://data.europa.eu/esco/concept-scheme/skills-hierarchy</text:p>
          </table:table-cell>
          <table:table-cell office:value-type="string">
            <text:p>Moving or assisting movement of persons with restricted mobility due to illness, accidents, disability, or medical procedures.</text:p>
          </table:table-cell>
          <table:table-cell office:value-type="string">
            <text:p>S3.6.1</text:p>
          </table:table-cell>
        </table:table-row>
        <table:table-row>
          <table:table-cell office:value-type="string">
            <text:p>SkillGroup</text:p>
          </table:table-cell>
          <table:table-cell office:value-type="string">
            <text:p>http://data.europa.eu/esco/skill/883eab8c-d8a6-4e8b-9b11-7d9001e172ab</text:p>
          </table:table-cell>
          <table:table-cell office:value-type="string">
            <text:p>designing systems and products</text:p>
          </table:table-cell>
          <table:table-cell table:number-columns-repeated="2"/>
          <table:table-cell office:value-type="string">
            <text:p>released</text:p>
          </table:table-cell>
          <table:table-cell office:value-type="string">
            <text:p>2020-12-02T16:09:56.551Z</text:p>
          </table:table-cell>
          <table:table-cell office:value-type="string">
            <text:p>Excludes:<text:line-break/>- Styling hair<text:line-break/>- Creating artistic, visual or instructive materials.</text:p>
          </table:table-cell>
          <table:table-cell office:value-type="string">
            <text:p>http://data.europa.eu/esco/concept-scheme/skills<text:line-break/>http://data.europa.eu/esco/concept-scheme/skills-hierarchy</text:p>
          </table:table-cell>
          <table:table-cell office:value-type="string">
            <text:p>Creating a plan or specification for the construction of an object, system or structure based on aesthetic and/or functional design concepts.</text:p>
          </table:table-cell>
          <table:table-cell office:value-type="string">
            <text:p>S1.11.0</text:p>
          </table:table-cell>
        </table:table-row>
        <table:table-row>
          <table:table-cell office:value-type="string">
            <text:p>SkillGroup</text:p>
          </table:table-cell>
          <table:table-cell office:value-type="string">
            <text:p>http://data.europa.eu/esco/skill/888f286e-272f-4e54-8a3b-9fa391870618</text:p>
          </table:table-cell>
          <table:table-cell office:value-type="string">
            <text:p>planting, pruning and harvesting trees, crops and other plants</text:p>
          </table:table-cell>
          <table:table-cell table:number-columns-repeated="2"/>
          <table:table-cell office:value-type="string">
            <text:p>released</text:p>
          </table:table-cell>
          <table:table-cell office:value-type="string">
            <text:p>2022-06-07T09:52:51.187Z</text:p>
          </table:table-cell>
          <table:table-cell office:value-type="string">
            <text:p>Examples:<text:line-break/>- Seed the ground<text:line-break/>- Propagate plants - Plant trees.</text:p>
          </table:table-cell>
          <table:table-cell office:value-type="string">
            <text:p>http://data.europa.eu/esco/concept-scheme/skills<text:line-break/>http://data.europa.eu/esco/concept-scheme/skills-hierarchy</text:p>
          </table:table-cell>
          <table:table-cell office:value-type="string">
            <text:p>Propagating and planting trees, flowers and other plants for production of food crops and other products, enhancing the environment or for scientific research.</text:p>
          </table:table-cell>
          <table:table-cell office:value-type="string">
            <text:p>S6.4.2</text:p>
          </table:table-cell>
        </table:table-row>
        <table:table-row>
          <table:table-cell office:value-type="string">
            <text:p>SkillGroup</text:p>
          </table:table-cell>
          <table:table-cell office:value-type="string">
            <text:p>http://data.europa.eu/esco/skill/8984a92c-416e-498f-abd3-a9dd819e5c03</text:p>
          </table:table-cell>
          <table:table-cell office:value-type="string">
            <text:p>installing floor and wall coverings</text:p>
          </table:table-cell>
          <table:table-cell table:number-columns-repeated="2"/>
          <table:table-cell office:value-type="string">
            <text:p>released</text:p>
          </table:table-cell>
          <table:table-cell/>
          <table:table-cell office:value-type="string">
            <text:p>Examples:<text:line-break/>- Lay marquetry<text:line-break/>- Lay resilient flooring tiles.</text:p>
          </table:table-cell>
          <table:table-cell office:value-type="string">
            <text:p>http://data.europa.eu/esco/concept-scheme/skills<text:line-break/>http://data.europa.eu/esco/concept-scheme/skills-hierarchy</text:p>
          </table:table-cell>
          <table:table-cell office:value-type="string">
            <text:p>Installing various types of floor and wall coverings, including tiling, carpets, linoleum and parquet.</text:p>
          </table:table-cell>
          <table:table-cell office:value-type="string">
            <text:p>S7.3.4</text:p>
          </table:table-cell>
        </table:table-row>
        <table:table-row>
          <table:table-cell office:value-type="string">
            <text:p>SkillGroup</text:p>
          </table:table-cell>
          <table:table-cell office:value-type="string">
            <text:p>http://data.europa.eu/esco/skill/89f8435a-ebc1-42b6-bf5c-496999e99776</text:p>
          </table:table-cell>
          <table:table-cell office:value-type="string">
            <text:p>preparing food and drinks</text:p>
          </table:table-cell>
          <table:table-cell table:number-columns-repeated="2"/>
          <table:table-cell office:value-type="string">
            <text:p>released</text:p>
          </table:table-cell>
          <table:table-cell/>
          <table:table-cell office:value-type="string">
            <text:p>Examples:<text:line-break/>- prepare meat dishes<text:line-break/>- prepare dairy products for use in a dish<text:line-break/>- prepare garnish for drinks Excludes:<text:line-break/>- manufacturing food products.</text:p>
          </table:table-cell>
          <table:table-cell office:value-type="string">
            <text:p>http://data.europa.eu/esco/concept-scheme/skills<text:line-break/>http://data.europa.eu/esco/concept-scheme/skills-hierarchy</text:p>
          </table:table-cell>
          <table:table-cell office:value-type="string">
            <text:p>Preparing and cooking meals and beverages.</text:p>
          </table:table-cell>
          <table:table-cell office:value-type="string">
            <text:p>S3.5.1</text:p>
          </table:table-cell>
        </table:table-row>
        <table:table-row>
          <table:table-cell office:value-type="string">
            <text:p>SkillGroup</text:p>
          </table:table-cell>
          <table:table-cell office:value-type="string">
            <text:p>http://data.europa.eu/esco/skill/8a3b45dc-8299-4b67-99db-6542daf79ac3</text:p>
          </table:table-cell>
          <table:table-cell office:value-type="string">
            <text:p>developing professional relationships or networks</text:p>
          </table:table-cell>
          <table:table-cell table:number-columns-repeated="2"/>
          <table:table-cell office:value-type="string">
            <text:p>released</text:p>
          </table:table-cell>
          <table:table-cell office:value-type="string">
            <text:p>2023-02-17T16:29:39.797Z</text:p>
          </table:table-cell>
          <table:table-cell office:value-type="string">
            <text:p>Examples: - develop communication networks with shipping sites<text:line-break/>- develop professional network<text:line-break/>- maintain relationship with suppliers.</text:p>
          </table:table-cell>
          <table:table-cell office:value-type="string">
            <text:p>http://data.europa.eu/esco/concept-scheme/skills<text:line-break/>http://data.europa.eu/esco/concept-scheme/skills-hierarchy</text:p>
          </table:table-cell>
          <table:table-cell office:value-type="string">
            <text:p>Developing alliances, contacts or partnerships with colleagues, clients and stakeholders.</text:p>
          </table:table-cell>
          <table:table-cell office:value-type="string">
            <text:p>S1.2.3</text:p>
          </table:table-cell>
        </table:table-row>
        <table:table-row>
          <table:table-cell office:value-type="string">
            <text:p>SkillGroup</text:p>
          </table:table-cell>
          <table:table-cell office:value-type="string">
            <text:p>http://data.europa.eu/esco/skill/8a57f720-70b3-41de-877c-7d723977dc88</text:p>
          </table:table-cell>
          <table:table-cell office:value-type="string">
            <text:p>measuring physical properties</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office:value-type="string">
            <text:p>Measuring the dimensions, weight, density and other physical properties of objects, materials and spaces.</text:p>
          </table:table-cell>
          <table:table-cell office:value-type="string">
            <text:p>S2.5</text:p>
          </table:table-cell>
        </table:table-row>
        <table:table-row>
          <table:table-cell office:value-type="string">
            <text:p>SkillGroup</text:p>
          </table:table-cell>
          <table:table-cell office:value-type="string">
            <text:p>http://data.europa.eu/esco/skill/8bbdf1f1-e943-45fc-af2f-1446cbd88245</text:p>
          </table:table-cell>
          <table:table-cell office:value-type="string">
            <text:p>using more than one language</text:p>
          </table:table-cell>
          <table:table-cell office:value-type="string">
            <text:p>working with different languages</text:p>
          </table:table-cell>
          <table:table-cell/>
          <table:table-cell office:value-type="string">
            <text:p>released</text:p>
          </table:table-cell>
          <table:table-cell/>
          <table:table-cell office:value-type="string">
            <text:p>Excludes:<text:line-break/>- skills and knowledge related to a specific language or dialect.</text:p>
          </table:table-cell>
          <table:table-cell office:value-type="string">
            <text:p>http://data.europa.eu/esco/concept-scheme/skills<text:line-break/>http://data.europa.eu/esco/concept-scheme/skills-hierarchy</text:p>
          </table:table-cell>
          <table:table-cell office:value-type="string">
            <text:p>Using more than one language or dialect to communicate verbally or in written form, or to translate from one language to another.</text:p>
          </table:table-cell>
          <table:table-cell office:value-type="string">
            <text:p>S1.15</text:p>
          </table:table-cell>
        </table:table-row>
        <table:table-row>
          <table:table-cell office:value-type="string">
            <text:p>SkillGroup</text:p>
          </table:table-cell>
          <table:table-cell office:value-type="string">
            <text:p>http://data.europa.eu/esco/skill/8bde58aa-9d5b-422b-801c-ff9186dd648e</text:p>
          </table:table-cell>
          <table:table-cell office:value-type="string">
            <text:p>handling and disposing of hazardous materials</text:p>
          </table:table-cell>
          <table:table-cell table:number-columns-repeated="2"/>
          <table:table-cell office:value-type="string">
            <text:p>released</text:p>
          </table:table-cell>
          <table:table-cell office:value-type="string">
            <text:p>2020-12-10T16:33:16.662Z</text:p>
          </table:table-cell>
          <table:table-cell office:value-type="string">
            <text:p>Hazardous waste is defined in accordance with the latest EU guidance on the classification of waste: https://europa.eu/!kr89QF Examples:<text:line-break/>- Dispose of medical waste - Handle chemical cleaning agents.</text:p>
          </table:table-cell>
          <table:table-cell office:value-type="string">
            <text:p>http://data.europa.eu/esco/concept-scheme/skills<text:line-break/>http://data.europa.eu/esco/concept-scheme/skills-hierarchy</text:p>
          </table:table-cell>
          <table:table-cell office:value-type="string">
            <text:p>Handling, collecting, storing and disposing of materials that pose substantial threats to public or personal health or the environment.</text:p>
          </table:table-cell>
          <table:table-cell office:value-type="string">
            <text:p>S6.13.1</text:p>
          </table:table-cell>
        </table:table-row>
        <table:table-row>
          <table:table-cell office:value-type="string">
            <text:p>SkillGroup</text:p>
          </table:table-cell>
          <table:table-cell office:value-type="string">
            <text:p>http://data.europa.eu/esco/skill/8bf9699c-f964-4e4b-ac3d-55aface09cbc</text:p>
          </table:table-cell>
          <table:table-cell office:value-type="string">
            <text:p>operating energy production or distribution equipment</text:p>
          </table:table-cell>
          <table:table-cell table:number-columns-repeated="2"/>
          <table:table-cell office:value-type="string">
            <text:p>released</text:p>
          </table:table-cell>
          <table:table-cell office:value-type="string">
            <text:p>2023-01-23T20:37:57.924Z</text:p>
          </table:table-cell>
          <table:table-cell office:value-type="string">
            <text:p>Examples:<text:line-break/>- Operate gas turbines<text:line-break/>- Operate ship propulsion system.</text:p>
          </table:table-cell>
          <table:table-cell office:value-type="string">
            <text:p>http://data.europa.eu/esco/concept-scheme/skills<text:line-break/>http://data.europa.eu/esco/concept-scheme/skills-hierarchy</text:p>
          </table:table-cell>
          <table:table-cell office:value-type="string">
            <text:p>Operating turbines, generators, boilers or power plants to generate rotary motion, electricity and heat. Operating energy transmission systems.</text:p>
          </table:table-cell>
          <table:table-cell office:value-type="string">
            <text:p>S8.4.4</text:p>
          </table:table-cell>
        </table:table-row>
        <table:table-row>
          <table:table-cell office:value-type="string">
            <text:p>SkillGroup</text:p>
          </table:table-cell>
          <table:table-cell office:value-type="string">
            <text:p>http://data.europa.eu/esco/skill/8c298a9b-e9ea-4396-897d-9aba982df6a0</text:p>
          </table:table-cell>
          <table:table-cell office:value-type="string">
            <text:p>advising on educational or vocational matters</text:p>
          </table:table-cell>
          <table:table-cell table:number-columns-repeated="2"/>
          <table:table-cell office:value-type="string">
            <text:p>released</text:p>
          </table:table-cell>
          <table:table-cell/>
          <table:table-cell office:value-type="string">
            <text:p>Examples:<text:line-break/>- advise on career<text:line-break/>- advise lesson plans<text:line-break/>- advise on training - provide assistance with job search Includes:<text:line-break/>- managing own career.</text:p>
          </table:table-cell>
          <table:table-cell office:value-type="string">
            <text:p>http://data.europa.eu/esco/concept-scheme/skills<text:line-break/>http://data.europa.eu/esco/concept-scheme/skills-hierarchy</text:p>
          </table:table-cell>
          <table:table-cell office:value-type="string">
            <text:p>Providing information, advice and guidance on educational and training courses, teaching and learning methods, careers or job search.</text:p>
          </table:table-cell>
          <table:table-cell office:value-type="string">
            <text:p>S1.5.8</text:p>
          </table:table-cell>
        </table:table-row>
        <table:table-row>
          <table:table-cell office:value-type="string">
            <text:p>SkillGroup</text:p>
          </table:table-cell>
          <table:table-cell office:value-type="string">
            <text:p>http://data.europa.eu/esco/skill/8d80f33a-ab38-429b-a4ed-3b1a6f8f3b4a</text:p>
          </table:table-cell>
          <table:table-cell office:value-type="string">
            <text:p>operating mixing and separating machinery</text:p>
          </table:table-cell>
          <table:table-cell table:number-columns-repeated="2"/>
          <table:table-cell office:value-type="string">
            <text:p>released</text:p>
          </table:table-cell>
          <table:table-cell office:value-type="string">
            <text:p>2023-11-07T09:56:43.087Z</text:p>
          </table:table-cell>
          <table:table-cell office:value-type="string">
            <text:p>Excludes:<text:line-break/>- Operating handheld tools such as kitchen blenders. Examples:<text:line-break/>- Tend centrifuge machines<text:line-break/>- Operate rubber mixing machine<text:line-break/>- Tend tumbling barrels.</text:p>
          </table:table-cell>
          <table:table-cell office:value-type="string">
            <text:p>http://data.europa.eu/esco/concept-scheme/skills<text:line-break/>http://data.europa.eu/esco/concept-scheme/skills-hierarchy</text:p>
          </table:table-cell>
          <table:table-cell office:value-type="string">
            <text:p>Operating machinery for mixing, blending and separating liquid or solid materials.</text:p>
          </table:table-cell>
          <table:table-cell office:value-type="string">
            <text:p>S8.5.5</text:p>
          </table:table-cell>
        </table:table-row>
        <table:table-row>
          <table:table-cell office:value-type="string">
            <text:p>SkillGroup</text:p>
          </table:table-cell>
          <table:table-cell office:value-type="string">
            <text:p>http://data.europa.eu/esco/skill/8da6cd59-61e1-43c4-8dfc-bc69d283ccc7</text:p>
          </table:table-cell>
          <table:table-cell office:value-type="string">
            <text:p>packaging objects</text:p>
          </table:table-cell>
          <table:table-cell table:number-columns-repeated="2"/>
          <table:table-cell office:value-type="string">
            <text:p>released</text:p>
          </table:table-cell>
          <table:table-cell/>
          <table:table-cell office:value-type="string">
            <text:p>Examples:<text:line-break/>- Pack merchandise for gifts<text:line-break/>- Fill sacks<text:line-break/>- Package fish.</text:p>
          </table:table-cell>
          <table:table-cell office:value-type="string">
            <text:p>http://data.europa.eu/esco/concept-scheme/skills<text:line-break/>http://data.europa.eu/esco/concept-scheme/skills-hierarchy</text:p>
          </table:table-cell>
          <table:table-cell office:value-type="string">
            <text:p>Enclosing or protecting products for distribution or storage according to a coordinated system of preparing goods for transport, warehousing, logistics, sale, and use.</text:p>
          </table:table-cell>
          <table:table-cell office:value-type="string">
            <text:p>S6.1.3</text:p>
          </table:table-cell>
        </table:table-row>
        <table:table-row>
          <table:table-cell office:value-type="string">
            <text:p>SkillGroup</text:p>
          </table:table-cell>
          <table:table-cell office:value-type="string">
            <text:p>http://data.europa.eu/esco/skill/8ddcb295-707e-459c-ba6a-66ffb37835c5</text:p>
          </table:table-cell>
          <table:table-cell office:value-type="string">
            <text:p>operating audio-visual equipment</text:p>
          </table:table-cell>
          <table:table-cell table:number-columns-repeated="2"/>
          <table:table-cell office:value-type="string">
            <text:p>released</text:p>
          </table:table-cell>
          <table:table-cell office:value-type="string">
            <text:p>2021-03-16T14:30:52.553Z</text:p>
          </table:table-cell>
          <table:table-cell office:value-type="string">
            <text:p>Excludes:<text:line-break/>- Installing and setting up precision equipment Examples:<text:line-break/>- Operate an audio mixing console<text:line-break/>- Operate a camera<text:line-break/>- Operate lighting equipment.</text:p>
          </table:table-cell>
          <table:table-cell office:value-type="string">
            <text:p>http://data.europa.eu/esco/concept-scheme/skills<text:line-break/>http://data.europa.eu/esco/concept-scheme/skills-hierarchy</text:p>
          </table:table-cell>
          <table:table-cell office:value-type="string">
            <text:p>Controlling, monitoring, and adjusting precision instrumentation and equipment for recording of sound, video and images, and for use in live performances or exhibitions.</text:p>
          </table:table-cell>
          <table:table-cell office:value-type="string">
            <text:p>S8.6.2</text:p>
          </table:table-cell>
        </table:table-row>
        <table:table-row>
          <table:table-cell office:value-type="string">
            <text:p>SkillGroup</text:p>
          </table:table-cell>
          <table:table-cell office:value-type="string">
            <text:p>http://data.europa.eu/esco/skill/8e77453d-3665-4d00-b887-2e9adb29cd15</text:p>
          </table:table-cell>
          <table:table-cell office:value-type="string">
            <text:p>operating rail vehicles</text:p>
          </table:table-cell>
          <table:table-cell table:number-columns-repeated="2"/>
          <table:table-cell office:value-type="string">
            <text:p>released</text:p>
          </table:table-cell>
          <table:table-cell office:value-type="string">
            <text:p>2022-06-19T15:45:14.266Z</text:p>
          </table:table-cell>
          <table:table-cell office:value-type="string">
            <text:p>Excludes:<text:line-break/>- Operating cable propelled vehicles such as funiculars Examples:<text:line-break/>- Drive trams<text:line-break/>- Operate railway vehicles<text:line-break/>- Shunt rolling stock in marshalling yards.</text:p>
          </table:table-cell>
          <table:table-cell office:value-type="string">
            <text:p>http://data.europa.eu/esco/concept-scheme/skills<text:line-break/>http://data.europa.eu/esco/concept-scheme/skills-hierarchy</text:p>
          </table:table-cell>
          <table:table-cell office:value-type="string">
            <text:p>Controlling the movement of rail vehicles such as trains and trams.</text:p>
          </table:table-cell>
          <table:table-cell office:value-type="string">
            <text:p>S8.2.3</text:p>
          </table:table-cell>
        </table:table-row>
        <table:table-row>
          <table:table-cell office:value-type="string">
            <text:p>SkillGroup</text:p>
          </table:table-cell>
          <table:table-cell office:value-type="string">
            <text:p>http://data.europa.eu/esco/skill/8eb65708-6a1c-4a11-8b51-ed9331962142</text:p>
          </table:table-cell>
          <table:table-cell office:value-type="string">
            <text:p>installing and assembling rigging equipment</text:p>
          </table:table-cell>
          <table:table-cell table:number-columns-repeated="2"/>
          <table:table-cell office:value-type="string">
            <text:p>released</text:p>
          </table:table-cell>
          <table:table-cell/>
          <table:table-cell office:value-type="string">
            <text:p>Examples:<text:line-break/>- Install crane equipment<text:line-break/>- Assemble circus rigging equipment<text:line-break/>- Hang chain hoists.</text:p>
          </table:table-cell>
          <table:table-cell office:value-type="string">
            <text:p>http://data.europa.eu/esco/concept-scheme/skills<text:line-break/>http://data.europa.eu/esco/concept-scheme/skills-hierarchy</text:p>
          </table:table-cell>
          <table:table-cell office:value-type="string">
            <text:p>Installing and assembling rigging equipment such as cables, ropes, pulleys and winches to safely secure high structures or lift heavy weights.</text:p>
          </table:table-cell>
          <table:table-cell office:value-type="string">
            <text:p>S7.1.8</text:p>
          </table:table-cell>
        </table:table-row>
        <table:table-row>
          <table:table-cell office:value-type="string">
            <text:p>SkillGroup</text:p>
          </table:table-cell>
          <table:table-cell office:value-type="string">
            <text:p>http://data.europa.eu/esco/skill/8ed41305-4abf-4b54-9f8f-0e043d26feba</text:p>
          </table:table-cell>
          <table:table-cell office:value-type="string">
            <text:p>developing policies and legislation</text:p>
          </table:table-cell>
          <table:table-cell table:number-columns-repeated="2"/>
          <table:table-cell office:value-type="string">
            <text:p>released</text:p>
          </table:table-cell>
          <table:table-cell office:value-type="string">
            <text:p>2022-08-02T10:52:47.757Z</text:p>
          </table:table-cell>
          <table:table-cell office:value-type="string">
            <text:p>Examples:<text:line-break/>- develop environmental policy<text:line-break/>- plan public housing Excludes: - develop working procedures.</text:p>
          </table:table-cell>
          <table:table-cell office:value-type="string">
            <text:p>http://data.europa.eu/esco/concept-scheme/skills<text:line-break/>http://data.europa.eu/esco/concept-scheme/skills-hierarchy</text:p>
          </table:table-cell>
          <table:table-cell office:value-type="string">
            <text:p>Developing national or international policies and legislation to regulate conduct or set minimum standards in specific sectors and regulatory areas.</text:p>
          </table:table-cell>
          <table:table-cell office:value-type="string">
            <text:p>S4.1.4</text:p>
          </table:table-cell>
        </table:table-row>
        <table:table-row>
          <table:table-cell office:value-type="string">
            <text:p>SkillGroup</text:p>
          </table:table-cell>
          <table:table-cell office:value-type="string">
            <text:p>http://data.europa.eu/esco/skill/8f9f8b20-ff26-4392-b04f-695dcde5b90a</text:p>
          </table:table-cell>
          <table:table-cell office:value-type="string">
            <text:p>presenting research or technical information</text:p>
          </table:table-cell>
          <table:table-cell table:number-columns-repeated="2"/>
          <table:table-cell office:value-type="string">
            <text:p>released</text:p>
          </table:table-cell>
          <table:table-cell office:value-type="string">
            <text:p>2022-06-19T15:45:14.266Z</text:p>
          </table:table-cell>
          <table:table-cell office:value-type="string">
            <text:p>Examples:<text:line-break/>- present legislation proposal<text:line-break/>- present detailed design proposal<text:line-break/>- perform lectures<text:line-break/>- deliver visual presentation of data.</text:p>
          </table:table-cell>
          <table:table-cell office:value-type="string">
            <text:p>http://data.europa.eu/esco/concept-scheme/skills<text:line-break/>http://data.europa.eu/esco/concept-scheme/skills-hierarchy</text:p>
          </table:table-cell>
          <table:table-cell office:value-type="string">
            <text:p>Presenting information of a technical or academic nature to an audience, including presenting the results of research.</text:p>
          </table:table-cell>
          <table:table-cell office:value-type="string">
            <text:p>S1.4.2</text:p>
          </table:table-cell>
        </table:table-row>
        <table:table-row>
          <table:table-cell office:value-type="string">
            <text:p>SkillGroup</text:p>
          </table:table-cell>
          <table:table-cell office:value-type="string">
            <text:p>http://data.europa.eu/esco/skill/8fde007e-ea4c-48c2-84c5-752834acd31d</text:p>
          </table:table-cell>
          <table:table-cell office:value-type="string">
            <text:p>conducting studies, investigations and examinations</text:p>
          </table:table-cell>
          <table:table-cell table:number-columns-repeated="2"/>
          <table:table-cell office:value-type="string">
            <text:p>released</text:p>
          </table:table-cell>
          <table:table-cell office:value-type="string">
            <text:p>2023-02-21T15:14:24.011Z</text:p>
          </table:table-cell>
          <table:table-cell/>
          <table:table-cell office:value-type="string">
            <text:p>http://data.europa.eu/esco/concept-scheme/skills<text:line-break/>http://data.europa.eu/esco/concept-scheme/skills-hierarchy</text:p>
          </table:table-cell>
          <table:table-cell office:value-type="string">
            <text:p>Conducting studies, investigations, and examinations to increase knowledge and understanding, diagnose problems or identify needs and requirements.</text:p>
          </table:table-cell>
          <table:table-cell office:value-type="string">
            <text:p>S2.1.0</text:p>
          </table:table-cell>
        </table:table-row>
        <table:table-row>
          <table:table-cell office:value-type="string">
            <text:p>SkillGroup</text:p>
          </table:table-cell>
          <table:table-cell office:value-type="string">
            <text:p>http://data.europa.eu/esco/skill/906211b3-afed-4a2b-b5e1-33f2885fee85</text:p>
          </table:table-cell>
          <table:table-cell office:value-type="string">
            <text:p>performing general clerical and administrative tasks</text:p>
          </table:table-cell>
          <table:table-cell table:number-columns-repeated="2"/>
          <table:table-cell office:value-type="string">
            <text:p>released</text:p>
          </table:table-cell>
          <table:table-cell/>
          <table:table-cell office:value-type="string">
            <text:p>Examples:<text:line-break/>- perform clerical duties.</text:p>
          </table:table-cell>
          <table:table-cell office:value-type="string">
            <text:p>http://data.europa.eu/esco/concept-scheme/skills<text:line-break/>http://data.europa.eu/esco/concept-scheme/skills-hierarchy</text:p>
          </table:table-cell>
          <table:table-cell office:value-type="string">
            <text:p>Performing general clerical and administrative tasks such as collecting mail and organising documents, not involving administration of human resources, execution of financial transactions, or processing and transforming information or data.</text:p>
          </table:table-cell>
          <table:table-cell office:value-type="string">
            <text:p>S4.4.3</text:p>
          </table:table-cell>
        </table:table-row>
        <table:table-row>
          <table:table-cell office:value-type="string">
            <text:p>SkillGroup</text:p>
          </table:table-cell>
          <table:table-cell office:value-type="string">
            <text:p>http://data.europa.eu/esco/skill/91860993-1a8b-4473-91f3-600aa1924bd0</text:p>
          </table:table-cell>
          <table:table-cell office:value-type="string">
            <text:p>taking a proactive approach</text:p>
          </table:table-cell>
          <table:table-cell office:value-type="string">
            <text:p>identify opportunities<text:line-break/>proactive personality<text:line-break/>be proactive<text:line-break/>recognise opportunities<text:line-break/>recognising opportunities</text:p>
          </table:table-cell>
          <table:table-cell office:value-type="string">
            <text:p>forward-thinking<text:line-break/>forward-looking thinking<text:line-break/>proactive</text:p>
          </table:table-cell>
          <table:table-cell office:value-type="string">
            <text:p>released</text:p>
          </table:table-cell>
          <table:table-cell office:value-type="string">
            <text:p>2021-08-30T16:01:08.179Z</text:p>
          </table:table-cell>
          <table:table-cell/>
          <table:table-cell office:value-type="string">
            <text:p>http://data.europa.eu/esco/concept-scheme/skills<text:line-break/>http://data.europa.eu/esco/concept-scheme/skills-hierarchy<text:line-break/>http://data.europa.eu/esco/concept-scheme/skill-transversal-groups</text:p>
          </table:table-cell>
          <table:table-cell office:value-type="string">
            <text:p>Accept responsibilities for managing activities and adopt a forward-looking approach to anticipate problems but also identify opportunities.</text:p>
          </table:table-cell>
          <table:table-cell office:value-type="string">
            <text:p>T3.2</text:p>
          </table:table-cell>
        </table:table-row>
        <table:table-row>
          <table:table-cell office:value-type="string">
            <text:p>SkillGroup</text:p>
          </table:table-cell>
          <table:table-cell office:value-type="string">
            <text:p>http://data.europa.eu/esco/skill/91b0b918-942e-4661-b88c-70b9396529e5</text:p>
          </table:table-cell>
          <table:table-cell office:value-type="string">
            <text:p>working with others</text:p>
          </table:table-cell>
          <table:table-cell table:number-columns-repeated="2"/>
          <table:table-cell office:value-type="string">
            <text:p>released</text:p>
          </table:table-cell>
          <table:table-cell office:value-type="string">
            <text:p>2021-12-17T12:53:52.273Z</text:p>
          </table:table-cell>
          <table:table-cell office:value-type="string">
            <text:p>Excludes:<text:line-break/>- Management, supervision and coordination of teams.</text:p>
          </table:table-cell>
          <table:table-cell office:value-type="string">
            <text:p>http://data.europa.eu/esco/concept-scheme/skills<text:line-break/>http://data.europa.eu/esco/concept-scheme/skills-hierarchy</text:p>
          </table:table-cell>
          <table:table-cell office:value-type="string">
            <text:p>Working with other people, understanding and respecting the roles and competencies of others.</text:p>
          </table:table-cell>
          <table:table-cell office:value-type="string">
            <text:p>S1.8.0</text:p>
          </table:table-cell>
        </table:table-row>
        <table:table-row>
          <table:table-cell office:value-type="string">
            <text:p>SkillGroup</text:p>
          </table:table-cell>
          <table:table-cell office:value-type="string">
            <text:p>http://data.europa.eu/esco/skill/925af2b5-2f4d-4cce-92cc-79e1ff887c7d</text:p>
          </table:table-cell>
          <table:table-cell office:value-type="string">
            <text:p>following ethical code of conduct</text:p>
          </table:table-cell>
          <table:table-cell office:value-type="string">
            <text:p>values<text:line-break/>handling of values<text:line-break/>morals<text:line-break/>value orientation<text:line-break/>ethics<text:line-break/>scruples<text:line-break/>beliefs</text:p>
          </table:table-cell>
          <table:table-cell office:value-type="string">
            <text:p>sense of justice<text:line-break/>idealism<text:line-break/>good manners<text:line-break/>justice<text:line-break/>good behaviour</text:p>
          </table:table-cell>
          <table:table-cell office:value-type="string">
            <text:p>released</text:p>
          </table:table-cell>
          <table:table-cell office:value-type="string">
            <text:p>2021-09-03T15:52:21.316Z</text:p>
          </table:table-cell>
          <table:table-cell/>
          <table:table-cell office:value-type="string">
            <text:p>http://data.europa.eu/esco/concept-scheme/skills<text:line-break/>http://data.europa.eu/esco/concept-scheme/skills-hierarchy<text:line-break/>http://data.europa.eu/esco/concept-scheme/skill-transversal-groups</text:p>
          </table:table-cell>
          <table:table-cell office:value-type="string">
            <text:p>Carry out workplace activities according to accepted principles of right and wrong, including fairness, transparency and impartiality in work practices and conduct towards other people.</text:p>
          </table:table-cell>
          <table:table-cell office:value-type="string">
            <text:p>T4.5</text:p>
          </table:table-cell>
        </table:table-row>
        <table:table-row>
          <table:table-cell office:value-type="string">
            <text:p>SkillGroup</text:p>
          </table:table-cell>
          <table:table-cell office:value-type="string">
            <text:p>http://data.europa.eu/esco/skill/92fc9726-5b5e-439e-a33c-06a8c63fbb9a</text:p>
          </table:table-cell>
          <table:table-cell office:value-type="string">
            <text:p>allocating and controlling resources</text:p>
          </table:table-cell>
          <table:table-cell office:value-type="string">
            <text:p>managing resources</text:p>
          </table:table-cell>
          <table:table-cell/>
          <table:table-cell office:value-type="string">
            <text:p>released</text:p>
          </table:table-cell>
          <table:table-cell office:value-type="string">
            <text:p>2021-12-17T12:49:57.067Z</text:p>
          </table:table-cell>
          <table:table-cell office:value-type="string">
            <text:p>Excludes:<text:line-break/>- Delegate activities.</text:p>
          </table:table-cell>
          <table:table-cell office:value-type="string">
            <text:p>http://data.europa.eu/esco/concept-scheme/skills<text:line-break/>http://data.europa.eu/esco/concept-scheme/skills-hierarchy</text:p>
          </table:table-cell>
          <table:table-cell office:value-type="string">
            <text:p>Determining the distribution and availability of people, assets, materials or capital to accomplish organizational goals and putting in place financial and administrative controls.</text:p>
          </table:table-cell>
          <table:table-cell office:value-type="string">
            <text:p>S4.3.0</text:p>
          </table:table-cell>
        </table:table-row>
        <table:table-row>
          <table:table-cell office:value-type="string">
            <text:p>SkillGroup</text:p>
          </table:table-cell>
          <table:table-cell office:value-type="string">
            <text:p>http://data.europa.eu/esco/skill/95bf4552-6d5b-41dc-b990-53ace372f705</text:p>
          </table:table-cell>
          <table:table-cell office:value-type="string">
            <text:p>documenting technical designs, procedures, problems or activities</text:p>
          </table:table-cell>
          <table:table-cell table:number-columns-repeated="2"/>
          <table:table-cell office:value-type="string">
            <text:p>released</text:p>
          </table:table-cell>
          <table:table-cell/>
          <table:table-cell office:value-type="string">
            <text:p>Examples:<text:line-break/>- create documented procedures<text:line-break/>- maintain food specifications<text:line-break/>- provide manufacturing documentation Excludes:<text:line-break/>- write reports or documents requiring drafting of original text.</text:p>
          </table:table-cell>
          <table:table-cell office:value-type="string">
            <text:p>http://data.europa.eu/esco/concept-scheme/skills<text:line-break/>http://data.europa.eu/esco/concept-scheme/skills-hierarchy</text:p>
          </table:table-cell>
          <table:table-cell office:value-type="string">
            <text:p>Preparing and maintaining documentation and specifications of designs, equipment and operating procedures.</text:p>
          </table:table-cell>
          <table:table-cell office:value-type="string">
            <text:p>S2.2.6</text:p>
          </table:table-cell>
        </table:table-row>
        <table:table-row>
          <table:table-cell office:value-type="string">
            <text:p>SkillGroup</text:p>
          </table:table-cell>
          <table:table-cell office:value-type="string">
            <text:p>http://data.europa.eu/esco/skill/969845ce-6895-44a8-a3d2-b8c2d8b5de21</text:p>
          </table:table-cell>
          <table:table-cell office:value-type="string">
            <text:p>caring for children</text:p>
          </table:table-cell>
          <table:table-cell table:number-columns-repeated="2"/>
          <table:table-cell office:value-type="string">
            <text:p>released</text:p>
          </table:table-cell>
          <table:table-cell/>
          <table:table-cell office:value-type="string">
            <text:p>Examples:<text:line-break/>- attend to children's basic physical needs<text:line-break/>- play with children Excludes:<text:line-break/>- administration of medical treatments and therapies<text:line-break/>- counsel and provide support to children to resolve personal, psychological or social problems.</text:p>
          </table:table-cell>
          <table:table-cell office:value-type="string">
            <text:p>http://data.europa.eu/esco/concept-scheme/skills<text:line-break/>http://data.europa.eu/esco/concept-scheme/skills-hierarchy</text:p>
          </table:table-cell>
          <table:table-cell office:value-type="string">
            <text:p>Providing care for and assistance to children.</text:p>
          </table:table-cell>
          <table:table-cell office:value-type="string">
            <text:p>S3.6.3</text:p>
          </table:table-cell>
        </table:table-row>
        <table:table-row>
          <table:table-cell office:value-type="string">
            <text:p>SkillGroup</text:p>
          </table:table-cell>
          <table:table-cell office:value-type="string">
            <text:p>http://data.europa.eu/esco/skill/97ff8a90-ec21-4f13-9b58-22cc9fc47221</text:p>
          </table:table-cell>
          <table:table-cell office:value-type="string">
            <text:p>installing structural masonry materials</text:p>
          </table:table-cell>
          <table:table-cell table:number-columns-repeated="2"/>
          <table:table-cell office:value-type="string">
            <text:p>released</text:p>
          </table:table-cell>
          <table:table-cell/>
          <table:table-cell office:value-type="string">
            <text:p>Excludes:<text:line-break/>- Pouring concrete<text:line-break/>- Installing roofing Examples:<text:line-break/>- Lay bricks<text:line-break/>- Place gypsum blocks.</text:p>
          </table:table-cell>
          <table:table-cell office:value-type="string">
            <text:p>http://data.europa.eu/esco/concept-scheme/skills<text:line-break/>http://data.europa.eu/esco/concept-scheme/skills-hierarchy</text:p>
          </table:table-cell>
          <table:table-cell office:value-type="string">
            <text:p>Forming structures using masonry materials such as bricks, stone, blocks, and mortar.</text:p>
          </table:table-cell>
          <table:table-cell office:value-type="string">
            <text:p>S7.1.1</text:p>
          </table:table-cell>
        </table:table-row>
        <table:table-row>
          <table:table-cell office:value-type="string">
            <text:p>SkillGroup</text:p>
          </table:table-cell>
          <table:table-cell office:value-type="string">
            <text:p>http://data.europa.eu/esco/skill/9827c329-3492-4e8d-852c-da0894228ff6</text:p>
          </table:table-cell>
          <table:table-cell office:value-type="string">
            <text:p>allocating and controlling resources</text:p>
          </table:table-cell>
          <table:table-cell office:value-type="string">
            <text:p>managing resources</text:p>
          </table:table-cell>
          <table:table-cell/>
          <table:table-cell office:value-type="string">
            <text:p>released</text:p>
          </table:table-cell>
          <table:table-cell/>
          <table:table-cell office:value-type="string">
            <text:p>Excludes:<text:line-break/>- Delegate activities.</text:p>
          </table:table-cell>
          <table:table-cell office:value-type="string">
            <text:p>http://data.europa.eu/esco/concept-scheme/skills<text:line-break/>http://data.europa.eu/esco/concept-scheme/skills-hierarchy</text:p>
          </table:table-cell>
          <table:table-cell office:value-type="string">
            <text:p>Determining the distribution and availability of people, assets, materials or capital to accomplish organizational goals and putting in place financial and administrative controls.</text:p>
          </table:table-cell>
          <table:table-cell office:value-type="string">
            <text:p>S4.3</text:p>
          </table:table-cell>
        </table:table-row>
        <table:table-row>
          <table:table-cell office:value-type="string">
            <text:p>SkillGroup</text:p>
          </table:table-cell>
          <table:table-cell office:value-type="string">
            <text:p>http://data.europa.eu/esco/skill/98fb499f-9155-412d-a8a0-95ba97126fec</text:p>
          </table:table-cell>
          <table:table-cell office:value-type="string">
            <text:p>using digital tools for collaboration and productivity</text:p>
          </table:table-cell>
          <table:table-cell table:number-columns-repeated="2"/>
          <table:table-cell office:value-type="string">
            <text:p>released</text:p>
          </table:table-cell>
          <table:table-cell office:value-type="string">
            <text:p>2023-06-30T08:18:14.318Z</text:p>
          </table:table-cell>
          <table:table-cell office:value-type="string">
            <text:p>Excludes:<text:line-break/>- Computer programming<text:line-break/>- Resolving computer problems Examples:<text:line-break/>- Use email software and services<text:line-break/>- Operate GPS systems<text:line-break/>- Use personal organisation software.</text:p>
          </table:table-cell>
          <table:table-cell office:value-type="string">
            <text:p>http://data.europa.eu/esco/concept-scheme/skills<text:line-break/>http://data.europa.eu/esco/concept-scheme/skills-hierarchy</text:p>
          </table:table-cell>
          <table:table-cell office:value-type="string">
            <text:p>Using ICT software and hardware to collaborate and communicate with others and to improve productivity.</text:p>
          </table:table-cell>
          <table:table-cell office:value-type="string">
            <text:p>S5.6.1</text:p>
          </table:table-cell>
        </table:table-row>
        <table:table-row>
          <table:table-cell office:value-type="string">
            <text:p>SkillGroup</text:p>
          </table:table-cell>
          <table:table-cell office:value-type="string">
            <text:p>http://data.europa.eu/esco/skill/9a540c0f-81c0-4687-a14b-e9196d9af6c0</text:p>
          </table:table-cell>
          <table:table-cell office:value-type="string">
            <text:p>giving instructions</text:p>
          </table:table-cell>
          <table:table-cell table:number-columns-repeated="2"/>
          <table:table-cell office:value-type="string">
            <text:p>released</text:p>
          </table:table-cell>
          <table:table-cell office:value-type="string">
            <text:p>2023-10-27T15:23:01.397Z</text:p>
          </table:table-cell>
          <table:table-cell office:value-type="string">
            <text:p>Examples:<text:line-break/>- give instructions to staff<text:line-break/>- direct airport subcontractors Excludes:<text:line-break/>- direct and coordinate operational activities.</text:p>
          </table:table-cell>
          <table:table-cell office:value-type="string">
            <text:p>http://data.europa.eu/esco/concept-scheme/skills<text:line-break/>http://data.europa.eu/esco/concept-scheme/skills-hierarchy</text:p>
          </table:table-cell>
          <table:table-cell office:value-type="string">
            <text:p>Giving instructions and directions to co-workers, subordinates or students or members of the public by employing various communication techniques. Adjusting communication style to the target audience in order to convey instructions as intended.</text:p>
          </table:table-cell>
          <table:table-cell office:value-type="string">
            <text:p>S1.8.2</text:p>
          </table:table-cell>
        </table:table-row>
        <table:table-row>
          <table:table-cell office:value-type="string">
            <text:p>SkillGroup</text:p>
          </table:table-cell>
          <table:table-cell office:value-type="string">
            <text:p>http://data.europa.eu/esco/skill/9adca63b-9c75-4804-8dab-d62872540a10</text:p>
          </table:table-cell>
          <table:table-cell office:value-type="string">
            <text:p>mastering languages</text:p>
          </table:table-cell>
          <table:table-cell office:value-type="string">
            <text:p>multilinguism<text:line-break/>language skills<text:line-break/>language proficiency<text:line-break/>talent for languages</text:p>
          </table:table-cell>
          <table:table-cell office:value-type="string">
            <text:p>using more than one language<text:line-break/>foreign language<text:line-break/>good language skills<text:line-break/>listening comprehension<text:line-break/>clear and articulate pronunciation<text:line-break/>having specific language skills<text:line-break/>second foreign language</text:p>
          </table:table-cell>
          <table:table-cell office:value-type="string">
            <text:p>released</text:p>
          </table:table-cell>
          <table:table-cell office:value-type="string">
            <text:p>2023-11-22T12:48:36.576Z</text:p>
          </table:table-cell>
          <table:table-cell/>
          <table:table-cell office:value-type="string">
            <text:p>http://data.europa.eu/esco/concept-scheme/skills<text:line-break/>http://data.europa.eu/esco/concept-scheme/skills-hierarchy<text:line-break/>http://data.europa.eu/esco/concept-scheme/skill-transversal-groups</text:p>
          </table:table-cell>
          <table:table-cell office:value-type="string">
            <text:p>Communicate through reading, writing, speaking and listening in the mother tongue and/or in a foreign language.</text:p>
          </table:table-cell>
          <table:table-cell office:value-type="string">
            <text:p>T1.1</text:p>
          </table:table-cell>
        </table:table-row>
        <table:table-row>
          <table:table-cell office:value-type="string">
            <text:p>SkillGroup</text:p>
          </table:table-cell>
          <table:table-cell office:value-type="string">
            <text:p>http://data.europa.eu/esco/skill/9b8bb484-dcba-49af-8ae0-cfe8b6e9ed45</text:p>
          </table:table-cell>
          <table:table-cell office:value-type="string">
            <text:p>working with machinery and specialised equipment</text:p>
          </table:table-cell>
          <table:table-cell office:value-type="string">
            <text:p>machinery, equipment, vehicles</text:p>
          </table:table-cell>
          <table:table-cell/>
          <table:table-cell office:value-type="string">
            <text:p>released</text:p>
          </table:table-cell>
          <table:table-cell/>
          <table:table-cell office:value-type="string">
            <text:p>Excludes:<text:line-break/>- Interacting with computers.</text:p>
          </table:table-cell>
          <table:table-cell office:value-type="string">
            <text:p>http://data.europa.eu/esco/concept-scheme/skills<text:line-break/>http://data.europa.eu/esco/concept-scheme/skills-hierarchy</text:p>
          </table:table-cell>
          <table:table-cell office:value-type="string">
            <text:p>Controlling, operating and monitoring vehicles, stationary and mobile machinery and precision instrumentation and equipment.</text:p>
          </table:table-cell>
          <table:table-cell office:value-type="string">
            <text:p>S8</text:p>
          </table:table-cell>
        </table:table-row>
        <table:table-row>
          <table:table-cell office:value-type="string">
            <text:p>SkillGroup</text:p>
          </table:table-cell>
          <table:table-cell office:value-type="string">
            <text:p>http://data.europa.eu/esco/skill/9bdf8a77-8524-43da-bac6-d15d22e1b7ed</text:p>
          </table:table-cell>
          <table:table-cell office:value-type="string">
            <text:p>entering and transforming information</text:p>
          </table:table-cell>
          <table:table-cell table:number-columns-repeated="2"/>
          <table:table-cell office:value-type="string">
            <text:p>released</text:p>
          </table:table-cell>
          <table:table-cell/>
          <table:table-cell office:value-type="string">
            <text:p>Examples:<text:line-break/>- format documents<text:line-break/>- transcribe data<text:line-break/>- input data into computers Excludes:<text:line-break/>- skills in the use of specific ICT tools to process data<text:line-break/>- perform mathematical calculations.</text:p>
          </table:table-cell>
          <table:table-cell office:value-type="string">
            <text:p>http://data.europa.eu/esco/concept-scheme/skills<text:line-break/>http://data.europa.eu/esco/concept-scheme/skills-hierarchy</text:p>
          </table:table-cell>
          <table:table-cell office:value-type="string">
            <text:p>Entering and transforming information in electronic or other information systems.</text:p>
          </table:table-cell>
          <table:table-cell office:value-type="string">
            <text:p>S2.4.2</text:p>
          </table:table-cell>
        </table:table-row>
        <table:table-row>
          <table:table-cell office:value-type="string">
            <text:p>SkillGroup</text:p>
          </table:table-cell>
          <table:table-cell office:value-type="string">
            <text:p>http://data.europa.eu/esco/skill/9c17f73f-345c-4c55-8b59-47b445941b7b</text:p>
          </table:table-cell>
          <table:table-cell office:value-type="string">
            <text:p>mediating and resolving disputes</text:p>
          </table:table-cell>
          <table:table-cell table:number-columns-repeated="2"/>
          <table:table-cell office:value-type="string">
            <text:p>released</text:p>
          </table:table-cell>
          <table:table-cell office:value-type="string">
            <text:p>2021-12-17T12:56:02.187Z</text:p>
          </table:table-cell>
          <table:table-cell office:value-type="string">
            <text:p>Excludes:<text:line-break/>- making decisions Examples include: - moderate in negotiations - handle financial disputes.</text:p>
          </table:table-cell>
          <table:table-cell office:value-type="string">
            <text:p>http://data.europa.eu/esco/concept-scheme/skills<text:line-break/>http://data.europa.eu/esco/concept-scheme/skills-hierarchy</text:p>
          </table:table-cell>
          <table:table-cell office:value-type="string">
            <text:p>Working with two or more separate people or groups involved in a disagreement or dispute to bring about an agreement, settlement or compromise.</text:p>
          </table:table-cell>
          <table:table-cell office:value-type="string">
            <text:p>S1.1.2</text:p>
          </table:table-cell>
        </table:table-row>
        <table:table-row>
          <table:table-cell office:value-type="string">
            <text:p>SkillGroup</text:p>
          </table:table-cell>
          <table:table-cell office:value-type="string">
            <text:p>http://data.europa.eu/esco/skill/9d0d6866-cd91-490b-9e3a-d0914ad95a2e</text:p>
          </table:table-cell>
          <table:table-cell office:value-type="string">
            <text:p>handling animals</text:p>
          </table:table-cell>
          <table:table-cell table:number-columns-repeated="2"/>
          <table:table-cell office:value-type="string">
            <text:p>released</text:p>
          </table:table-cell>
          <table:table-cell office:value-type="string">
            <text:p>2021-09-15T09:05:01.998Z</text:p>
          </table:table-cell>
          <table:table-cell/>
          <table:table-cell office:value-type="string">
            <text:p>http://data.europa.eu/esco/concept-scheme/skills<text:line-break/>http://data.europa.eu/esco/concept-scheme/skills-hierarchy</text:p>
          </table:table-cell>
          <table:table-cell office:value-type="string">
            <text:p>Handling, moving, feeding and caring for live animals.</text:p>
          </table:table-cell>
          <table:table-cell office:value-type="string">
            <text:p>S6.9.0</text:p>
          </table:table-cell>
        </table:table-row>
        <table:table-row>
          <table:table-cell office:value-type="string">
            <text:p>SkillGroup</text:p>
          </table:table-cell>
          <table:table-cell office:value-type="string">
            <text:p>http://data.europa.eu/esco/skill/9f6f5c32-2770-4257-bd66-adc29442ff20</text:p>
          </table:table-cell>
          <table:table-cell office:value-type="string">
            <text:p>installing interior or exterior infrastructure</text:p>
          </table:table-cell>
          <table:table-cell table:number-columns-repeated="2"/>
          <table:table-cell office:value-type="string">
            <text:p>released</text:p>
          </table:table-cell>
          <table:table-cell/>
          <table:table-cell office:value-type="string">
            <text:p>Excludes:<text:line-break/>- Installing electrical, electronic and telecommunications equipment and wiring.</text:p>
          </table:table-cell>
          <table:table-cell office:value-type="string">
            <text:p>http://data.europa.eu/esco/concept-scheme/skills<text:line-break/>http://data.europa.eu/esco/concept-scheme/skills-hierarchy</text:p>
          </table:table-cell>
          <table:table-cell office:value-type="string">
            <text:p>Installing, repairing and testing systems and their components in buildings and other structures such as trains and aircraft.</text:p>
          </table:table-cell>
          <table:table-cell office:value-type="string">
            <text:p>S7.2</text:p>
          </table:table-cell>
        </table:table-row>
        <table:table-row>
          <table:table-cell office:value-type="string">
            <text:p>SkillGroup</text:p>
          </table:table-cell>
          <table:table-cell office:value-type="string">
            <text:p>http://data.europa.eu/esco/skill/a0ad9ea8-9620-4aba-a836-cbdd16e12880</text:p>
          </table:table-cell>
          <table:table-cell office:value-type="string">
            <text:p>operating machinery for the manufacture and treatment of textiles, fur and leather products</text:p>
          </table:table-cell>
          <table:table-cell table:number-columns-repeated="2"/>
          <table:table-cell office:value-type="string">
            <text:p>released</text:p>
          </table:table-cell>
          <table:table-cell/>
          <table:table-cell office:value-type="string">
            <text:p>Examples:<text:line-break/>- Apply pre-stitching techniques<text:line-break/>- Manufacture woven fabrics<text:line-break/>- Tend knitting machine.</text:p>
          </table:table-cell>
          <table:table-cell office:value-type="string">
            <text:p>http://data.europa.eu/esco/concept-scheme/skills<text:line-break/>http://data.europa.eu/esco/concept-scheme/skills-hierarchy</text:p>
          </table:table-cell>
          <table:table-cell office:value-type="string">
            <text:p>Operating and tending machinery for the manufacture and treatment of textiles, fur and leather products.</text:p>
          </table:table-cell>
          <table:table-cell office:value-type="string">
            <text:p>S8.5.3</text:p>
          </table:table-cell>
        </table:table-row>
        <table:table-row>
          <table:table-cell office:value-type="string">
            <text:p>SkillGroup</text:p>
          </table:table-cell>
          <table:table-cell office:value-type="string">
            <text:p>http://data.europa.eu/esco/skill/a19c5139-1250-4a60-9c31-a3243cca06cc</text:p>
          </table:table-cell>
          <table:table-cell office:value-type="string">
            <text:p>communicating with colleagues and clients</text:p>
          </table:table-cell>
          <table:table-cell table:number-columns-repeated="2"/>
          <table:table-cell office:value-type="string">
            <text:p>released</text:p>
          </table:table-cell>
          <table:table-cell office:value-type="string">
            <text:p>2022-07-15T14:44:44.924Z</text:p>
          </table:table-cell>
          <table:table-cell office:value-type="string">
            <text:p>Examples:<text:line-break/>- Brainstorm ideas<text:line-break/>- Contact customers Excludes:<text:line-break/>- Cooperate with professionals<text:line-break/>- Liaise with politicians.</text:p>
          </table:table-cell>
          <table:table-cell office:value-type="string">
            <text:p>http://data.europa.eu/esco/concept-scheme/skills<text:line-break/>http://data.europa.eu/esco/concept-scheme/skills-hierarchy</text:p>
          </table:table-cell>
          <table:table-cell office:value-type="string">
            <text:p>Communicating with colleagues, clients and other outside groups to disseminate information on operational matters, problems and activities.</text:p>
          </table:table-cell>
          <table:table-cell office:value-type="string">
            <text:p>S1.2.1</text:p>
          </table:table-cell>
        </table:table-row>
        <table:table-row>
          <table:table-cell office:value-type="string">
            <text:p>SkillGroup</text:p>
          </table:table-cell>
          <table:table-cell office:value-type="string">
            <text:p>http://data.europa.eu/esco/skill/a4cf0e8a-54f6-4fd5-8650-1c82ea86cfd2</text:p>
          </table:table-cell>
          <table:table-cell office:value-type="string">
            <text:p>working with machinery and specialised equipment</text:p>
          </table:table-cell>
          <table:table-cell table:number-columns-repeated="2"/>
          <table:table-cell office:value-type="string">
            <text:p>released</text:p>
          </table:table-cell>
          <table:table-cell/>
          <table:table-cell office:value-type="string">
            <text:p>Excludes:<text:line-break/>- Interacting with computers.</text:p>
          </table:table-cell>
          <table:table-cell office:value-type="string">
            <text:p>http://data.europa.eu/esco/concept-scheme/skills<text:line-break/>http://data.europa.eu/esco/concept-scheme/skills-hierarchy</text:p>
          </table:table-cell>
          <table:table-cell office:value-type="string">
            <text:p>Controlling, operating and monitoring vehicles, stationary and mobile machinery and precision instrumentation and equipment.</text:p>
          </table:table-cell>
          <table:table-cell office:value-type="string">
            <text:p>S8.0.0</text:p>
          </table:table-cell>
        </table:table-row>
        <table:table-row>
          <table:table-cell office:value-type="string">
            <text:p>SkillGroup</text:p>
          </table:table-cell>
          <table:table-cell office:value-type="string">
            <text:p>http://data.europa.eu/esco/skill/a5524d0d-38e5-4cfc-96c4-46c3c6df3dd1</text:p>
          </table:table-cell>
          <table:table-cell office:value-type="string">
            <text:p>operating mobile plant</text:p>
          </table:table-cell>
          <table:table-cell office:value-type="string">
            <text:p>mobile plant</text:p>
          </table:table-cell>
          <table:table-cell/>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office:value-type="string">
            <text:p>Controlling the operation of machinery whose mobility is an integral part of its function, such as earthmoving, agricultural, forestry and lifting equipment.</text:p>
          </table:table-cell>
          <table:table-cell office:value-type="string">
            <text:p>S8.1.0</text:p>
          </table:table-cell>
        </table:table-row>
        <table:table-row>
          <table:table-cell office:value-type="string">
            <text:p>SkillGroup</text:p>
          </table:table-cell>
          <table:table-cell office:value-type="string">
            <text:p>http://data.europa.eu/esco/skill/a556a3db-cd48-42a5-825c-f95f6f5ccbfe</text:p>
          </table:table-cell>
          <table:table-cell office:value-type="string">
            <text:p>creating visual displays and decorations</text:p>
          </table:table-cell>
          <table:table-cell table:number-columns-repeated="2"/>
          <table:table-cell office:value-type="string">
            <text:p>released</text:p>
          </table:table-cell>
          <table:table-cell office:value-type="string">
            <text:p>2020-12-07T15:05:05.027Z</text:p>
          </table:table-cell>
          <table:table-cell office:value-type="string">
            <text:p>Examples:<text:line-break/>- create flower arrangements<text:line-break/>- set up merchandise displays<text:line-break/>- decorate indoor or outdoor spaces<text:line-break/>- display merchandise<text:line-break/>- design customised maps Excludes:<text:line-break/>- create artistic designs.</text:p>
          </table:table-cell>
          <table:table-cell office:value-type="string">
            <text:p>http://data.europa.eu/esco/concept-scheme/skills<text:line-break/>http://data.europa.eu/esco/concept-scheme/skills-hierarchy</text:p>
          </table:table-cell>
          <table:table-cell office:value-type="string">
            <text:p>Creating, designing and arranging graphics, visual representations, displays, exhibits or decorations.</text:p>
          </table:table-cell>
          <table:table-cell office:value-type="string">
            <text:p>S1.12.1</text:p>
          </table:table-cell>
        </table:table-row>
        <table:table-row>
          <table:table-cell office:value-type="string">
            <text:p>SkillGroup</text:p>
          </table:table-cell>
          <table:table-cell office:value-type="string">
            <text:p>http://data.europa.eu/esco/skill/a60b664f-bb07-4dd1-8dfa-134a0827f8da</text:p>
          </table:table-cell>
          <table:table-cell office:value-type="string">
            <text:p>operating lifting or moving equipment</text:p>
          </table:table-cell>
          <table:table-cell table:number-columns-repeated="2"/>
          <table:table-cell office:value-type="string">
            <text:p>released</text:p>
          </table:table-cell>
          <table:table-cell/>
          <table:table-cell office:value-type="string">
            <text:p>Excludes:<text:line-break/>- Operating earthmoving equipment Examples:<text:line-break/>- Operate cranes<text:line-break/>- Drive forklift<text:line-break/>- Operate chair-lift<text:line-break/>- Operate bottom supported cable-propelled vehicles.</text:p>
          </table:table-cell>
          <table:table-cell office:value-type="string">
            <text:p>http://data.europa.eu/esco/concept-scheme/skills<text:line-break/>http://data.europa.eu/esco/concept-scheme/skills-hierarchy</text:p>
          </table:table-cell>
          <table:table-cell office:value-type="string">
            <text:p>Operating equipment for lifting and moving objects, such as cranes, hoists, cable cars and lifting trucks.</text:p>
          </table:table-cell>
          <table:table-cell office:value-type="string">
            <text:p>S8.1.3</text:p>
          </table:table-cell>
        </table:table-row>
        <table:table-row>
          <table:table-cell office:value-type="string">
            <text:p>SkillGroup</text:p>
          </table:table-cell>
          <table:table-cell office:value-type="string">
            <text:p>http://data.europa.eu/esco/skill/a6b0802f-4c20-4123-8a84-d6c8631fedb1</text:p>
          </table:table-cell>
          <table:table-cell office:value-type="string">
            <text:p>installing, maintaining and repairing electrical, electronic and precision equipment</text:p>
          </table:table-cell>
          <table:table-cell office:value-type="string">
            <text:p>installing and maintaining electrical, electronic and precision equipment</text:p>
          </table:table-cell>
          <table:table-cell/>
          <table:table-cell office:value-type="string">
            <text:p>released</text:p>
          </table:table-cell>
          <table:table-cell/>
          <table:table-cell office:value-type="string">
            <text:p>Excludes:<text:line-break/>- Installing computer software, and configuring computer networks.</text:p>
          </table:table-cell>
          <table:table-cell office:value-type="string">
            <text:p>http://data.europa.eu/esco/concept-scheme/skills<text:line-break/>http://data.europa.eu/esco/concept-scheme/skills-hierarchy</text:p>
          </table:table-cell>
          <table:table-cell office:value-type="string">
            <text:p>Installing, setting-up, maintaining and repairing electrical and electronic equipment, and control systems, scientific devices, instrumentation and precision equipment.</text:p>
          </table:table-cell>
          <table:table-cell office:value-type="string">
            <text:p>S8.8.0</text:p>
          </table:table-cell>
        </table:table-row>
        <table:table-row>
          <table:table-cell office:value-type="string">
            <text:p>SkillGroup</text:p>
          </table:table-cell>
          <table:table-cell office:value-type="string">
            <text:p>http://data.europa.eu/esco/skill/a6c3bda0-c759-495e-b2c5-062b3abe2097</text:p>
          </table:table-cell>
          <table:table-cell office:value-type="string">
            <text:p>implementing new procedures or processes</text:p>
          </table:table-cell>
          <table:table-cell table:number-columns-repeated="2"/>
          <table:table-cell office:value-type="string">
            <text:p>released</text:p>
          </table:table-cell>
          <table:table-cell office:value-type="string">
            <text:p>2020-12-07T11:25:11.191Z</text:p>
          </table:table-cell>
          <table:table-cell office:value-type="string">
            <text:p>Examples:<text:line-break/>- implement transport strategy<text:line-break/>- apply crisis intervention Excludes:<text:line-break/>- repair and resolve technical problems with machinery and equipment<text:line-break/>- use ICT tools for problem solving.</text:p>
          </table:table-cell>
          <table:table-cell office:value-type="string">
            <text:p>http://data.europa.eu/esco/concept-scheme/skills<text:line-break/>http://data.europa.eu/esco/concept-scheme/skills-hierarchy</text:p>
          </table:table-cell>
          <table:table-cell office:value-type="string">
            <text:p>Implementing new business procedures or processes to resolve practical, operational or conceptual problems which arise in the execution of work in a wide range of contexts.</text:p>
          </table:table-cell>
          <table:table-cell office:value-type="string">
            <text:p>S1.9.2</text:p>
          </table:table-cell>
        </table:table-row>
        <table:table-row>
          <table:table-cell office:value-type="string">
            <text:p>SkillGroup</text:p>
          </table:table-cell>
          <table:table-cell office:value-type="string">
            <text:p>http://data.europa.eu/esco/skill/a7065828-10aa-4aba-b7d4-f23a30df5060</text:p>
          </table:table-cell>
          <table:table-cell office:value-type="string">
            <text:p>installing and repairing electrical, electronic and precision equipment</text:p>
          </table:table-cell>
          <table:table-cell table:number-columns-repeated="2"/>
          <table:table-cell office:value-type="string">
            <text:p>released</text:p>
          </table:table-cell>
          <table:table-cell office:value-type="string">
            <text:p>2020-12-10T10:29:22.935Z</text:p>
          </table:table-cell>
          <table:table-cell office:value-type="string">
            <text:p>Excludes:<text:line-break/>- Installing computer software, and configuring computer networks<text:line-break/>- Setting up audio-visual equipment Examples:<text:line-break/>- Configure electronic equipment<text:line-break/>- Install electric switches<text:line-break/>- Install low voltage wiring<text:line-break/>- Repair household appliances<text:line-break/>- Repair vehicle electrical systems.</text:p>
          </table:table-cell>
          <table:table-cell office:value-type="string">
            <text:p>http://data.europa.eu/esco/concept-scheme/skills<text:line-break/>http://data.europa.eu/esco/concept-scheme/skills-hierarchy</text:p>
          </table:table-cell>
          <table:table-cell office:value-type="string">
            <text:p>Installing, setting-up, and repairing electrical, electronic, mechatronic and precision equipment, and control systems, scientific and medical devices, instrumentation and precision equipment.</text:p>
          </table:table-cell>
          <table:table-cell office:value-type="string">
            <text:p>S8.8.1</text:p>
          </table:table-cell>
        </table:table-row>
        <table:table-row>
          <table:table-cell office:value-type="string">
            <text:p>SkillGroup</text:p>
          </table:table-cell>
          <table:table-cell office:value-type="string">
            <text:p>http://data.europa.eu/esco/skill/a7956044-f468-4bc1-a83c-a8821b903a09</text:p>
          </table:table-cell>
          <table:table-cell office:value-type="string">
            <text:p>operating cutting, grinding and smoothing machinery</text:p>
          </table:table-cell>
          <table:table-cell table:number-columns-repeated="2"/>
          <table:table-cell office:value-type="string">
            <text:p>released</text:p>
          </table:table-cell>
          <table:table-cell/>
          <table:table-cell office:value-type="string">
            <text:p>Examples:<text:line-break/>- Operate drill press<text:line-break/>- Tend lathe<text:line-break/>- Operate table saw.</text:p>
          </table:table-cell>
          <table:table-cell office:value-type="string">
            <text:p>http://data.europa.eu/esco/concept-scheme/skills<text:line-break/>http://data.europa.eu/esco/concept-scheme/skills-hierarchy</text:p>
          </table:table-cell>
          <table:table-cell office:value-type="string">
            <text:p>Operating and tending machinery to cut grind and smooth work pieces made of metal, wood, plastic or various other materials.</text:p>
          </table:table-cell>
          <table:table-cell office:value-type="string">
            <text:p>S8.5.8</text:p>
          </table:table-cell>
        </table:table-row>
        <table:table-row>
          <table:table-cell office:value-type="string">
            <text:p>SkillGroup</text:p>
          </table:table-cell>
          <table:table-cell office:value-type="string">
            <text:p>http://data.europa.eu/esco/skill/a8c3186b-c791-4d57-8f4f-4d12c7a5c6a7</text:p>
          </table:table-cell>
          <table:table-cell office:value-type="string">
            <text:p>programming computer systems</text:p>
          </table:table-cell>
          <table:table-cell office:value-type="string">
            <text:p>programming</text:p>
          </table:table-cell>
          <table:table-cell/>
          <table:table-cell office:value-type="string">
            <text:p>released</text:p>
          </table:table-cell>
          <table:table-cell office:value-type="string">
            <text:p>2023-07-06T10:23:05.54Z</text:p>
          </table:table-cell>
          <table:table-cell office:value-type="string">
            <text:p>Excludes:<text:line-break/>- Systems analysis<text:line-break/>- Issuing commands to computer controlled machines and equipment Examples:<text:line-break/>- Write computer programming code<text:line-break/>- Use query languages<text:line-break/>- Debug software.</text:p>
          </table:table-cell>
          <table:table-cell office:value-type="string">
            <text:p>http://data.europa.eu/esco/concept-scheme/skills<text:line-break/>http://data.europa.eu/esco/concept-scheme/skills-hierarchy</text:p>
          </table:table-cell>
          <table:table-cell office:value-type="string">
            <text:p>Writing and submitting instructions, specifications and programmes for computers.</text:p>
          </table:table-cell>
          <table:table-cell office:value-type="string">
            <text:p>S5.1.0</text:p>
          </table:table-cell>
        </table:table-row>
        <table:table-row>
          <table:table-cell office:value-type="string">
            <text:p>SkillGroup</text:p>
          </table:table-cell>
          <table:table-cell office:value-type="string">
            <text:p>http://data.europa.eu/esco/skill/a96b31dd-d72a-4c89-8947-524f14a16f82</text:p>
          </table:table-cell>
          <table:table-cell office:value-type="string">
            <text:p>operating mining, drilling and mineral processing machinery</text:p>
          </table:table-cell>
          <table:table-cell table:number-columns-repeated="2"/>
          <table:table-cell office:value-type="string">
            <text:p>released</text:p>
          </table:table-cell>
          <table:table-cell/>
          <table:table-cell office:value-type="string">
            <text:p>Excludes:<text:line-break/>- Operating mobile earthmoving and transportation equipment<text:line-break/>- Operating hand-held and bench drills Examples:<text:line-break/>- Drive tunnel boring machine<text:line-break/>- Operate continuous miner<text:line-break/>- Operate core drilling equipment<text:line-break/>- Tend stone splitting machine.</text:p>
          </table:table-cell>
          <table:table-cell office:value-type="string">
            <text:p>http://data.europa.eu/esco/concept-scheme/skills<text:line-break/>http://data.europa.eu/esco/concept-scheme/skills-hierarchy</text:p>
          </table:table-cell>
          <table:table-cell office:value-type="string">
            <text:p>Operating machinery for the extraction and processing of rocks and minerals, or for drilling and boring wells and tunnels.</text:p>
          </table:table-cell>
          <table:table-cell office:value-type="string">
            <text:p>S8.4.1</text:p>
          </table:table-cell>
        </table:table-row>
        <table:table-row>
          <table:table-cell office:value-type="string">
            <text:p>SkillGroup</text:p>
          </table:table-cell>
          <table:table-cell office:value-type="string">
            <text:p>http://data.europa.eu/esco/skill/a9703c5e-7fef-40d8-8fed-e5b31cc76818</text:p>
          </table:table-cell>
          <table:table-cell office:value-type="string">
            <text:p>maintaining mechanical machinery</text:p>
          </table:table-cell>
          <table:table-cell table:number-columns-repeated="2"/>
          <table:table-cell office:value-type="string">
            <text:p>released</text:p>
          </table:table-cell>
          <table:table-cell office:value-type="string">
            <text:p>2022-06-19T12:20:52.48Z</text:p>
          </table:table-cell>
          <table:table-cell/>
          <table:table-cell office:value-type="string">
            <text:p>http://data.europa.eu/esco/concept-scheme/skills<text:line-break/>http://data.europa.eu/esco/concept-scheme/skills-hierarchy</text:p>
          </table:table-cell>
          <table:table-cell office:value-type="string">
            <text:p>Performing maintenance of mechanical machinery and its functional components to ensure optimal functioning.</text:p>
          </table:table-cell>
          <table:table-cell office:value-type="string">
            <text:p>S8.7.3</text:p>
          </table:table-cell>
        </table:table-row>
        <table:table-row>
          <table:table-cell office:value-type="string">
            <text:p>SkillGroup</text:p>
          </table:table-cell>
          <table:table-cell office:value-type="string">
            <text:p>http://data.europa.eu/esco/skill/aab9f44d-fe0e-46d8-a470-11ce82a64846</text:p>
          </table:table-cell>
          <table:table-cell office:value-type="string">
            <text:p>supervising a team or group</text:p>
          </table:table-cell>
          <table:table-cell table:number-columns-repeated="2"/>
          <table:table-cell office:value-type="string">
            <text:p>released</text:p>
          </table:table-cell>
          <table:table-cell office:value-type="string">
            <text:p>2022-12-05T13:39:47.179Z</text:p>
          </table:table-cell>
          <table:table-cell office:value-type="string">
            <text:p>Examples:<text:line-break/>- lead a team<text:line-break/>- manage sales teams<text:line-break/>- supervise crew Excludes:<text:line-break/>- supervise children.</text:p>
          </table:table-cell>
          <table:table-cell office:value-type="string">
            <text:p>http://data.europa.eu/esco/concept-scheme/skills<text:line-break/>http://data.europa.eu/esco/concept-scheme/skills-hierarchy</text:p>
          </table:table-cell>
          <table:table-cell office:value-type="string">
            <text:p>Managing, leading or supervising the activities a team or group of workers or students.</text:p>
          </table:table-cell>
          <table:table-cell office:value-type="string">
            <text:p>S4.8.1</text:p>
          </table:table-cell>
        </table:table-row>
        <table:table-row>
          <table:table-cell office:value-type="string">
            <text:p>SkillGroup</text:p>
          </table:table-cell>
          <table:table-cell office:value-type="string">
            <text:p>http://data.europa.eu/esco/skill/ab877a24-335d-4676-b366-c5c06651481a</text:p>
          </table:table-cell>
          <table:table-cell office:value-type="string">
            <text:p>communication, collaboration and creativity</text:p>
          </table:table-cell>
          <table:table-cell office:value-type="string">
            <text:p>communication and creativity</text:p>
          </table:table-cell>
          <table:table-cell/>
          <table:table-cell office:value-type="string">
            <text:p>released</text:p>
          </table:table-cell>
          <table:table-cell office:value-type="string">
            <text:p>2021-12-17T12:50:41.929Z</text:p>
          </table:table-cell>
          <table:table-cell office:value-type="string">
            <text:p>Excludes:<text:line-break/>- Communication or interaction with animals.</text:p>
          </table:table-cell>
          <table:table-cell office:value-type="string">
            <text:p>http://data.europa.eu/esco/concept-scheme/skills<text:line-break/>http://data.europa.eu/esco/concept-scheme/skills-hierarchy</text:p>
          </table:table-cell>
          <table:table-cell office:value-type="string">
            <text:p>Communicating, collaborating, liaising, and negotiating with other people, developing solutions to problems, creating plans or specifications for the design of objects and systems, composing text or music, performing to entertain an audience, and imparting knowledge to others.</text:p>
          </table:table-cell>
          <table:table-cell office:value-type="string">
            <text:p>S1.0.0</text:p>
          </table:table-cell>
        </table:table-row>
        <table:table-row>
          <table:table-cell office:value-type="string">
            <text:p>SkillGroup</text:p>
          </table:table-cell>
          <table:table-cell office:value-type="string">
            <text:p>http://data.europa.eu/esco/skill/ab99d9a7-62eb-407b-92f2-bf7992a82004</text:p>
          </table:table-cell>
          <table:table-cell office:value-type="string">
            <text:p>creating artistic designs or performances</text:p>
          </table:table-cell>
          <table:table-cell table:number-columns-repeated="2"/>
          <table:table-cell office:value-type="string">
            <text:p>released</text:p>
          </table:table-cell>
          <table:table-cell office:value-type="string">
            <text:p>2022-06-21T09:05:08.279Z</text:p>
          </table:table-cell>
          <table:table-cell office:value-type="string">
            <text:p>Examples:<text:line-break/>- devise choreography<text:line-break/>- create sculptures<text:line-break/>- design a music show.</text:p>
          </table:table-cell>
          <table:table-cell office:value-type="string">
            <text:p>http://data.europa.eu/esco/concept-scheme/skills<text:line-break/>http://data.europa.eu/esco/concept-scheme/skills-hierarchy</text:p>
          </table:table-cell>
          <table:table-cell office:value-type="string">
            <text:p>Creating original works of art such as pictures and sculptures, or creating artistic performances such as dance and drama for live or recorded performance.</text:p>
          </table:table-cell>
          <table:table-cell office:value-type="string">
            <text:p>S1.12.3</text:p>
          </table:table-cell>
        </table:table-row>
        <table:table-row>
          <table:table-cell office:value-type="string">
            <text:p>SkillGroup</text:p>
          </table:table-cell>
          <table:table-cell office:value-type="string">
            <text:p>http://data.europa.eu/esco/skill/ac88053e-c9b5-43cf-ace1-f506bcfdc8cb</text:p>
          </table:table-cell>
          <table:table-cell office:value-type="string">
            <text:p>performing and entertaining</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office:value-type="string">
            <text:p>Undertaking activities to entertain an audience or improve personal abilities.</text:p>
          </table:table-cell>
          <table:table-cell office:value-type="string">
            <text:p>S1.14</text:p>
          </table:table-cell>
        </table:table-row>
        <table:table-row>
          <table:table-cell office:value-type="string">
            <text:p>SkillGroup</text:p>
          </table:table-cell>
          <table:table-cell office:value-type="string">
            <text:p>http://data.europa.eu/esco/skill/aca5081a-ceb0-4028-9cc5-1daafd4f86f9</text:p>
          </table:table-cell>
          <table:table-cell office:value-type="string">
            <text:p>developing solutions</text:p>
          </table:table-cell>
          <table:table-cell table:number-columns-repeated="2"/>
          <table:table-cell office:value-type="string">
            <text:p>released</text:p>
          </table:table-cell>
          <table:table-cell office:value-type="string">
            <text:p>2023-06-29T15:54:08.629Z</text:p>
          </table:table-cell>
          <table:table-cell office:value-type="string">
            <text:p>Examples:<text:line-break/>- troubleshoot<text:line-break/>- identify improvement actions<text:line-break/>- create solutions to problems Excludes:<text:line-break/>- repair and resolve technical problems with machinery and equipment<text:line-break/>- use ICT tools for problem solving.</text:p>
          </table:table-cell>
          <table:table-cell office:value-type="string">
            <text:p>http://data.europa.eu/esco/concept-scheme/skills<text:line-break/>http://data.europa.eu/esco/concept-scheme/skills-hierarchy</text:p>
          </table:table-cell>
          <table:table-cell office:value-type="string">
            <text:p>Developing solutions to practical, operational or conceptual problems which arise in the execution of work in a wide range of contexts.</text:p>
          </table:table-cell>
          <table:table-cell office:value-type="string">
            <text:p>S1.9.1</text:p>
          </table:table-cell>
        </table:table-row>
        <table:table-row>
          <table:table-cell office:value-type="string">
            <text:p>SkillGroup</text:p>
          </table:table-cell>
          <table:table-cell office:value-type="string">
            <text:p>http://data.europa.eu/esco/skill/ad326fa7-f2e9-4421-8426-bc0c2e167143</text:p>
          </table:table-cell>
          <table:table-cell office:value-type="string">
            <text:p>presenting information in legal proceedings</text:p>
          </table:table-cell>
          <table:table-cell table:number-columns-repeated="2"/>
          <table:table-cell office:value-type="string">
            <text:p>released</text:p>
          </table:table-cell>
          <table:table-cell/>
          <table:table-cell office:value-type="string">
            <text:p>Examples:<text:line-break/>- Present evidence<text:line-break/>- Represent clients in court.</text:p>
          </table:table-cell>
          <table:table-cell office:value-type="string">
            <text:p>http://data.europa.eu/esco/concept-scheme/skills<text:line-break/>http://data.europa.eu/esco/concept-scheme/skills-hierarchy</text:p>
          </table:table-cell>
          <table:table-cell office:value-type="string">
            <text:p>Testifying, presenting evidence or representing clients during legal proceedings.</text:p>
          </table:table-cell>
          <table:table-cell office:value-type="string">
            <text:p>S1.4.3</text:p>
          </table:table-cell>
        </table:table-row>
        <table:table-row>
          <table:table-cell office:value-type="string">
            <text:p>SkillGroup</text:p>
          </table:table-cell>
          <table:table-cell office:value-type="string">
            <text:p>http://data.europa.eu/esco/skill/af84405b-896d-4ed3-9462-077ea9a2a188</text:p>
          </table:table-cell>
          <table:table-cell office:value-type="string">
            <text:p>collaborating and liaising</text:p>
          </table:table-cell>
          <table:table-cell table:number-columns-repeated="2"/>
          <table:table-cell office:value-type="string">
            <text:p>released</text:p>
          </table:table-cell>
          <table:table-cell office:value-type="string">
            <text:p>2024-01-25T10:32:26.775Z</text:p>
          </table:table-cell>
          <table:table-cell office:value-type="string">
            <text:p>Examples: - contact event speakers<text:line-break/>- liaise with auditors.</text:p>
          </table:table-cell>
          <table:table-cell office:value-type="string">
            <text:p>http://data.europa.eu/esco/concept-scheme/skills<text:line-break/>http://data.europa.eu/esco/concept-scheme/skills-hierarchy</text:p>
          </table:table-cell>
          <table:table-cell office:value-type="string">
            <text:p>Reaching out to outside agencies, clients and other organisational units to facilitate exchange of information. Collaborating and engaging with external and internal agencies and departments to adapt the timing and nature of the activities.</text:p>
          </table:table-cell>
          <table:table-cell office:value-type="string">
            <text:p>S1.2.5</text:p>
          </table:table-cell>
        </table:table-row>
        <table:table-row>
          <table:table-cell office:value-type="string">
            <text:p>SkillGroup</text:p>
          </table:table-cell>
          <table:table-cell office:value-type="string">
            <text:p>http://data.europa.eu/esco/skill/afe3d82e-4a40-4aa4-a4e9-a6097c4a391e</text:p>
          </table:table-cell>
          <table:table-cell office:value-type="string">
            <text:p>writing and composing</text:p>
          </table:table-cell>
          <table:table-cell table:number-columns-repeated="2"/>
          <table:table-cell office:value-type="string">
            <text:p>released</text:p>
          </table:table-cell>
          <table:table-cell/>
          <table:table-cell office:value-type="string">
            <text:p>Excludes:<text:line-break/>- General writing abilities/literacy<text:line-break/>- Writing computer programmes/coding.</text:p>
          </table:table-cell>
          <table:table-cell office:value-type="string">
            <text:p>http://data.europa.eu/esco/concept-scheme/skills<text:line-break/>http://data.europa.eu/esco/concept-scheme/skills-hierarchy</text:p>
          </table:table-cell>
          <table:table-cell office:value-type="string">
            <text:p>Writing text or composing music, creating original work with regard to format, style and content.</text:p>
          </table:table-cell>
          <table:table-cell office:value-type="string">
            <text:p>S1.13.0</text:p>
          </table:table-cell>
        </table:table-row>
        <table:table-row>
          <table:table-cell office:value-type="string">
            <text:p>SkillGroup</text:p>
          </table:table-cell>
          <table:table-cell office:value-type="string">
            <text:p>http://data.europa.eu/esco/skill/b036eb5c-6a48-45b9-b2c6-f42f9e336204</text:p>
          </table:table-cell>
          <table:table-cell office:value-type="string">
            <text:p>advising on business or operational matters</text:p>
          </table:table-cell>
          <table:table-cell table:number-columns-repeated="2"/>
          <table:table-cell office:value-type="string">
            <text:p>released</text:p>
          </table:table-cell>
          <table:table-cell/>
          <table:table-cell office:value-type="string">
            <text:p>Examples:<text:line-break/>- advise on efficiency improvements<text:line-break/>- advise on personnel management<text:line-break/>- advise on waste management procedures.</text:p>
          </table:table-cell>
          <table:table-cell office:value-type="string">
            <text:p>http://data.europa.eu/esco/concept-scheme/skills<text:line-break/>http://data.europa.eu/esco/concept-scheme/skills-hierarchy</text:p>
          </table:table-cell>
          <table:table-cell office:value-type="string">
            <text:p>Providing information and advice to improve the efficiency of production and business operations.</text:p>
          </table:table-cell>
          <table:table-cell office:value-type="string">
            <text:p>S1.5.7</text:p>
          </table:table-cell>
        </table:table-row>
        <table:table-row>
          <table:table-cell office:value-type="string">
            <text:p>SkillGroup</text:p>
          </table:table-cell>
          <table:table-cell office:value-type="string">
            <text:p>http://data.europa.eu/esco/skill/b1115b14-fa16-4c1e-be6c-91fd49a1808b</text:p>
          </table:table-cell>
          <table:table-cell office:value-type="string">
            <text:p>using computer aided design and drawing tools</text:p>
          </table:table-cell>
          <table:table-cell table:number-columns-repeated="2"/>
          <table:table-cell office:value-type="string">
            <text:p>released</text:p>
          </table:table-cell>
          <table:table-cell office:value-type="string">
            <text:p>2022-06-22T14:11:44.883Z</text:p>
          </table:table-cell>
          <table:table-cell office:value-type="string">
            <text:p>Excludes:<text:line-break/>- Computer programming<text:line-break/>- Resolving computer problems Examples:<text:line-break/>- Use CAD software.</text:p>
          </table:table-cell>
          <table:table-cell office:value-type="string">
            <text:p>http://data.europa.eu/esco/concept-scheme/skills<text:line-break/>http://data.europa.eu/esco/concept-scheme/skills-hierarchy</text:p>
          </table:table-cell>
          <table:table-cell office:value-type="string">
            <text:p>Using ICT software and hardware to collaborate and communicate with others, creating and editing new content (from word processing to images and video) and solving conceptual, technical and practical problems.</text:p>
          </table:table-cell>
          <table:table-cell office:value-type="string">
            <text:p>S5.6.3</text:p>
          </table:table-cell>
        </table:table-row>
        <table:table-row>
          <table:table-cell office:value-type="string">
            <text:p>SkillGroup</text:p>
          </table:table-cell>
          <table:table-cell office:value-type="string">
            <text:p>http://data.europa.eu/esco/skill/b2c688b0-9106-466d-8b88-eafdfe608e7d</text:p>
          </table:table-cell>
          <table:table-cell office:value-type="string">
            <text:p>designing structures or facilities</text:p>
          </table:table-cell>
          <table:table-cell table:number-columns-repeated="2"/>
          <table:table-cell office:value-type="string">
            <text:p>released</text:p>
          </table:table-cell>
          <table:table-cell office:value-type="string">
            <text:p>2024-01-29T16:27:05.118Z</text:p>
          </table:table-cell>
          <table:table-cell office:value-type="string">
            <text:p>Examples:<text:line-break/>- design safety equipment<text:line-break/>- design pharmaceutical manufacturing systems<text:line-break/>- design buildings<text:line-break/>- create new landscape designs.</text:p>
          </table:table-cell>
          <table:table-cell office:value-type="string">
            <text:p>http://data.europa.eu/esco/concept-scheme/skills<text:line-break/>http://data.europa.eu/esco/concept-scheme/skills-hierarchy</text:p>
          </table:table-cell>
          <table:table-cell office:value-type="string">
            <text:p>Creating a plan or specification for the design and development of physical structures such as buildings, urban infrastructure, or open spaces.</text:p>
          </table:table-cell>
          <table:table-cell office:value-type="string">
            <text:p>S1.11.4</text:p>
          </table:table-cell>
        </table:table-row>
        <table:table-row>
          <table:table-cell office:value-type="string">
            <text:p>SkillGroup</text:p>
          </table:table-cell>
          <table:table-cell office:value-type="string">
            <text:p>http://data.europa.eu/esco/skill/b309d4f5-56f5-41c6-b712-92d1ed85b965</text:p>
          </table:table-cell>
          <table:table-cell office:value-type="string">
            <text:p>performing administrative activities</text:p>
          </table:table-cell>
          <table:table-cell office:value-type="string">
            <text:p>administration</text:p>
          </table:table-cell>
          <table:table-cell/>
          <table:table-cell office:value-type="string">
            <text:p>released</text:p>
          </table:table-cell>
          <table:table-cell/>
          <table:table-cell office:value-type="string">
            <text:p>Excludes:<text:line-break/>- Record and process information.</text:p>
          </table:table-cell>
          <table:table-cell office:value-type="string">
            <text:p>http://data.europa.eu/esco/concept-scheme/skills<text:line-break/>http://data.europa.eu/esco/concept-scheme/skills-hierarchy</text:p>
          </table:table-cell>
          <table:table-cell office:value-type="string">
            <text:p>Performing administrative tasks such as typing up reports, ordering supplies, maintaining mail correspondence, and ensuring administrative systems, processes and databases are efficient.</text:p>
          </table:table-cell>
          <table:table-cell office:value-type="string">
            <text:p>S4.4.0</text:p>
          </table:table-cell>
        </table:table-row>
        <table:table-row>
          <table:table-cell office:value-type="string">
            <text:p>SkillGroup</text:p>
          </table:table-cell>
          <table:table-cell office:value-type="string">
            <text:p>http://data.europa.eu/esco/skill/b32ef8a5-e3f7-40ef-8b40-913c003e1f4e</text:p>
          </table:table-cell>
          <table:table-cell office:value-type="string">
            <text:p>preparing financial documents, records, reports, or budgets</text:p>
          </table:table-cell>
          <table:table-cell table:number-columns-repeated="2"/>
          <table:table-cell office:value-type="string">
            <text:p>released</text:p>
          </table:table-cell>
          <table:table-cell office:value-type="string">
            <text:p>2020-12-10T22:08:37.954Z</text:p>
          </table:table-cell>
          <table:table-cell office:value-type="string">
            <text:p>Examples:<text:line-break/>- prepare financial auditing reports<text:line-break/>- maintain financial records Excludes:<text:line-break/>- write reports or documents requiring drafting of original text.</text:p>
          </table:table-cell>
          <table:table-cell office:value-type="string">
            <text:p>http://data.europa.eu/esco/concept-scheme/skills<text:line-break/>http://data.europa.eu/esco/concept-scheme/skills-hierarchy</text:p>
          </table:table-cell>
          <table:table-cell office:value-type="string">
            <text:p>Preparing and maintaining records and standardized reports on transactions, sales, financial information and budgets.</text:p>
          </table:table-cell>
          <table:table-cell office:value-type="string">
            <text:p>S2.2.1</text:p>
          </table:table-cell>
        </table:table-row>
        <table:table-row>
          <table:table-cell office:value-type="string">
            <text:p>SkillGroup</text:p>
          </table:table-cell>
          <table:table-cell office:value-type="string">
            <text:p>http://data.europa.eu/esco/skill/b590d4e5-7c62-4b4a-abc2-c270b482e0ce</text:p>
          </table:table-cell>
          <table:table-cell office:value-type="string">
            <text:p>designing ict systems or applications</text:p>
          </table:table-cell>
          <table:table-cell table:number-columns-repeated="2"/>
          <table:table-cell office:value-type="string">
            <text:p>released</text:p>
          </table:table-cell>
          <table:table-cell office:value-type="string">
            <text:p>2023-07-06T12:54:51.284Z</text:p>
          </table:table-cell>
          <table:table-cell office:value-type="string">
            <text:p>Excludes:<text:line-break/>- style hair<text:line-break/>- create artistic, visual or instructive materials.</text:p>
          </table:table-cell>
          <table:table-cell office:value-type="string">
            <text:p>http://data.europa.eu/esco/concept-scheme/skills<text:line-break/>http://data.europa.eu/esco/concept-scheme/skills-hierarchy</text:p>
          </table:table-cell>
          <table:table-cell office:value-type="string">
            <text:p>Creating a plan or specification for the design of information systems, computer games, databases and computer networks, systems and applications.</text:p>
          </table:table-cell>
          <table:table-cell office:value-type="string">
            <text:p>S1.11.1</text:p>
          </table:table-cell>
        </table:table-row>
        <table:table-row>
          <table:table-cell office:value-type="string">
            <text:p>SkillGroup</text:p>
          </table:table-cell>
          <table:table-cell office:value-type="string">
            <text:p>http://data.europa.eu/esco/skill/b593afe4-4179-4a83-9f05-21c8d32d8113</text:p>
          </table:table-cell>
          <table:table-cell office:value-type="string">
            <text:p>preparing and serving food and drinks</text:p>
          </table:table-cell>
          <table:table-cell office:value-type="string">
            <text:p>food and beverages</text:p>
          </table:table-cell>
          <table:table-cell/>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office:value-type="string">
            <text:p>Providing food and beverage services.</text:p>
          </table:table-cell>
          <table:table-cell office:value-type="string">
            <text:p>S3.5.0</text:p>
          </table:table-cell>
        </table:table-row>
        <table:table-row>
          <table:table-cell office:value-type="string">
            <text:p>SkillGroup</text:p>
          </table:table-cell>
          <table:table-cell office:value-type="string">
            <text:p>http://data.europa.eu/esco/skill/b76cd1e5-d5e7-464a-b7bb-4164d3616452</text:p>
          </table:table-cell>
          <table:table-cell office:value-type="string">
            <text:p>liaising and networking</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office:value-type="string">
            <text:p>Developing alliances, contacts or partnerships, and exchanging information with others.</text:p>
          </table:table-cell>
          <table:table-cell office:value-type="string">
            <text:p>S1.2</text:p>
          </table:table-cell>
        </table:table-row>
        <table:table-row>
          <table:table-cell office:value-type="string">
            <text:p>SkillGroup</text:p>
          </table:table-cell>
          <table:table-cell office:value-type="string">
            <text:p>http://data.europa.eu/esco/skill/b7c82b1b-cff9-4641-a62f-e4e28395eade</text:p>
          </table:table-cell>
          <table:table-cell office:value-type="string">
            <text:p>cultivating land and crops</text:p>
          </table:table-cell>
          <table:table-cell table:number-columns-repeated="2"/>
          <table:table-cell office:value-type="string">
            <text:p>released</text:p>
          </table:table-cell>
          <table:table-cell office:value-type="string">
            <text:p>2024-07-03T13:05:04.582Z</text:p>
          </table:table-cell>
          <table:table-cell office:value-type="string">
            <text:p>Examples:<text:line-break/>- Prepare planting area<text:line-break/>- Irrigate soil<text:line-break/>- Spread fertiliser<text:line-break/>- Maintain plants' growth.</text:p>
          </table:table-cell>
          <table:table-cell office:value-type="string">
            <text:p>http://data.europa.eu/esco/concept-scheme/skills<text:line-break/>http://data.europa.eu/esco/concept-scheme/skills-hierarchy</text:p>
          </table:table-cell>
          <table:table-cell office:value-type="string">
            <text:p>Preparing and maintaining land for agricultural or horticultural use and promoting the growth of plants.</text:p>
          </table:table-cell>
          <table:table-cell office:value-type="string">
            <text:p>S6.4.1</text:p>
          </table:table-cell>
        </table:table-row>
        <table:table-row>
          <table:table-cell office:value-type="string">
            <text:p>SkillGroup</text:p>
          </table:table-cell>
          <table:table-cell office:value-type="string">
            <text:p>http://data.europa.eu/esco/skill/b7e752ec-7b2e-46e6-ac24-8b1233609c31</text:p>
          </table:table-cell>
          <table:table-cell office:value-type="string">
            <text:p>leading and motivating</text:p>
          </table:table-cell>
          <table:table-cell office:value-type="string">
            <text:p>leadership</text:p>
          </table:table-cell>
          <table:table-cell/>
          <table:table-cell office:value-type="string">
            <text:p>released</text:p>
          </table:table-cell>
          <table:table-cell office:value-type="string">
            <text:p>2022-07-15T14:44:44.924Z</text:p>
          </table:table-cell>
          <table:table-cell office:value-type="string">
            <text:p>Excludes:<text:line-break/>- Managing, leading or supervising a team or its members. Examples:<text:line-break/>- Motivate employees<text:line-break/>- Provide leadership<text:line-break/>- Lead board meetings.</text:p>
          </table:table-cell>
          <table:table-cell office:value-type="string">
            <text:p>http://data.europa.eu/esco/concept-scheme/skills<text:line-break/>http://data.europa.eu/esco/concept-scheme/skills-hierarchy</text:p>
          </table:table-cell>
          <table:table-cell office:value-type="string">
            <text:p>Reinforcing an organization's vision, inspiring and enthusing others to achieve positive outcomes. The focus of this group is on skills in motivating and inspiring others, rather than on managing and supervising a team.</text:p>
          </table:table-cell>
          <table:table-cell office:value-type="string">
            <text:p>S4.5.0</text:p>
          </table:table-cell>
        </table:table-row>
        <table:table-row>
          <table:table-cell office:value-type="string">
            <text:p>SkillGroup</text:p>
          </table:table-cell>
          <table:table-cell office:value-type="string">
            <text:p>http://data.europa.eu/esco/skill/b82b2bad-41dd-40af-8242-e7d59a2ce786</text:p>
          </table:table-cell>
          <table:table-cell office:value-type="string">
            <text:p>hammering, nailing and riveting</text:p>
          </table:table-cell>
          <table:table-cell table:number-columns-repeated="2"/>
          <table:table-cell office:value-type="string">
            <text:p>released</text:p>
          </table:table-cell>
          <table:table-cell/>
          <table:table-cell office:value-type="string">
            <text:p>Excludes:<text:line-break/>- Operating hammer drill Examples:<text:line-break/>- Nail floorboards<text:line-break/>- Operate nail gun<text:line-break/>- Operate handheld riveting equipment.</text:p>
          </table:table-cell>
          <table:table-cell office:value-type="string">
            <text:p>http://data.europa.eu/esco/concept-scheme/skills<text:line-break/>http://data.europa.eu/esco/concept-scheme/skills-hierarchy</text:p>
          </table:table-cell>
          <table:table-cell office:value-type="string">
            <text:p>Using manual or powered hand-held hammers, chisels, nail guns and riveting equipment.</text:p>
          </table:table-cell>
          <table:table-cell office:value-type="string">
            <text:p>S6.7.5</text:p>
          </table:table-cell>
        </table:table-row>
        <table:table-row>
          <table:table-cell office:value-type="string">
            <text:p>SkillGroup</text:p>
          </table:table-cell>
          <table:table-cell office:value-type="string">
            <text:p>http://data.europa.eu/esco/skill/b84813aa-6c44-4d58-a240-556c2060fb4e</text:p>
          </table:table-cell>
          <table:table-cell office:value-type="string">
            <text:p>assisting and caring</text:p>
          </table:table-cell>
          <table:table-cell office:value-type="string">
            <text:p>providing services</text:p>
          </table:table-cell>
          <table:table-cell/>
          <table:table-cell office:value-type="string">
            <text:p>released</text:p>
          </table:table-cell>
          <table:table-cell office:value-type="string">
            <text:p>2021-09-30T13:20:52.1Z</text:p>
          </table:table-cell>
          <table:table-cell/>
          <table:table-cell office:value-type="string">
            <text:p>http://data.europa.eu/esco/concept-scheme/skills<text:line-break/>http://data.europa.eu/esco/concept-scheme/skills-hierarchy</text:p>
          </table:table-cell>
          <table:table-cell office:value-type="string">
            <text:p>Providing assistance, nurturing, care, service and support to people, and ensuring compliance to rules, standards, guidelines or laws.</text:p>
          </table:table-cell>
          <table:table-cell office:value-type="string">
            <text:p>S3.0.0</text:p>
          </table:table-cell>
        </table:table-row>
        <table:table-row>
          <table:table-cell office:value-type="string">
            <text:p>SkillGroup</text:p>
          </table:table-cell>
          <table:table-cell office:value-type="string">
            <text:p>http://data.europa.eu/esco/skill/b85711bc-32d6-42af-ae0f-e2e566d0dfca</text:p>
          </table:table-cell>
          <table:table-cell office:value-type="string">
            <text:p>preparing and serving food and drinks</text:p>
          </table:table-cell>
          <table:table-cell office:value-type="string">
            <text:p>food and beverages</text:p>
          </table:table-cell>
          <table:table-cell/>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office:value-type="string">
            <text:p>Providing food and beverage services.</text:p>
          </table:table-cell>
          <table:table-cell office:value-type="string">
            <text:p>S3.5</text:p>
          </table:table-cell>
        </table:table-row>
        <table:table-row>
          <table:table-cell office:value-type="string">
            <text:p>SkillGroup</text:p>
          </table:table-cell>
          <table:table-cell office:value-type="string">
            <text:p>http://data.europa.eu/esco/skill/b85caa4a-f04b-4331-80df-11404fd71225</text:p>
          </table:table-cell>
          <table:table-cell office:value-type="string">
            <text:p>installing heating, ventilation and air conditioning equipment</text:p>
          </table:table-cell>
          <table:table-cell table:number-columns-repeated="2"/>
          <table:table-cell office:value-type="string">
            <text:p>released</text:p>
          </table:table-cell>
          <table:table-cell office:value-type="string">
            <text:p>2020-12-08T11:23:48.839Z</text:p>
          </table:table-cell>
          <table:table-cell office:value-type="string">
            <text:p>Examples:<text:line-break/>- Install heat pump<text:line-break/>- Repair ventilation equipment<text:line-break/>- Install heating, ventilation, air conditioning and refrigeration ducts.</text:p>
          </table:table-cell>
          <table:table-cell office:value-type="string">
            <text:p>http://data.europa.eu/esco/concept-scheme/skills<text:line-break/>http://data.europa.eu/esco/concept-scheme/skills-hierarchy</text:p>
          </table:table-cell>
          <table:table-cell office:value-type="string">
            <text:p>Installing and repairing heating, ventilation and air conditioning equipment.</text:p>
          </table:table-cell>
          <table:table-cell office:value-type="string">
            <text:p>S7.2.1</text:p>
          </table:table-cell>
        </table:table-row>
        <table:table-row>
          <table:table-cell office:value-type="string">
            <text:p>SkillGroup</text:p>
          </table:table-cell>
          <table:table-cell office:value-type="string">
            <text:p>http://data.europa.eu/esco/skill/b88bddd4-210e-405f-bbdf-729bb66605a0</text:p>
          </table:table-cell>
          <table:table-cell office:value-type="string">
            <text:p>prescribing and ordering medical tests, treatments or devices</text:p>
          </table:table-cell>
          <table:table-cell table:number-columns-repeated="2"/>
          <table:table-cell office:value-type="string">
            <text:p>released</text:p>
          </table:table-cell>
          <table:table-cell/>
          <table:table-cell office:value-type="string">
            <text:p>Examples:<text:line-break/>- prescribe medication<text:line-break/>- prescribe psychotherapeutic treatment Excludes:<text:line-break/>- veterinary care.</text:p>
          </table:table-cell>
          <table:table-cell office:value-type="string">
            <text:p>http://data.europa.eu/esco/concept-scheme/skills<text:line-break/>http://data.europa.eu/esco/concept-scheme/skills-hierarchy</text:p>
          </table:table-cell>
          <table:table-cell office:value-type="string">
            <text:p>Ordering medical tests such as blood tests or medical imaging, planning courses of treatment and prescribing medication, or medical and prosthetic devices.</text:p>
          </table:table-cell>
          <table:table-cell office:value-type="string">
            <text:p>S3.2.5</text:p>
          </table:table-cell>
        </table:table-row>
        <table:table-row>
          <table:table-cell office:value-type="string">
            <text:p>SkillGroup</text:p>
          </table:table-cell>
          <table:table-cell office:value-type="string">
            <text:p>http://data.europa.eu/esco/skill/b8e142fe-e508-42b1-b037-efebcefac3a7</text:p>
          </table:table-cell>
          <table:table-cell office:value-type="string">
            <text:p>assembling and fabricating products</text:p>
          </table:table-cell>
          <table:table-cell table:number-columns-repeated="2"/>
          <table:table-cell office:value-type="string">
            <text:p>released</text:p>
          </table:table-cell>
          <table:table-cell/>
          <table:table-cell office:value-type="string">
            <text:p>Excludes:<text:line-break/>- Operation of automated assembly equipment or machines -repair of building structures and mechanical, electrical, electronic products and components. Examples:<text:line-break/>- Assemble metal parts - Apply assembly techniques.</text:p>
          </table:table-cell>
          <table:table-cell office:value-type="string">
            <text:p>http://data.europa.eu/esco/concept-scheme/skills<text:line-break/>http://data.europa.eu/esco/concept-scheme/skills-hierarchy</text:p>
          </table:table-cell>
          <table:table-cell office:value-type="string">
            <text:p>Fabricating, assembling or repairing products or work aids by hand, or using hand-held tools and equipment.</text:p>
          </table:table-cell>
          <table:table-cell office:value-type="string">
            <text:p>S6.5</text:p>
          </table:table-cell>
        </table:table-row>
        <table:table-row>
          <table:table-cell office:value-type="string">
            <text:p>SkillGroup</text:p>
          </table:table-cell>
          <table:table-cell office:value-type="string">
            <text:p>http://data.europa.eu/esco/skill/b917784a-d7c9-437c-be6e-0de41067fa62</text:p>
          </table:table-cell>
          <table:table-cell office:value-type="string">
            <text:p>estimating resource needs</text:p>
          </table:table-cell>
          <table:table-cell table:number-columns-repeated="2"/>
          <table:table-cell office:value-type="string">
            <text:p>released</text:p>
          </table:table-cell>
          <table:table-cell/>
          <table:table-cell office:value-type="string">
            <text:p>Examples:<text:line-break/>- estimate restoration costs<text:line-break/>- forecast production quantities.</text:p>
          </table:table-cell>
          <table:table-cell office:value-type="string">
            <text:p>http://data.europa.eu/esco/concept-scheme/skills<text:line-break/>http://data.europa.eu/esco/concept-scheme/skills-hierarchy</text:p>
          </table:table-cell>
          <table:table-cell office:value-type="string">
            <text:p>Calculating and estimating the costs and volumes of human and physical resources required to undertake projects, repairs or other tasks.</text:p>
          </table:table-cell>
          <table:table-cell office:value-type="string">
            <text:p>S2.6.3</text:p>
          </table:table-cell>
        </table:table-row>
        <table:table-row>
          <table:table-cell office:value-type="string">
            <text:p>SkillGroup</text:p>
          </table:table-cell>
          <table:table-cell office:value-type="string">
            <text:p>http://data.europa.eu/esco/skill/b94686e3-cce5-47a2-a8d8-402a0d0ed44e</text:p>
          </table:table-cell>
          <table:table-cell office:value-type="string">
            <text:p>core skills and competences</text:p>
          </table:table-cell>
          <table:table-cell office:value-type="string">
            <text:p>basic skills and competences</text:p>
          </table:table-cell>
          <table:table-cell office:value-type="string">
            <text:p>literacy<text:line-break/>digital literacy<text:line-break/>numeracy<text:line-break/>multilinguism<text:line-break/>reading<text:line-break/>foundation skills<text:line-break/>digital competence</text:p>
          </table:table-cell>
          <table:table-cell office:value-type="string">
            <text:p>released</text:p>
          </table:table-cell>
          <table:table-cell office:value-type="string">
            <text:p>2021-08-30T09:44:37.419Z</text:p>
          </table:table-cell>
          <table:table-cell/>
          <table:table-cell office:value-type="string">
            <text:p>http://data.europa.eu/esco/concept-scheme/skills<text:line-break/>http://data.europa.eu/esco/concept-scheme/skills-hierarchy<text:line-break/>http://data.europa.eu/esco/concept-scheme/skill-transversal-groups</text:p>
          </table:table-cell>
          <table:table-cell office:value-type="string">
            <text:p>Skills and competences representing the foundation for interacting with others and for developing and learning as an individual. They comprise the ability to understand, speak, read and write language(s), to work with numbers and measures and to use digital devices and applications.</text:p>
          </table:table-cell>
          <table:table-cell office:value-type="string">
            <text:p>T1</text:p>
          </table:table-cell>
        </table:table-row>
        <table:table-row>
          <table:table-cell office:value-type="string">
            <text:p>SkillGroup</text:p>
          </table:table-cell>
          <table:table-cell office:value-type="string">
            <text:p>http://data.europa.eu/esco/skill/b975836b-d9b9-4724-88da-9a82b856e74b</text:p>
          </table:table-cell>
          <table:table-cell office:value-type="string">
            <text:p>recording legal information</text:p>
          </table:table-cell>
          <table:table-cell table:number-columns-repeated="2"/>
          <table:table-cell office:value-type="string">
            <text:p>released</text:p>
          </table:table-cell>
          <table:table-cell/>
          <table:table-cell office:value-type="string">
            <text:p>Examples:<text:line-break/>- record court proceedings Excludes:<text:line-break/>- write reports or documents requiring drafting of original text.</text:p>
          </table:table-cell>
          <table:table-cell office:value-type="string">
            <text:p>http://data.europa.eu/esco/concept-scheme/skills<text:line-break/>http://data.europa.eu/esco/concept-scheme/skills-hierarchy</text:p>
          </table:table-cell>
          <table:table-cell office:value-type="string">
            <text:p>Recording information and preparing standardized documentation and reports on legal matters.</text:p>
          </table:table-cell>
          <table:table-cell office:value-type="string">
            <text:p>S2.2.2</text:p>
          </table:table-cell>
        </table:table-row>
        <table:table-row>
          <table:table-cell office:value-type="string">
            <text:p>SkillGroup</text:p>
          </table:table-cell>
          <table:table-cell office:value-type="string">
            <text:p>http://data.europa.eu/esco/skill/b99283cd-b908-4100-baa5-112692ac22b8</text:p>
          </table:table-cell>
          <table:table-cell office:value-type="string">
            <text:p>promoting, selling and purchasing</text:p>
          </table:table-cell>
          <table:table-cell table:number-columns-repeated="2"/>
          <table:table-cell office:value-type="string">
            <text:p>released</text:p>
          </table:table-cell>
          <table:table-cell/>
          <table:table-cell office:value-type="string">
            <text:p>Excludes:<text:line-break/>- Trading and other skills involving buying and selling.</text:p>
          </table:table-cell>
          <table:table-cell office:value-type="string">
            <text:p>http://data.europa.eu/esco/concept-scheme/skills<text:line-break/>http://data.europa.eu/esco/concept-scheme/skills-hierarchy</text:p>
          </table:table-cell>
          <table:table-cell office:value-type="string">
            <text:p>Using communication strategies or techniques to encourage acceptance of goods, services, or ideas, and to sell or buy and goods or services.</text:p>
          </table:table-cell>
          <table:table-cell office:value-type="string">
            <text:p>S1.6</text:p>
          </table:table-cell>
        </table:table-row>
        <table:table-row>
          <table:table-cell office:value-type="string">
            <text:p>SkillGroup</text:p>
          </table:table-cell>
          <table:table-cell office:value-type="string">
            <text:p>http://data.europa.eu/esco/skill/ba1f6201-b206-4459-b178-706db34a851d</text:p>
          </table:table-cell>
          <table:table-cell office:value-type="string">
            <text:p>analysing scientific and medical data</text:p>
          </table:table-cell>
          <table:table-cell table:number-columns-repeated="2"/>
          <table:table-cell office:value-type="string">
            <text:p>released</text:p>
          </table:table-cell>
          <table:table-cell office:value-type="string">
            <text:p>2020-12-11T09:22:19.086Z</text:p>
          </table:table-cell>
          <table:table-cell office:value-type="string">
            <text:p>Excludes:<text:line-break/>- Using ICT tools to analyse and process data.<text:line-break/>- Analysing and testing samples Examples:<text:line-break/>- Interpret haematological test results<text:line-break/>- Analyse environmental data.</text:p>
          </table:table-cell>
          <table:table-cell office:value-type="string">
            <text:p>http://data.europa.eu/esco/concept-scheme/skills<text:line-break/>http://data.europa.eu/esco/concept-scheme/skills-hierarchy</text:p>
          </table:table-cell>
          <table:table-cell office:value-type="string">
            <text:p>Analysing data and evaluating information collected from scientific and medical tests and investigations.</text:p>
          </table:table-cell>
          <table:table-cell office:value-type="string">
            <text:p>S2.7.2</text:p>
          </table:table-cell>
        </table:table-row>
        <table:table-row>
          <table:table-cell office:value-type="string">
            <text:p>SkillGroup</text:p>
          </table:table-cell>
          <table:table-cell office:value-type="string">
            <text:p>http://data.europa.eu/esco/skill/bb99a123-88be-42a2-8758-f5a18e06ccc6</text:p>
          </table:table-cell>
          <table:table-cell office:value-type="string">
            <text:p>making decisions</text:p>
          </table:table-cell>
          <table:table-cell table:number-columns-repeated="2"/>
          <table:table-cell office:value-type="string">
            <text:p>released</text:p>
          </table:table-cell>
          <table:table-cell office:value-type="string">
            <text:p>2022-08-02T10:46:51.743Z</text:p>
          </table:table-cell>
          <table:table-cell office:value-type="string">
            <text:p>Examples:<text:line-break/>- Decide on loan applications<text:line-break/>- Make legal decisions<text:line-break/>- Decide on products to be stocked.</text:p>
          </table:table-cell>
          <table:table-cell office:value-type="string">
            <text:p>http://data.europa.eu/esco/concept-scheme/skills<text:line-break/>http://data.europa.eu/esco/concept-scheme/skills-hierarchy</text:p>
          </table:table-cell>
          <table:table-cell office:value-type="string">
            <text:p>Making a choice from several alternative possibilities.</text:p>
          </table:table-cell>
          <table:table-cell office:value-type="string">
            <text:p>S4.9</text:p>
          </table:table-cell>
        </table:table-row>
        <table:table-row>
          <table:table-cell office:value-type="string">
            <text:p>SkillGroup</text:p>
          </table:table-cell>
          <table:table-cell office:value-type="string">
            <text:p>http://data.europa.eu/esco/skill/bd1242ec-6dd5-4c7d-bf79-8de6be3b3815</text:p>
          </table:table-cell>
          <table:table-cell office:value-type="string">
            <text:p>assembling mechanical products</text:p>
          </table:table-cell>
          <table:table-cell table:number-columns-repeated="2"/>
          <table:table-cell office:value-type="string">
            <text:p>released</text:p>
          </table:table-cell>
          <table:table-cell/>
          <table:table-cell office:value-type="string">
            <text:p>Excludes:<text:line-break/>- Operation of automated assembly equipment<text:line-break/>- Installation, repair and maintenance of machinery<text:line-break/>- Fabrication of decorative objects - Fabrication of medical, orthotic and prosthetic devices Examples:<text:line-break/>- Assemble bicycles<text:line-break/>- Assemble machines.</text:p>
          </table:table-cell>
          <table:table-cell office:value-type="string">
            <text:p>http://data.europa.eu/esco/concept-scheme/skills<text:line-break/>http://data.europa.eu/esco/concept-scheme/skills-hierarchy</text:p>
          </table:table-cell>
          <table:table-cell office:value-type="string">
            <text:p>Assembling mechanical products by hand or using hand-held tools and equipment.</text:p>
          </table:table-cell>
          <table:table-cell office:value-type="string">
            <text:p>S6.5.4</text:p>
          </table:table-cell>
        </table:table-row>
        <table:table-row>
          <table:table-cell office:value-type="string">
            <text:p>SkillGroup</text:p>
          </table:table-cell>
          <table:table-cell office:value-type="string">
            <text:p>http://data.europa.eu/esco/skill/bdf2aa76-360d-429d-a967-bdb691f241fa</text:p>
          </table:table-cell>
          <table:table-cell office:value-type="string">
            <text:p>operating kilns, furnaces and drying equipment</text:p>
          </table:table-cell>
          <table:table-cell table:number-columns-repeated="2"/>
          <table:table-cell office:value-type="string">
            <text:p>released</text:p>
          </table:table-cell>
          <table:table-cell/>
          <table:table-cell office:value-type="string">
            <text:p>Excludes:<text:line-break/>- Operation of ovens for cooking food and machines for drying textiles and garments Examples:<text:line-break/>- Control gas-fired furnace for malt roasting<text:line-break/>- Operate smelter<text:line-break/>- Operate waste incinerator<text:line-break/>- Prepare kiln firebox.</text:p>
          </table:table-cell>
          <table:table-cell office:value-type="string">
            <text:p>http://data.europa.eu/esco/concept-scheme/skills<text:line-break/>http://data.europa.eu/esco/concept-scheme/skills-hierarchy</text:p>
          </table:table-cell>
          <table:table-cell office:value-type="string">
            <text:p>Operating, monitoring and adjusting the controls of equipment for heating or drying materials and products at high temperatures, such as kilns or furnaces.</text:p>
          </table:table-cell>
          <table:table-cell office:value-type="string">
            <text:p>S8.4.7</text:p>
          </table:table-cell>
        </table:table-row>
        <table:table-row>
          <table:table-cell office:value-type="string">
            <text:p>SkillGroup</text:p>
          </table:table-cell>
          <table:table-cell office:value-type="string">
            <text:p>http://data.europa.eu/esco/skill/be7443ff-0747-43b8-8720-8e87fd34e692</text:p>
          </table:table-cell>
          <table:table-cell office:value-type="string">
            <text:p>solving problems</text:p>
          </table:table-cell>
          <table:table-cell office:value-type="string">
            <text:p>problem solving</text:p>
          </table:table-cell>
          <table:table-cell/>
          <table:table-cell office:value-type="string">
            <text:p>released</text:p>
          </table:table-cell>
          <table:table-cell/>
          <table:table-cell office:value-type="string">
            <text:p>Excludes:<text:line-break/>- Repairing and resolving technical problems with machinery and equipment<text:line-break/>- Using ICT tools for problem solving.</text:p>
          </table:table-cell>
          <table:table-cell office:value-type="string">
            <text:p>http://data.europa.eu/esco/concept-scheme/skills<text:line-break/>http://data.europa.eu/esco/concept-scheme/skills-hierarchy</text:p>
          </table:table-cell>
          <table:table-cell office:value-type="string">
            <text:p>Developing and implementing solutions to practical, operational or conceptual problems which arise in the execution of work in a wide range of contexts.</text:p>
          </table:table-cell>
          <table:table-cell office:value-type="string">
            <text:p>S1.9</text:p>
          </table:table-cell>
        </table:table-row>
        <table:table-row>
          <table:table-cell office:value-type="string">
            <text:p>SkillGroup</text:p>
          </table:table-cell>
          <table:table-cell office:value-type="string">
            <text:p>http://data.europa.eu/esco/skill/bf4196e4-839c-4f5f-b13b-eeed07ede160</text:p>
          </table:table-cell>
          <table:table-cell office:value-type="string">
            <text:p>operating precision industrial equipment</text:p>
          </table:table-cell>
          <table:table-cell table:number-columns-repeated="2"/>
          <table:table-cell office:value-type="string">
            <text:p>released</text:p>
          </table:table-cell>
          <table:table-cell office:value-type="string">
            <text:p>2020-12-10T16:29:46.835Z</text:p>
          </table:table-cell>
          <table:table-cell office:value-type="string">
            <text:p>Excludes:<text:line-break/>- Installing and setting up precision equipment Examples:<text:line-break/>- Calibrate mechatronic instruments<text:line-break/>- Operate optical assembly equipment.</text:p>
          </table:table-cell>
          <table:table-cell office:value-type="string">
            <text:p>http://data.europa.eu/esco/concept-scheme/skills<text:line-break/>http://data.europa.eu/esco/concept-scheme/skills-hierarchy</text:p>
          </table:table-cell>
          <table:table-cell office:value-type="string">
            <text:p>Controlling, monitoring, and adjusting precision instrumentation and equipment for industrial production.</text:p>
          </table:table-cell>
          <table:table-cell office:value-type="string">
            <text:p>S8.6.5</text:p>
          </table:table-cell>
        </table:table-row>
        <table:table-row>
          <table:table-cell office:value-type="string">
            <text:p>SkillGroup</text:p>
          </table:table-cell>
          <table:table-cell office:value-type="string">
            <text:p>http://data.europa.eu/esco/skill/bf4822d3-1f66-499d-afc9-151a9ba33e58</text:p>
          </table:table-cell>
          <table:table-cell office:value-type="string">
            <text:p>preparing mixtures or solutions</text:p>
          </table:table-cell>
          <table:table-cell table:number-columns-repeated="2"/>
          <table:table-cell office:value-type="string">
            <text:p>released</text:p>
          </table:table-cell>
          <table:table-cell office:value-type="string">
            <text:p>2020-12-09T08:40:02.853Z</text:p>
          </table:table-cell>
          <table:table-cell office:value-type="string">
            <text:p>Examples:<text:line-break/>- Mix paint<text:line-break/>- Mix construction grouts<text:line-break/>- Blend food ingredients.</text:p>
          </table:table-cell>
          <table:table-cell office:value-type="string">
            <text:p>http://data.europa.eu/esco/concept-scheme/skills<text:line-break/>http://data.europa.eu/esco/concept-scheme/skills-hierarchy</text:p>
          </table:table-cell>
          <table:table-cell office:value-type="string">
            <text:p>Mixing and blending various types of solid or liquid materials, by hand or using handheld tools and equipment.</text:p>
          </table:table-cell>
          <table:table-cell office:value-type="string">
            <text:p>S6.3.1</text:p>
          </table:table-cell>
        </table:table-row>
        <table:table-row>
          <table:table-cell office:value-type="string">
            <text:p>SkillGroup</text:p>
          </table:table-cell>
          <table:table-cell office:value-type="string">
            <text:p>http://data.europa.eu/esco/skill/bffa732b-12ab-4214-a4b3-498598820b1c</text:p>
          </table:table-cell>
          <table:table-cell office:value-type="string">
            <text:p>assigning work to others</text:p>
          </table:table-cell>
          <table:table-cell table:number-columns-repeated="2"/>
          <table:table-cell office:value-type="string">
            <text:p>released</text:p>
          </table:table-cell>
          <table:table-cell office:value-type="string">
            <text:p>2021-12-17T12:57:57.543Z</text:p>
          </table:table-cell>
          <table:table-cell office:value-type="string">
            <text:p>Examples:<text:line-break/>- assign duties to employees<text:line-break/>- assign class work to students<text:line-break/>- delegate tasks.</text:p>
          </table:table-cell>
          <table:table-cell office:value-type="string">
            <text:p>http://data.europa.eu/esco/concept-scheme/skills<text:line-break/>http://data.europa.eu/esco/concept-scheme/skills-hierarchy</text:p>
          </table:table-cell>
          <table:table-cell office:value-type="string">
            <text:p>Assigning specific tasks to workers or students.</text:p>
          </table:table-cell>
          <table:table-cell office:value-type="string">
            <text:p>S4.8.2</text:p>
          </table:table-cell>
        </table:table-row>
        <table:table-row>
          <table:table-cell office:value-type="string">
            <text:p>SkillGroup</text:p>
          </table:table-cell>
          <table:table-cell office:value-type="string">
            <text:p>http://data.europa.eu/esco/skill/c098d6c1-dfee-4b02-8ce5-c6d80c98e18b</text:p>
          </table:table-cell>
          <table:table-cell office:value-type="string">
            <text:p>transforming and blending materials</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office:value-type="string">
            <text:p>Transforming materials from one form to another by mixing, blending, heating or chemical reaction, by hand or using handheld tools and equipment.</text:p>
          </table:table-cell>
          <table:table-cell office:value-type="string">
            <text:p>S6.3.0</text:p>
          </table:table-cell>
        </table:table-row>
        <table:table-row>
          <table:table-cell office:value-type="string">
            <text:p>SkillGroup</text:p>
          </table:table-cell>
          <table:table-cell office:value-type="string">
            <text:p>http://data.europa.eu/esco/skill/c1a13ee0-b00d-4cfa-a22c-20d284e398b0</text:p>
          </table:table-cell>
          <table:table-cell office:value-type="string">
            <text:p>management skills</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office:value-type="string">
            <text:p>Managing people, activities, resources, and organisation; developing objectives and strategies, organising work activities, allocating and controlling resources and leading, motivating, recruiting and supervising people and teams.</text:p>
          </table:table-cell>
          <table:table-cell office:value-type="string">
            <text:p>S4.0</text:p>
          </table:table-cell>
        </table:table-row>
        <table:table-row>
          <table:table-cell office:value-type="string">
            <text:p>SkillGroup</text:p>
          </table:table-cell>
          <table:table-cell office:value-type="string">
            <text:p>http://data.europa.eu/esco/skill/c1bd0ed6-053c-4703-981e-eaec5e57de18</text:p>
          </table:table-cell>
          <table:table-cell office:value-type="string">
            <text:p>maintaining or preparing medical documentation</text:p>
          </table:table-cell>
          <table:table-cell table:number-columns-repeated="2"/>
          <table:table-cell office:value-type="string">
            <text:p>released</text:p>
          </table:table-cell>
          <table:table-cell office:value-type="string">
            <text:p>2022-06-19T15:45:14.266Z</text:p>
          </table:table-cell>
          <table:table-cell office:value-type="string">
            <text:p>Examples:<text:line-break/>- maintain treatment records Excludes:<text:line-break/>- write reports or documents requiring drafting of original text.</text:p>
          </table:table-cell>
          <table:table-cell office:value-type="string">
            <text:p>http://data.europa.eu/esco/concept-scheme/skills<text:line-break/>http://data.europa.eu/esco/concept-scheme/skills-hierarchy</text:p>
          </table:table-cell>
          <table:table-cell office:value-type="string">
            <text:p>Maintaining health and medical records, and preparing standardized reports on health status, medical conditions, or medical test results.</text:p>
          </table:table-cell>
          <table:table-cell office:value-type="string">
            <text:p>S2.2.4</text:p>
          </table:table-cell>
        </table:table-row>
        <table:table-row>
          <table:table-cell office:value-type="string">
            <text:p>SkillGroup</text:p>
          </table:table-cell>
          <table:table-cell office:value-type="string">
            <text:p>http://data.europa.eu/esco/skill/c206d301-14b0-4bea-8028-a3749303a512</text:p>
          </table:table-cell>
          <table:table-cell office:value-type="string">
            <text:p>monitoring and evaluating the performance of individuals</text:p>
          </table:table-cell>
          <table:table-cell table:number-columns-repeated="2"/>
          <table:table-cell office:value-type="string">
            <text:p>released</text:p>
          </table:table-cell>
          <table:table-cell office:value-type="string">
            <text:p>2023-10-26T08:00:53.455Z</text:p>
          </table:table-cell>
          <table:table-cell office:value-type="string">
            <text:p>Examples:<text:line-break/>- monitor the quality of work - perform classroom management<text:line-break/>- evaluate employees work<text:line-break/>- perform self-assessment Excludes:<text:line-break/>- supervise children.</text:p>
          </table:table-cell>
          <table:table-cell office:value-type="string">
            <text:p>http://data.europa.eu/esco/concept-scheme/skills<text:line-break/>http://data.europa.eu/esco/concept-scheme/skills-hierarchy</text:p>
          </table:table-cell>
          <table:table-cell office:value-type="string">
            <text:p>Monitoring the behaviour or performance of workers, students or oneself to ensure that work is completed satisfactorily and to evaluate performance, capabilities and training needs.</text:p>
          </table:table-cell>
          <table:table-cell office:value-type="string">
            <text:p>S4.8.3</text:p>
          </table:table-cell>
        </table:table-row>
        <table:table-row>
          <table:table-cell office:value-type="string">
            <text:p>SkillGroup</text:p>
          </table:table-cell>
          <table:table-cell office:value-type="string">
            <text:p>http://data.europa.eu/esco/skill/c20ac175-3aab-4aaa-9b9e-784c2dfb59cd</text:p>
          </table:table-cell>
          <table:table-cell office:value-type="string">
            <text:p>executing financial transactions</text:p>
          </table:table-cell>
          <table:table-cell table:number-columns-repeated="2"/>
          <table:table-cell office:value-type="string">
            <text:p>released</text:p>
          </table:table-cell>
          <table:table-cell/>
          <table:table-cell office:value-type="string">
            <text:p>Examples:<text:line-break/>- issue sales invoices<text:line-break/>- operate cash register<text:line-break/>- issue purchase order.</text:p>
          </table:table-cell>
          <table:table-cell office:value-type="string">
            <text:p>http://data.europa.eu/esco/concept-scheme/skills<text:line-break/>http://data.europa.eu/esco/concept-scheme/skills-hierarchy</text:p>
          </table:table-cell>
          <table:table-cell office:value-type="string">
            <text:p>Executing financial or commercial transactions such as issuing invoices for sales or issuing purchase orders.</text:p>
          </table:table-cell>
          <table:table-cell office:value-type="string">
            <text:p>S4.4.2</text:p>
          </table:table-cell>
        </table:table-row>
        <table:table-row>
          <table:table-cell office:value-type="string">
            <text:p>SkillGroup</text:p>
          </table:table-cell>
          <table:table-cell office:value-type="string">
            <text:p>http://data.europa.eu/esco/skill/c23e0a2f-f04b-45bc-b0dd-20571f6b502c</text:p>
          </table:table-cell>
          <table:table-cell office:value-type="string">
            <text:p>developing operational policies and procedures</text:p>
          </table:table-cell>
          <table:table-cell table:number-columns-repeated="2"/>
          <table:table-cell office:value-type="string">
            <text:p>released</text:p>
          </table:table-cell>
          <table:table-cell office:value-type="string">
            <text:p>2022-06-21T15:59:58.885Z</text:p>
          </table:table-cell>
          <table:table-cell office:value-type="string">
            <text:p>Examples:<text:line-break/>- define organisational standards<text:line-break/>- establish an ICT customer support process Excludes: - define geographic sales areas<text:line-break/>- develop business case - develop environmental policy.</text:p>
          </table:table-cell>
          <table:table-cell office:value-type="string">
            <text:p>http://data.europa.eu/esco/concept-scheme/skills<text:line-break/>http://data.europa.eu/esco/concept-scheme/skills-hierarchy</text:p>
          </table:table-cell>
          <table:table-cell office:value-type="string">
            <text:p>Developing organisational and operational methods, policies, procedures or standards on company level to ensure streamlining of its operational processes.</text:p>
          </table:table-cell>
          <table:table-cell office:value-type="string">
            <text:p>S4.1.3</text:p>
          </table:table-cell>
        </table:table-row>
        <table:table-row>
          <table:table-cell office:value-type="string">
            <text:p>SkillGroup</text:p>
          </table:table-cell>
          <table:table-cell office:value-type="string">
            <text:p>http://data.europa.eu/esco/skill/c34b06c4-d164-4e49-a784-89d47de42ec2</text:p>
          </table:table-cell>
          <table:table-cell office:value-type="string">
            <text:p>designing industrial materials, systems or products</text:p>
          </table:table-cell>
          <table:table-cell table:number-columns-repeated="2"/>
          <table:table-cell office:value-type="string">
            <text:p>released</text:p>
          </table:table-cell>
          <table:table-cell office:value-type="string">
            <text:p>2020-12-07T15:23:03.877Z</text:p>
          </table:table-cell>
          <table:table-cell office:value-type="string">
            <text:p>Examples:<text:line-break/>- design infrastructure for surface mines<text:line-break/>- design woven fabrics<text:line-break/>- create new enamels Excludes:<text:line-break/>- design electrical or electronic systems or equipment.</text:p>
          </table:table-cell>
          <table:table-cell office:value-type="string">
            <text:p>http://data.europa.eu/esco/concept-scheme/skills<text:line-break/>http://data.europa.eu/esco/concept-scheme/skills-hierarchy</text:p>
          </table:table-cell>
          <table:table-cell office:value-type="string">
            <text:p>Creating or executing a plan or specification for the design of industrial, materials, products, or production systems, based on aesthetic and/or functional design concepts.</text:p>
          </table:table-cell>
          <table:table-cell office:value-type="string">
            <text:p>S1.11.5</text:p>
          </table:table-cell>
        </table:table-row>
        <table:table-row>
          <table:table-cell office:value-type="string">
            <text:p>SkillGroup</text:p>
          </table:table-cell>
          <table:table-cell office:value-type="string">
            <text:p>http://data.europa.eu/esco/skill/c4376e35-add7-43a0-8b2e-f5741f0df8fe</text:p>
          </table:table-cell>
          <table:table-cell office:value-type="string">
            <text:p>carrying out forensic and police investigations</text:p>
          </table:table-cell>
          <table:table-cell table:number-columns-repeated="2"/>
          <table:table-cell office:value-type="string">
            <text:p>released</text:p>
          </table:table-cell>
          <table:table-cell office:value-type="string">
            <text:p>2024-01-25T11:04:06.314Z</text:p>
          </table:table-cell>
          <table:table-cell office:value-type="string">
            <text:p>Examples:<text:line-break/>- examine crime scenes<text:line-break/>- perform drug investigations Excludes:<text:line-break/>- conduct psychological research.</text:p>
          </table:table-cell>
          <table:table-cell office:value-type="string">
            <text:p>http://data.europa.eu/esco/concept-scheme/skills<text:line-break/>http://data.europa.eu/esco/concept-scheme/skills-hierarchy</text:p>
          </table:table-cell>
          <table:table-cell office:value-type="string">
            <text:p>Performing police or forensic investigations to increase knowledge related to crime.</text:p>
          </table:table-cell>
          <table:table-cell office:value-type="string">
            <text:p>S2.1.4</text:p>
          </table:table-cell>
        </table:table-row>
        <table:table-row>
          <table:table-cell office:value-type="string">
            <text:p>SkillGroup</text:p>
          </table:table-cell>
          <table:table-cell office:value-type="string">
            <text:p>http://data.europa.eu/esco/skill/c46fcb45-5c14-4ffa-abed-5a43f104bb22</text:p>
          </table:table-cell>
          <table:table-cell office:value-type="string">
            <text:p>knowledge</text:p>
          </table:table-cell>
          <table:table-cell office:value-type="string">
            <text:p>knowledge</text:p>
          </table:table-cell>
          <table:table-cell/>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table:table-cell office:value-type="string">
            <text:p>K</text:p>
          </table:table-cell>
        </table:table-row>
        <table:table-row>
          <table:table-cell office:value-type="string">
            <text:p>SkillGroup</text:p>
          </table:table-cell>
          <table:table-cell office:value-type="string">
            <text:p>http://data.europa.eu/esco/skill/c53a55a1-8b2b-4d2c-b12d-626742a3833a</text:p>
          </table:table-cell>
          <table:table-cell office:value-type="string">
            <text:p>using digital tools for processing sound and images</text:p>
          </table:table-cell>
          <table:table-cell table:number-columns-repeated="2"/>
          <table:table-cell office:value-type="string">
            <text:p>released</text:p>
          </table:table-cell>
          <table:table-cell office:value-type="string">
            <text:p>2020-12-03T09:34:17.228Z</text:p>
          </table:table-cell>
          <table:table-cell office:value-type="string">
            <text:p>Excludes:<text:line-break/>- Computer programming<text:line-break/>- Resolving computer problems Examples:<text:line-break/>- Edit photographs<text:line-break/>- Use audio reproduction software<text:line-break/>- Synchronise sound with images.</text:p>
          </table:table-cell>
          <table:table-cell office:value-type="string">
            <text:p>http://data.europa.eu/esco/concept-scheme/skills<text:line-break/>http://data.europa.eu/esco/concept-scheme/skills-hierarchy</text:p>
          </table:table-cell>
          <table:table-cell office:value-type="string">
            <text:p>Using ICT software and hardware to for processing sound and images.</text:p>
          </table:table-cell>
          <table:table-cell office:value-type="string">
            <text:p>S5.6.4</text:p>
          </table:table-cell>
        </table:table-row>
        <table:table-row>
          <table:table-cell office:value-type="string">
            <text:p>SkillGroup</text:p>
          </table:table-cell>
          <table:table-cell office:value-type="string">
            <text:p>http://data.europa.eu/esco/skill/c54a0a94-9d45-4697-b7cb-f7eaef839031</text:p>
          </table:table-cell>
          <table:table-cell office:value-type="string">
            <text:p>driving heavy vehicles</text:p>
          </table:table-cell>
          <table:table-cell table:number-columns-repeated="2"/>
          <table:table-cell office:value-type="string">
            <text:p>released</text:p>
          </table:table-cell>
          <table:table-cell/>
          <table:table-cell office:value-type="string">
            <text:p>Heavy vehicles are those with a total weight above 3,500 kg. (vehicle + load) Examples:<text:line-break/>- Drive ambulance under emergency conditions<text:line-break/>- Manoeuvre bus<text:line-break/>- Operate dump truck<text:line-break/>- Drive funicular.</text:p>
          </table:table-cell>
          <table:table-cell office:value-type="string">
            <text:p>http://data.europa.eu/esco/concept-scheme/skills<text:line-break/>http://data.europa.eu/esco/concept-scheme/skills-hierarchy</text:p>
          </table:table-cell>
          <table:table-cell office:value-type="string">
            <text:p>Driving heavy vehicles, such as heavy trucks and buses, for the transportation of goods or people by road.</text:p>
          </table:table-cell>
          <table:table-cell office:value-type="string">
            <text:p>S8.2.1</text:p>
          </table:table-cell>
        </table:table-row>
        <table:table-row>
          <table:table-cell office:value-type="string">
            <text:p>SkillGroup</text:p>
          </table:table-cell>
          <table:table-cell office:value-type="string">
            <text:p>http://data.europa.eu/esco/skill/c57c0294-9940-4626-8954-08055bc242ba</text:p>
          </table:table-cell>
          <table:table-cell office:value-type="string">
            <text:p>supervising people</text:p>
          </table:table-cell>
          <table:table-cell table:number-columns-repeated="2"/>
          <table:table-cell office:value-type="string">
            <text:p>released</text:p>
          </table:table-cell>
          <table:table-cell/>
          <table:table-cell office:value-type="string">
            <text:p>Excludes:<text:line-break/>- Define roles of team members<text:line-break/>- Supervise children.</text:p>
          </table:table-cell>
          <table:table-cell office:value-type="string">
            <text:p>http://data.europa.eu/esco/concept-scheme/skills<text:line-break/>http://data.europa.eu/esco/concept-scheme/skills-hierarchy</text:p>
          </table:table-cell>
          <table:table-cell office:value-type="string">
            <text:p>Assigning responsibilities to others and directing and monitoring their performance.</text:p>
          </table:table-cell>
          <table:table-cell office:value-type="string">
            <text:p>S4.8.0</text:p>
          </table:table-cell>
        </table:table-row>
        <table:table-row>
          <table:table-cell office:value-type="string">
            <text:p>SkillGroup</text:p>
          </table:table-cell>
          <table:table-cell office:value-type="string">
            <text:p>http://data.europa.eu/esco/skill/c5b71c57-6f78-4c54-b332-ec75848f1095</text:p>
          </table:table-cell>
          <table:table-cell office:value-type="string">
            <text:p>conducting studies, investigations and examinations</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office:value-type="string">
            <text:p>Conducting studies, investigations, and examinations to increase knowledge and understanding, diagnose problems or identify needs and requirements.</text:p>
          </table:table-cell>
          <table:table-cell office:value-type="string">
            <text:p>S2.1</text:p>
          </table:table-cell>
        </table:table-row>
        <table:table-row>
          <table:table-cell office:value-type="string">
            <text:p>SkillGroup</text:p>
          </table:table-cell>
          <table:table-cell office:value-type="string">
            <text:p>http://data.europa.eu/esco/skill/c5ff50d7-97d3-401e-90ac-e5ae756a52de</text:p>
          </table:table-cell>
          <table:table-cell office:value-type="string">
            <text:p>monitoring health conditions of humans and animals</text:p>
          </table:table-cell>
          <table:table-cell table:number-columns-repeated="2"/>
          <table:table-cell office:value-type="string">
            <text:p>released</text:p>
          </table:table-cell>
          <table:table-cell office:value-type="string">
            <text:p>2024-01-02T09:05:27.449Z</text:p>
          </table:table-cell>
          <table:table-cell office:value-type="string">
            <text:p>Excludes:<text:line-break/>- Testing and analysing substances Examples:<text:line-break/>- Monitor patient's health condition<text:line-break/>- Monitor pregnancy<text:line-break/>- Monitor fish health status.</text:p>
          </table:table-cell>
          <table:table-cell office:value-type="string">
            <text:p>http://data.europa.eu/esco/concept-scheme/skills<text:line-break/>http://data.europa.eu/esco/concept-scheme/skills-hierarchy</text:p>
          </table:table-cell>
          <table:table-cell office:value-type="string">
            <text:p>Monitoring health conditions of humans or animals throughout their lifecycle or during specific occasions, such as pregnancy or surgery.</text:p>
          </table:table-cell>
          <table:table-cell office:value-type="string">
            <text:p>S2.8.6</text:p>
          </table:table-cell>
        </table:table-row>
        <table:table-row>
          <table:table-cell office:value-type="string">
            <text:p>SkillGroup</text:p>
          </table:table-cell>
          <table:table-cell office:value-type="string">
            <text:p>http://data.europa.eu/esco/skill/c73521be-c039-4e22-b037-3b01b3f6f9d9</text:p>
          </table:table-cell>
          <table:table-cell office:value-type="string">
            <text:p>assisting and caring</text:p>
          </table:table-cell>
          <table:table-cell office:value-type="string">
            <text:p>providing services</text:p>
          </table:table-cell>
          <table:table-cell/>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office:value-type="string">
            <text:p>Providing assistance, nurturing, care, service and support to people, and ensuring compliance to rules, standards, guidelines or laws.</text:p>
          </table:table-cell>
          <table:table-cell office:value-type="string">
            <text:p>S3</text:p>
          </table:table-cell>
        </table:table-row>
        <table:table-row>
          <table:table-cell office:value-type="string">
            <text:p>SkillGroup</text:p>
          </table:table-cell>
          <table:table-cell office:value-type="string">
            <text:p>http://data.europa.eu/esco/skill/c75655c3-ed29-441e-b403-4dd65bc891a5</text:p>
          </table:table-cell>
          <table:table-cell office:value-type="string">
            <text:p>providing medical advice</text:p>
          </table:table-cell>
          <table:table-cell table:number-columns-repeated="2"/>
          <table:table-cell office:value-type="string">
            <text:p>released</text:p>
          </table:table-cell>
          <table:table-cell office:value-type="string">
            <text:p>2023-10-27T14:03:02.868Z</text:p>
          </table:table-cell>
          <table:table-cell office:value-type="string">
            <text:p>Examples:<text:line-break/>- advise on rehabilitation exercises<text:line-break/>- advise on medical device features<text:line-break/>- offer advice on diet related concerns<text:line-break/>- explain the molecular basis of a disease to patients Excludes:<text:line-break/>- provide advice on animal health.</text:p>
          </table:table-cell>
          <table:table-cell office:value-type="string">
            <text:p>http://data.europa.eu/esco/concept-scheme/skills<text:line-break/>http://data.europa.eu/esco/concept-scheme/skills-hierarchy</text:p>
          </table:table-cell>
          <table:table-cell office:value-type="string">
            <text:p>Explaining medical and healthcare information to patients or family members and/or advising them on medical, health or wellness issues.</text:p>
          </table:table-cell>
          <table:table-cell office:value-type="string">
            <text:p>S1.5.4</text:p>
          </table:table-cell>
        </table:table-row>
        <table:table-row>
          <table:table-cell office:value-type="string">
            <text:p>SkillGroup</text:p>
          </table:table-cell>
          <table:table-cell office:value-type="string">
            <text:p>http://data.europa.eu/esco/skill/c7f96545-46c4-451a-b284-014f4baed5ed</text:p>
          </table:table-cell>
          <table:table-cell office:value-type="string">
            <text:p>making decisions</text:p>
          </table:table-cell>
          <table:table-cell table:number-columns-repeated="2"/>
          <table:table-cell office:value-type="string">
            <text:p>released</text:p>
          </table:table-cell>
          <table:table-cell office:value-type="string">
            <text:p>2021-12-17T12:52:46.944Z</text:p>
          </table:table-cell>
          <table:table-cell office:value-type="string">
            <text:p>Examples:<text:line-break/>- Decide on loan applications<text:line-break/>- Make legal decisions<text:line-break/>- Decide on products to be stocked.</text:p>
          </table:table-cell>
          <table:table-cell office:value-type="string">
            <text:p>http://data.europa.eu/esco/concept-scheme/skills<text:line-break/>http://data.europa.eu/esco/concept-scheme/skills-hierarchy</text:p>
          </table:table-cell>
          <table:table-cell office:value-type="string">
            <text:p>Making a choice from several alternative possibilities.</text:p>
          </table:table-cell>
          <table:table-cell office:value-type="string">
            <text:p>S4.9.0</text:p>
          </table:table-cell>
        </table:table-row>
        <table:table-row>
          <table:table-cell office:value-type="string">
            <text:p>SkillGroup</text:p>
          </table:table-cell>
          <table:table-cell office:value-type="string">
            <text:p>http://data.europa.eu/esco/skill/c85f95ae-34fb-487b-b3d5-10803eee619d</text:p>
          </table:table-cell>
          <table:table-cell office:value-type="string">
            <text:p>creating artistic, visual or instructive materials</text:p>
          </table:table-cell>
          <table:table-cell office:value-type="string">
            <text:p>creating artistic and visual materials</text:p>
          </table:table-cell>
          <table:table-cell/>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office:value-type="string">
            <text:p>Creating and developing visual representations and displays, instructional or promotional materials, or artistic designs or performances.</text:p>
          </table:table-cell>
          <table:table-cell office:value-type="string">
            <text:p>S1.12</text:p>
          </table:table-cell>
        </table:table-row>
        <table:table-row>
          <table:table-cell office:value-type="string">
            <text:p>SkillGroup</text:p>
          </table:table-cell>
          <table:table-cell office:value-type="string">
            <text:p>http://data.europa.eu/esco/skill/c8f4aad2-ea23-49a2-9708-a6049c2d28ce</text:p>
          </table:table-cell>
          <table:table-cell office:value-type="string">
            <text:p>using precision measuring equipment</text:p>
          </table:table-cell>
          <table:table-cell table:number-columns-repeated="2"/>
          <table:table-cell office:value-type="string">
            <text:p>released</text:p>
          </table:table-cell>
          <table:table-cell office:value-type="string">
            <text:p>2020-12-10T17:46:15.65Z</text:p>
          </table:table-cell>
          <table:table-cell office:value-type="string">
            <text:p>Excludes:<text:line-break/>- Installing and setting up precision equipment Examples:<text:line-break/>- Read electricity meter<text:line-break/>- Operate surveying instruments<text:line-break/>- Use lensometer.</text:p>
          </table:table-cell>
          <table:table-cell office:value-type="string">
            <text:p>http://data.europa.eu/esco/concept-scheme/skills<text:line-break/>http://data.europa.eu/esco/concept-scheme/skills-hierarchy</text:p>
          </table:table-cell>
          <table:table-cell office:value-type="string">
            <text:p>Using, reading and monitoring instruments and equipment for precise measurement.</text:p>
          </table:table-cell>
          <table:table-cell office:value-type="string">
            <text:p>S8.6.6</text:p>
          </table:table-cell>
        </table:table-row>
        <table:table-row>
          <table:table-cell office:value-type="string">
            <text:p>SkillGroup</text:p>
          </table:table-cell>
          <table:table-cell office:value-type="string">
            <text:p>http://data.europa.eu/esco/skill/ca5b2cf4-0f3e-4c47-b496-12d812a7e5d9</text:p>
          </table:table-cell>
          <table:table-cell office:value-type="string">
            <text:p>handling and moving</text:p>
          </table:table-cell>
          <table:table-cell office:value-type="string">
            <text:p>handling goods or animals</text:p>
          </table:table-cell>
          <table:table-cell/>
          <table:table-cell office:value-type="string">
            <text:p>released</text:p>
          </table:table-cell>
          <table:table-cell/>
          <table:table-cell office:value-type="string">
            <text:p>Excludes:<text:line-break/>- Specific skills involving interaction with people.</text:p>
          </table:table-cell>
          <table:table-cell office:value-type="string">
            <text:p>http://data.europa.eu/esco/concept-scheme/skills<text:line-break/>http://data.europa.eu/esco/concept-scheme/skills-hierarchy</text:p>
          </table:table-cell>
          <table:table-cell office:value-type="string">
            <text:p>Sorting, arranging, moving, transforming, fabricating and cleaning goods and materials by hand or using handheld tools and equipment. Tending plants, crops and animals.</text:p>
          </table:table-cell>
          <table:table-cell office:value-type="string">
            <text:p>S6.0.0</text:p>
          </table:table-cell>
        </table:table-row>
        <table:table-row>
          <table:table-cell office:value-type="string">
            <text:p>SkillGroup</text:p>
          </table:table-cell>
          <table:table-cell office:value-type="string">
            <text:p>http://data.europa.eu/esco/skill/cab71b2a-4b65-4e98-a7a9-0b20c39fc248</text:p>
          </table:table-cell>
          <table:table-cell office:value-type="string">
            <text:p>working with machinery and specialised equipment</text:p>
          </table:table-cell>
          <table:table-cell office:value-type="string">
            <text:p>machinery, equipment, vehicles</text:p>
          </table:table-cell>
          <table:table-cell/>
          <table:table-cell office:value-type="string">
            <text:p>released</text:p>
          </table:table-cell>
          <table:table-cell/>
          <table:table-cell office:value-type="string">
            <text:p>Excludes:<text:line-break/>- Interacting with computers.</text:p>
          </table:table-cell>
          <table:table-cell office:value-type="string">
            <text:p>http://data.europa.eu/esco/concept-scheme/skills<text:line-break/>http://data.europa.eu/esco/concept-scheme/skills-hierarchy</text:p>
          </table:table-cell>
          <table:table-cell office:value-type="string">
            <text:p>Controlling, operating and monitoring vehicles, stationary and mobile machinery and precision instrumentation and equipment.</text:p>
          </table:table-cell>
          <table:table-cell office:value-type="string">
            <text:p>S8.0</text:p>
          </table:table-cell>
        </table:table-row>
        <table:table-row>
          <table:table-cell office:value-type="string">
            <text:p>SkillGroup</text:p>
          </table:table-cell>
          <table:table-cell office:value-type="string">
            <text:p>http://data.europa.eu/esco/skill/cacc62f3-2df4-4cc3-9d5d-0d014db56bd9</text:p>
          </table:table-cell>
          <table:table-cell office:value-type="string">
            <text:p>using digital tools for collaboration, content creation and problem solving</text:p>
          </table:table-cell>
          <table:table-cell office:value-type="string">
            <text:p>using digital tools for collaboration and creativity</text:p>
          </table:table-cell>
          <table:table-cell/>
          <table:table-cell office:value-type="string">
            <text:p>released</text:p>
          </table:table-cell>
          <table:table-cell/>
          <table:table-cell office:value-type="string">
            <text:p>Excludes:<text:line-break/>- Computer programming<text:line-break/>- Resolving computer problems.</text:p>
          </table:table-cell>
          <table:table-cell office:value-type="string">
            <text:p>http://data.europa.eu/esco/concept-scheme/skills<text:line-break/>http://data.europa.eu/esco/concept-scheme/skills-hierarchy</text:p>
          </table:table-cell>
          <table:table-cell office:value-type="string">
            <text:p>Using ICT software and hardware to collaborate and communicate with others, creating and editing new content (from word processing to images and video) and solving conceptual, technical and practical problems.</text:p>
          </table:table-cell>
          <table:table-cell office:value-type="string">
            <text:p>S5.6</text:p>
          </table:table-cell>
        </table:table-row>
        <table:table-row>
          <table:table-cell office:value-type="string">
            <text:p>SkillGroup</text:p>
          </table:table-cell>
          <table:table-cell office:value-type="string">
            <text:p>http://data.europa.eu/esco/skill/caede8f1-6658-4d78-9eb4-2ad2c7ebf09b</text:p>
          </table:table-cell>
          <table:table-cell office:value-type="string">
            <text:p>teaching and training</text:p>
          </table:table-cell>
          <table:table-cell table:number-columns-repeated="2"/>
          <table:table-cell office:value-type="string">
            <text:p>released</text:p>
          </table:table-cell>
          <table:table-cell office:value-type="string">
            <text:p>2021-09-30T15:58:04.159Z</text:p>
          </table:table-cell>
          <table:table-cell office:value-type="string">
            <text:p>Examples:<text:line-break/>- provide teacher support Excludes:<text:line-break/>- training animals.</text:p>
          </table:table-cell>
          <table:table-cell office:value-type="string">
            <text:p>http://data.europa.eu/esco/concept-scheme/skills<text:line-break/>http://data.europa.eu/esco/concept-scheme/skills-hierarchy</text:p>
          </table:table-cell>
          <table:table-cell office:value-type="string">
            <text:p>Facilitating the acquisition of new knowledge and skills. Leading and guiding individuals and groups through a process in which they are taught the necessary skills and knowledge for life, future learning or for a particular job or set of jobs.</text:p>
          </table:table-cell>
          <table:table-cell office:value-type="string">
            <text:p>S1.3.0</text:p>
          </table:table-cell>
        </table:table-row>
        <table:table-row>
          <table:table-cell office:value-type="string">
            <text:p>SkillGroup</text:p>
          </table:table-cell>
          <table:table-cell office:value-type="string">
            <text:p>http://data.europa.eu/esco/skill/cbe1b24e-00f3-4b17-94e9-1fcd34a11c3e</text:p>
          </table:table-cell>
          <table:table-cell office:value-type="string">
            <text:p>identifying opportunities</text:p>
          </table:table-cell>
          <table:table-cell table:number-columns-repeated="2"/>
          <table:table-cell office:value-type="string">
            <text:p>released</text:p>
          </table:table-cell>
          <table:table-cell office:value-type="string">
            <text:p>2023-07-06T10:18:55.77Z</text:p>
          </table:table-cell>
          <table:table-cell office:value-type="string">
            <text:p>Examples:<text:line-break/>- identify market niches<text:line-break/>- identify new business opportunities<text:line-break/>- identify process improvements.</text:p>
          </table:table-cell>
          <table:table-cell office:value-type="string">
            <text:p>http://data.europa.eu/esco/concept-scheme/skills<text:line-break/>http://data.europa.eu/esco/concept-scheme/skills-hierarchy</text:p>
          </table:table-cell>
          <table:table-cell office:value-type="string">
            <text:p>Identifying business or organizational opportunities.</text:p>
          </table:table-cell>
          <table:table-cell office:value-type="string">
            <text:p>S4.1.1</text:p>
          </table:table-cell>
        </table:table-row>
        <table:table-row>
          <table:table-cell office:value-type="string">
            <text:p>SkillGroup</text:p>
          </table:table-cell>
          <table:table-cell office:value-type="string">
            <text:p>http://data.europa.eu/esco/skill/ccb6db6a-8538-431c-b740-5f241bdb71cf</text:p>
          </table:table-cell>
          <table:table-cell office:value-type="string">
            <text:p>manipulating and controlling objects and equipment</text:p>
          </table:table-cell>
          <table:table-cell office:value-type="string">
            <text:p>performing physical tasks and activities<text:line-break/>lifting, moving and placing objects</text:p>
          </table:table-cell>
          <table:table-cell/>
          <table:table-cell office:value-type="string">
            <text:p>released</text:p>
          </table:table-cell>
          <table:table-cell office:value-type="string">
            <text:p>2021-08-30T16:48:17.42Z</text:p>
          </table:table-cell>
          <table:table-cell/>
          <table:table-cell office:value-type="string">
            <text:p>http://data.europa.eu/esco/concept-scheme/skills<text:line-break/>http://data.europa.eu/esco/concept-scheme/skills-hierarchy<text:line-break/>http://data.europa.eu/esco/concept-scheme/skill-transversal-groups</text:p>
          </table:table-cell>
          <table:table-cell office:value-type="string">
            <text:p>Move or lift objects, or use equipment, tools or technology with precision.</text:p>
          </table:table-cell>
          <table:table-cell office:value-type="string">
            <text:p>T5.1</text:p>
          </table:table-cell>
        </table:table-row>
        <table:table-row>
          <table:table-cell office:value-type="string">
            <text:p>SkillGroup</text:p>
          </table:table-cell>
          <table:table-cell office:value-type="string">
            <text:p>http://data.europa.eu/esco/skill/cd9c487e-09ad-4b82-854b-118feb01f2ed</text:p>
          </table:table-cell>
          <table:table-cell office:value-type="string">
            <text:p>information skills</text:p>
          </table:table-cell>
          <table:table-cell office:value-type="string">
            <text:p>working with information</text:p>
          </table:table-cell>
          <table:table-cell/>
          <table:table-cell office:value-type="string">
            <text:p>released</text:p>
          </table:table-cell>
          <table:table-cell office:value-type="string">
            <text:p>2023-07-06T10:16:56.623Z</text:p>
          </table:table-cell>
          <table:table-cell/>
          <table:table-cell office:value-type="string">
            <text:p>http://data.europa.eu/esco/concept-scheme/skills<text:line-break/>http://data.europa.eu/esco/concept-scheme/skills-hierarchy</text:p>
          </table:table-cell>
          <table:table-cell office:value-type="string">
            <text:p>Collecting, storing, monitoring, and using information; Conducting studies, investigations and tests; maintaining records; managing, evaluating, processing, analysing and monitoring information and projecting outcomes.</text:p>
          </table:table-cell>
          <table:table-cell office:value-type="string">
            <text:p>S2.0.0</text:p>
          </table:table-cell>
        </table:table-row>
        <table:table-row>
          <table:table-cell office:value-type="string">
            <text:p>SkillGroup</text:p>
          </table:table-cell>
          <table:table-cell office:value-type="string">
            <text:p>http://data.europa.eu/esco/skill/cdb2aecd-9dca-48fd-8d56-f0aace3ab5a9</text:p>
          </table:table-cell>
          <table:table-cell office:value-type="string">
            <text:p>presenting general information</text:p>
          </table:table-cell>
          <table:table-cell table:number-columns-repeated="2"/>
          <table:table-cell office:value-type="string">
            <text:p>released</text:p>
          </table:table-cell>
          <table:table-cell office:value-type="string">
            <text:p>2021-12-17T12:55:43.975Z</text:p>
          </table:table-cell>
          <table:table-cell office:value-type="string">
            <text:p>Examples:<text:line-break/>- give live presentation<text:line-break/>- deliver presentations on tourism - present reports Excludes:<text:line-break/>- present information in legal proceedings<text:line-break/>- present research or technical information.</text:p>
          </table:table-cell>
          <table:table-cell office:value-type="string">
            <text:p>http://data.europa.eu/esco/concept-scheme/skills<text:line-break/>http://data.europa.eu/esco/concept-scheme/skills-hierarchy</text:p>
          </table:table-cell>
          <table:table-cell office:value-type="string">
            <text:p>Presenting information of a non-technical nature to an audience.</text:p>
          </table:table-cell>
          <table:table-cell office:value-type="string">
            <text:p>S1.4.1</text:p>
          </table:table-cell>
        </table:table-row>
        <table:table-row>
          <table:table-cell office:value-type="string">
            <text:p>SkillGroup</text:p>
          </table:table-cell>
          <table:table-cell office:value-type="string">
            <text:p>http://data.europa.eu/esco/skill/ce17a874-b476-491d-a7a7-5f05d32ad542</text:p>
          </table:table-cell>
          <table:table-cell office:value-type="string">
            <text:p>leading and motivating</text:p>
          </table:table-cell>
          <table:table-cell office:value-type="string">
            <text:p>leadership</text:p>
          </table:table-cell>
          <table:table-cell/>
          <table:table-cell office:value-type="string">
            <text:p>released</text:p>
          </table:table-cell>
          <table:table-cell/>
          <table:table-cell office:value-type="string">
            <text:p>Excludes:<text:line-break/>- Managing, leading or supervising a team or its members. Examples:<text:line-break/>- Motivate employees<text:line-break/>- Provide leadership<text:line-break/>- Lead board meetings.</text:p>
          </table:table-cell>
          <table:table-cell office:value-type="string">
            <text:p>http://data.europa.eu/esco/concept-scheme/skills<text:line-break/>http://data.europa.eu/esco/concept-scheme/skills-hierarchy</text:p>
          </table:table-cell>
          <table:table-cell office:value-type="string">
            <text:p>Reinforcing an organization's vision, inspiring and enthusing others to achieve positive outcomes. The focus of this group is on skills in motivating and inspiring others, rather than on managing and supervising a team.</text:p>
          </table:table-cell>
          <table:table-cell office:value-type="string">
            <text:p>S4.5</text:p>
          </table:table-cell>
        </table:table-row>
        <table:table-row>
          <table:table-cell office:value-type="string">
            <text:p>SkillGroup</text:p>
          </table:table-cell>
          <table:table-cell office:value-type="string">
            <text:p>http://data.europa.eu/esco/skill/ceca8bbe-cd58-49b4-8ef4-9a34a5ac0f75</text:p>
          </table:table-cell>
          <table:table-cell office:value-type="string">
            <text:p>operating food processing machinery</text:p>
          </table:table-cell>
          <table:table-cell table:number-columns-repeated="2"/>
          <table:table-cell office:value-type="string">
            <text:p>released</text:p>
          </table:table-cell>
          <table:table-cell/>
          <table:table-cell office:value-type="string">
            <text:p>Excludes:<text:line-break/>- Operating handheld tools and bench top kitchen appliances Examples:<text:line-break/>- Operate fish processing equipment<text:line-break/>- Tend bakery ovens<text:line-break/>- Tend blanching machines.</text:p>
          </table:table-cell>
          <table:table-cell office:value-type="string">
            <text:p>http://data.europa.eu/esco/concept-scheme/skills<text:line-break/>http://data.europa.eu/esco/concept-scheme/skills-hierarchy</text:p>
          </table:table-cell>
          <table:table-cell office:value-type="string">
            <text:p>Operating and tending machinery for the processing of food and other organic materials and for the manufacture of food and related products.</text:p>
          </table:table-cell>
          <table:table-cell office:value-type="string">
            <text:p>S8.5.4</text:p>
          </table:table-cell>
        </table:table-row>
        <table:table-row>
          <table:table-cell office:value-type="string">
            <text:p>SkillGroup</text:p>
          </table:table-cell>
          <table:table-cell office:value-type="string">
            <text:p>http://data.europa.eu/esco/skill/cfd5ab8f-ef8a-4877-8243-ddf17ac74604</text:p>
          </table:table-cell>
          <table:table-cell office:value-type="string">
            <text:p>planning events and programmes</text:p>
          </table:table-cell>
          <table:table-cell table:number-columns-repeated="2"/>
          <table:table-cell office:value-type="string">
            <text:p>released</text:p>
          </table:table-cell>
          <table:table-cell office:value-type="string">
            <text:p>2024-01-25T10:26:05.635Z</text:p>
          </table:table-cell>
          <table:table-cell office:value-type="string">
            <text:p>Examples:<text:line-break/>- control financial resources<text:line-break/>- manage revenue<text:line-break/>- handle external financing.</text:p>
          </table:table-cell>
          <table:table-cell office:value-type="string">
            <text:p>http://data.europa.eu/esco/concept-scheme/skills<text:line-break/>http://data.europa.eu/esco/concept-scheme/skills-hierarchy</text:p>
          </table:table-cell>
          <table:table-cell office:value-type="string">
            <text:p>Planning workflow and content for projects, events or programmes.</text:p>
          </table:table-cell>
          <table:table-cell office:value-type="string">
            <text:p>S4.2.2</text:p>
          </table:table-cell>
        </table:table-row>
        <table:table-row>
          <table:table-cell office:value-type="string">
            <text:p>SkillGroup</text:p>
          </table:table-cell>
          <table:table-cell office:value-type="string">
            <text:p>http://data.europa.eu/esco/skill/d12a1be6-d916-436d-8274-ad97b5f24415</text:p>
          </table:table-cell>
          <table:table-cell office:value-type="string">
            <text:p>composing music</text:p>
          </table:table-cell>
          <table:table-cell table:number-columns-repeated="2"/>
          <table:table-cell office:value-type="string">
            <text:p>released</text:p>
          </table:table-cell>
          <table:table-cell/>
          <table:table-cell office:value-type="string">
            <text:p>Examples:<text:line-break/>- compose music<text:line-break/>- orchestrate music<text:line-break/>- develop original melodies<text:line-break/>- improvise music Excludes:<text:line-break/>- compose lyrics.</text:p>
          </table:table-cell>
          <table:table-cell office:value-type="string">
            <text:p>http://data.europa.eu/esco/concept-scheme/skills<text:line-break/>http://data.europa.eu/esco/concept-scheme/skills-hierarchy</text:p>
          </table:table-cell>
          <table:table-cell office:value-type="string">
            <text:p>Composing and arranging music.</text:p>
          </table:table-cell>
          <table:table-cell office:value-type="string">
            <text:p>S1.13.1</text:p>
          </table:table-cell>
        </table:table-row>
        <table:table-row>
          <table:table-cell office:value-type="string">
            <text:p>SkillGroup</text:p>
          </table:table-cell>
          <table:table-cell office:value-type="string">
            <text:p>http://data.europa.eu/esco/skill/d1815c8a-7755-4fe3-bacf-68bb0b6a0b55</text:p>
          </table:table-cell>
          <table:table-cell office:value-type="string">
            <text:p>developing instructive or promotional materials</text:p>
          </table:table-cell>
          <table:table-cell table:number-columns-repeated="2"/>
          <table:table-cell office:value-type="string">
            <text:p>released</text:p>
          </table:table-cell>
          <table:table-cell/>
          <table:table-cell office:value-type="string">
            <text:p>Examples:<text:line-break/>- design materials for multimedia campaigns<text:line-break/>- prepare lesson content<text:line-break/>- prepare presentation material.</text:p>
          </table:table-cell>
          <table:table-cell office:value-type="string">
            <text:p>http://data.europa.eu/esco/concept-scheme/skills<text:line-break/>http://data.europa.eu/esco/concept-scheme/skills-hierarchy</text:p>
          </table:table-cell>
          <table:table-cell office:value-type="string">
            <text:p>Creating and developing materials for instructional, educational, advertising or promotional purposes.</text:p>
          </table:table-cell>
          <table:table-cell office:value-type="string">
            <text:p>S1.12.2</text:p>
          </table:table-cell>
        </table:table-row>
        <table:table-row>
          <table:table-cell office:value-type="string">
            <text:p>SkillGroup</text:p>
          </table:table-cell>
          <table:table-cell office:value-type="string">
            <text:p>http://data.europa.eu/esco/skill/d23b21ca-2ef5-4b5e-b37e-a5311dc2e292</text:p>
          </table:table-cell>
          <table:table-cell office:value-type="string">
            <text:p>using hand tools</text:p>
          </table:table-cell>
          <table:table-cell table:number-columns-repeated="2"/>
          <table:table-cell office:value-type="string">
            <text:p>released</text:p>
          </table:table-cell>
          <table:table-cell/>
          <table:table-cell office:value-type="string">
            <text:p>Excludes:<text:line-break/>- Fabricating products by hand<text:line-break/>- Operating a lawn-mower.</text:p>
          </table:table-cell>
          <table:table-cell office:value-type="string">
            <text:p>http://data.europa.eu/esco/concept-scheme/skills<text:line-break/>http://data.europa.eu/esco/concept-scheme/skills-hierarchy</text:p>
          </table:table-cell>
          <table:table-cell office:value-type="string">
            <text:p>Using the hands and tools that can be held in the hands, including power tools.</text:p>
          </table:table-cell>
          <table:table-cell office:value-type="string">
            <text:p>S6.7</text:p>
          </table:table-cell>
        </table:table-row>
        <table:table-row>
          <table:table-cell office:value-type="string">
            <text:p>SkillGroup</text:p>
          </table:table-cell>
          <table:table-cell office:value-type="string">
            <text:p>http://data.europa.eu/esco/skill/d2e8f452-ac19-4eed-b984-8f55d2a5b763</text:p>
          </table:table-cell>
          <table:table-cell office:value-type="string">
            <text:p>testing and analysing substances</text:p>
          </table:table-cell>
          <table:table-cell table:number-columns-repeated="2"/>
          <table:table-cell office:value-type="string">
            <text:p>released</text:p>
          </table:table-cell>
          <table:table-cell office:value-type="string">
            <text:p>2024-01-25T10:36:50.141Z</text:p>
          </table:table-cell>
          <table:table-cell office:value-type="string">
            <text:p>Examples:<text:line-break/>- Analyse body fluids<text:line-break/>- Conduct soil sample tests<text:line-break/>- Test alkalinity<text:line-break/>- Test oxygen purity.</text:p>
          </table:table-cell>
          <table:table-cell office:value-type="string">
            <text:p>http://data.europa.eu/esco/concept-scheme/skills<text:line-break/>http://data.europa.eu/esco/concept-scheme/skills-hierarchy</text:p>
          </table:table-cell>
          <table:table-cell office:value-type="string">
            <text:p>Performing tests and analyses of gases, fluids or solid substances, such as blood samples, cell cultures and samples of food and beverages.</text:p>
          </table:table-cell>
          <table:table-cell office:value-type="string">
            <text:p>S2.8.8</text:p>
          </table:table-cell>
        </table:table-row>
        <table:table-row>
          <table:table-cell office:value-type="string">
            <text:p>SkillGroup</text:p>
          </table:table-cell>
          <table:table-cell office:value-type="string">
            <text:p>http://data.europa.eu/esco/skill/d3b2c894-33fb-47c4-aff0-27935a082bf6</text:p>
          </table:table-cell>
          <table:table-cell office:value-type="string">
            <text:p>operating petroleum, chemical or water processing systems or equipment</text:p>
          </table:table-cell>
          <table:table-cell table:number-columns-repeated="2"/>
          <table:table-cell office:value-type="string">
            <text:p>released</text:p>
          </table:table-cell>
          <table:table-cell office:value-type="string">
            <text:p>2021-04-27T13:08:08.432Z</text:p>
          </table:table-cell>
          <table:table-cell office:value-type="string">
            <text:p>Examples:<text:line-break/>- Operate distillation equipment<text:line-break/>- Operate biogas plant<text:line-break/>- Operate hatchery recirculation system.</text:p>
          </table:table-cell>
          <table:table-cell office:value-type="string">
            <text:p>http://data.europa.eu/esco/concept-scheme/skills<text:line-break/>http://data.europa.eu/esco/concept-scheme/skills-hierarchy</text:p>
          </table:table-cell>
          <table:table-cell office:value-type="string">
            <text:p>Operating machinery for producing, refining or purifying petroleum, chemicals, gases or water.</text:p>
          </table:table-cell>
          <table:table-cell office:value-type="string">
            <text:p>S8.4.5</text:p>
          </table:table-cell>
        </table:table-row>
        <table:table-row>
          <table:table-cell office:value-type="string">
            <text:p>SkillGroup</text:p>
          </table:table-cell>
          <table:table-cell office:value-type="string">
            <text:p>http://data.europa.eu/esco/skill/d46193e0-be7d-4a90-91cc-4caba78e19d0</text:p>
          </table:table-cell>
          <table:table-cell office:value-type="string">
            <text:p>engaging with others to identify needs</text:p>
          </table:table-cell>
          <table:table-cell table:number-columns-repeated="2"/>
          <table:table-cell office:value-type="string">
            <text:p>released</text:p>
          </table:table-cell>
          <table:table-cell/>
          <table:table-cell office:value-type="string">
            <text:p>Examples:<text:line-break/>- identify customer objectives<text:line-break/>- interact with users to gather requirements.</text:p>
          </table:table-cell>
          <table:table-cell office:value-type="string">
            <text:p>http://data.europa.eu/esco/concept-scheme/skills<text:line-break/>http://data.europa.eu/esco/concept-scheme/skills-hierarchy</text:p>
          </table:table-cell>
          <table:table-cell office:value-type="string">
            <text:p>Engaging in discussions in order to identify expectations, requirements, desires, needs and problems of clients, co-workers, students and others.</text:p>
          </table:table-cell>
          <table:table-cell office:value-type="string">
            <text:p>S1.7.2</text:p>
          </table:table-cell>
        </table:table-row>
        <table:table-row>
          <table:table-cell office:value-type="string">
            <text:p>SkillGroup</text:p>
          </table:table-cell>
          <table:table-cell office:value-type="string">
            <text:p>http://data.europa.eu/esco/skill/d519fadd-85bf-475f-bf14-c53a0290687d</text:p>
          </table:table-cell>
          <table:table-cell office:value-type="string">
            <text:p>monitoring environmental conditions</text:p>
          </table:table-cell>
          <table:table-cell table:number-columns-repeated="2"/>
          <table:table-cell office:value-type="string">
            <text:p>released</text:p>
          </table:table-cell>
          <table:table-cell office:value-type="string">
            <text:p>2020-12-08T11:41:32.598Z</text:p>
          </table:table-cell>
          <table:table-cell office:value-type="string">
            <text:p>Excludes:<text:line-break/>- Testing and analysing substances Examples:<text:line-break/>- Monitor radiation levels<text:line-break/>- Monitor forest health<text:line-break/>- Monitor parking areas to maintain security<text:line-break/>- Assess harvesting impact on wildlife<text:line-break/>- Inspect mine safety conditions.</text:p>
          </table:table-cell>
          <table:table-cell office:value-type="string">
            <text:p>http://data.europa.eu/esco/concept-scheme/skills<text:line-break/>http://data.europa.eu/esco/concept-scheme/skills-hierarchy</text:p>
          </table:table-cell>
          <table:table-cell office:value-type="string">
            <text:p>Measuring and maintaining awareness of changes in environmental conditions including the weather, air and water quality, and the impact of human activities on nature.</text:p>
          </table:table-cell>
          <table:table-cell office:value-type="string">
            <text:p>S2.8.5</text:p>
          </table:table-cell>
        </table:table-row>
        <table:table-row>
          <table:table-cell office:value-type="string">
            <text:p>SkillGroup</text:p>
          </table:table-cell>
          <table:table-cell office:value-type="string">
            <text:p>http://data.europa.eu/esco/skill/d54970ba-d9f2-41ec-a852-bbd1e5796823</text:p>
          </table:table-cell>
          <table:table-cell office:value-type="string">
            <text:p>providing information to the public and clients</text:p>
          </table:table-cell>
          <table:table-cell table:number-columns-repeated="2"/>
          <table:table-cell office:value-type="string">
            <text:p>released</text:p>
          </table:table-cell>
          <table:table-cell office:value-type="string">
            <text:p>2023-02-21T20:39:37.564Z</text:p>
          </table:table-cell>
          <table:table-cell office:value-type="string">
            <text:p>Examples:<text:line-break/>- inform customers of activity changes<text:line-break/>- respond to enquiries Excludes:<text:line-break/>- presentation of information to groups.</text:p>
          </table:table-cell>
          <table:table-cell office:value-type="string">
            <text:p>http://data.europa.eu/esco/concept-scheme/skills<text:line-break/>http://data.europa.eu/esco/concept-scheme/skills-hierarchy</text:p>
          </table:table-cell>
          <table:table-cell office:value-type="string">
            <text:p>Answering questions, making recommendations, and providing information or support in response to requests from clients, customers, guests or members of the public.</text:p>
          </table:table-cell>
          <table:table-cell office:value-type="string">
            <text:p>S3.4.1</text:p>
          </table:table-cell>
        </table:table-row>
        <table:table-row>
          <table:table-cell office:value-type="string">
            <text:p>SkillGroup</text:p>
          </table:table-cell>
          <table:table-cell office:value-type="string">
            <text:p>http://data.europa.eu/esco/skill/d5f302db-adff-4bae-b7d4-37293b397193</text:p>
          </table:table-cell>
          <table:table-cell office:value-type="string">
            <text:p>finishing interior or exterior of structures</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office:value-type="string">
            <text:p>Applying interior and exterior finishes to buildings and other structures.</text:p>
          </table:table-cell>
          <table:table-cell office:value-type="string">
            <text:p>S7.3</text:p>
          </table:table-cell>
        </table:table-row>
        <table:table-row>
          <table:table-cell office:value-type="string">
            <text:p>SkillGroup</text:p>
          </table:table-cell>
          <table:table-cell office:value-type="string">
            <text:p>http://data.europa.eu/esco/skill/d69e45d3-1f3f-4e6a-8933-82e949277811</text:p>
          </table:table-cell>
          <table:table-cell office:value-type="string">
            <text:p>cleaning interior and exterior of buildings</text:p>
          </table:table-cell>
          <table:table-cell table:number-columns-repeated="2"/>
          <table:table-cell office:value-type="string">
            <text:p>released</text:p>
          </table:table-cell>
          <table:table-cell office:value-type="string">
            <text:p>2022-06-19T15:45:14.266Z</text:p>
          </table:table-cell>
          <table:table-cell office:value-type="string">
            <text:p>Excludes:<text:line-break/>- Specialised cleaning of equipment in buildings, such as sweeping chimneys Examples:<text:line-break/>- Clean rooms - Clean train interiors<text:line-break/>- Maintain work area cleanliness.</text:p>
          </table:table-cell>
          <table:table-cell office:value-type="string">
            <text:p>http://data.europa.eu/esco/concept-scheme/skills<text:line-break/>http://data.europa.eu/esco/concept-scheme/skills-hierarchy</text:p>
          </table:table-cell>
          <table:table-cell office:value-type="string">
            <text:p>Cleaning interior spaces and furnishings and the exterior of buildings and similar structures.</text:p>
          </table:table-cell>
          <table:table-cell office:value-type="string">
            <text:p>S6.11.2</text:p>
          </table:table-cell>
        </table:table-row>
        <table:table-row>
          <table:table-cell office:value-type="string">
            <text:p>SkillGroup</text:p>
          </table:table-cell>
          <table:table-cell office:value-type="string">
            <text:p>http://data.europa.eu/esco/skill/d6a8a2a4-4e21-4ea6-b267-b5c63e687cfd</text:p>
          </table:table-cell>
          <table:table-cell office:value-type="string">
            <text:p>counselling on personal, family or social issues</text:p>
          </table:table-cell>
          <table:table-cell table:number-columns-repeated="2"/>
          <table:table-cell office:value-type="string">
            <text:p>released</text:p>
          </table:table-cell>
          <table:table-cell office:value-type="string">
            <text:p>2022-07-15T14:44:44.924Z</text:p>
          </table:table-cell>
          <table:table-cell office:value-type="string">
            <text:p>Examples:<text:line-break/>- give advice on personal matters<text:line-break/>- help clients cope with grief.</text:p>
          </table:table-cell>
          <table:table-cell office:value-type="string">
            <text:p>http://data.europa.eu/esco/concept-scheme/skills<text:line-break/>http://data.europa.eu/esco/concept-scheme/skills-hierarchy</text:p>
          </table:table-cell>
          <table:table-cell office:value-type="string">
            <text:p>Responding to clients' needs by interpreting their emotional and motivational states, and assisting them to understand their situation.</text:p>
          </table:table-cell>
          <table:table-cell office:value-type="string">
            <text:p>S3.1.1</text:p>
          </table:table-cell>
        </table:table-row>
        <table:table-row>
          <table:table-cell office:value-type="string">
            <text:p>SkillGroup</text:p>
          </table:table-cell>
          <table:table-cell office:value-type="string">
            <text:p>http://data.europa.eu/esco/skill/d6c8dacb-b0c0-4544-b0b7-69b24df41ba1</text:p>
          </table:table-cell>
          <table:table-cell office:value-type="string">
            <text:p>managing transport and logistics activities</text:p>
          </table:table-cell>
          <table:table-cell table:number-columns-repeated="2"/>
          <table:table-cell office:value-type="string">
            <text:p>released</text:p>
          </table:table-cell>
          <table:table-cell office:value-type="string">
            <text:p>2023-02-22T19:40:51.512Z</text:p>
          </table:table-cell>
          <table:table-cell/>
          <table:table-cell office:value-type="string">
            <text:p>http://data.europa.eu/esco/concept-scheme/skills<text:line-break/>http://data.europa.eu/esco/concept-scheme/skills-hierarchy</text:p>
          </table:table-cell>
          <table:table-cell office:value-type="string">
            <text:p>Planning, overseeing and directing logistics or other operational activities related to transport of goods or passengers.</text:p>
          </table:table-cell>
          <table:table-cell office:value-type="string">
            <text:p>S4.2.4</text:p>
          </table:table-cell>
        </table:table-row>
        <table:table-row>
          <table:table-cell office:value-type="string">
            <text:p>SkillGroup</text:p>
          </table:table-cell>
          <table:table-cell office:value-type="string">
            <text:p>http://data.europa.eu/esco/skill/d6e4373a-ef2c-4b64-9dc6-4140846f6609</text:p>
          </table:table-cell>
          <table:table-cell office:value-type="string">
            <text:p>programming computer systems</text:p>
          </table:table-cell>
          <table:table-cell office:value-type="string">
            <text:p>programming</text:p>
          </table:table-cell>
          <table:table-cell/>
          <table:table-cell office:value-type="string">
            <text:p>released</text:p>
          </table:table-cell>
          <table:table-cell office:value-type="string">
            <text:p>2021-07-09T16:07:23.426Z</text:p>
          </table:table-cell>
          <table:table-cell office:value-type="string">
            <text:p>Excludes:<text:line-break/>- Systems analysis<text:line-break/>- Issuing commands to computer controlled machines and equipment Examples:<text:line-break/>- Write computer programming code<text:line-break/>- Use query languages<text:line-break/>- Debug software.</text:p>
          </table:table-cell>
          <table:table-cell office:value-type="string">
            <text:p>http://data.europa.eu/esco/concept-scheme/skills<text:line-break/>http://data.europa.eu/esco/concept-scheme/skills-hierarchy</text:p>
          </table:table-cell>
          <table:table-cell office:value-type="string">
            <text:p>Writing and submitting instructions, specifications and programmes for computers.</text:p>
          </table:table-cell>
          <table:table-cell office:value-type="string">
            <text:p>S5.1</text:p>
          </table:table-cell>
        </table:table-row>
        <table:table-row>
          <table:table-cell office:value-type="string">
            <text:p>SkillGroup</text:p>
          </table:table-cell>
          <table:table-cell office:value-type="string">
            <text:p>http://data.europa.eu/esco/skill/d6e97b91-b75d-45f5-8566-667798957b0f</text:p>
          </table:table-cell>
          <table:table-cell office:value-type="string">
            <text:p>applying civic skills and competences</text:p>
          </table:table-cell>
          <table:table-cell office:value-type="string">
            <text:p>seeking opportunities for self-empowerment and participatory involvement</text:p>
          </table:table-cell>
          <table:table-cell/>
          <table:table-cell office:value-type="string">
            <text:p>released</text:p>
          </table:table-cell>
          <table:table-cell office:value-type="string">
            <text:p>2021-09-06T09:49:10.132Z</text:p>
          </table:table-cell>
          <table:table-cell office:value-type="string">
            <text:p>The skills and competences referred to under this heading address the ability to actively interact with fellow citizens and engage in communities.</text:p>
          </table:table-cell>
          <table:table-cell office:value-type="string">
            <text:p>http://data.europa.eu/esco/concept-scheme/skills<text:line-break/>http://data.europa.eu/esco/concept-scheme/skills-hierarchy<text:line-break/>http://data.europa.eu/esco/concept-scheme/skill-transversal-groups</text:p>
          </table:table-cell>
          <table:table-cell office:value-type="string">
            <text:p>Interact with citizens and engage in communities, by evaluating information and its sources, reflecting on own ideas, values and roles and recognizing and respecting the ideas, values and roles of others.</text:p>
          </table:table-cell>
          <table:table-cell office:value-type="string">
            <text:p>T6.3</text:p>
          </table:table-cell>
        </table:table-row>
        <table:table-row>
          <table:table-cell office:value-type="string">
            <text:p>SkillGroup</text:p>
          </table:table-cell>
          <table:table-cell office:value-type="string">
            <text:p>http://data.europa.eu/esco/skill/d700aa7a-0ed8-4967-a32c-4cb6075ab3b9</text:p>
          </table:table-cell>
          <table:table-cell office:value-type="string">
            <text:p>diagnosing health conditions</text:p>
          </table:table-cell>
          <table:table-cell table:number-columns-repeated="2"/>
          <table:table-cell office:value-type="string">
            <text:p>released</text:p>
          </table:table-cell>
          <table:table-cell office:value-type="string">
            <text:p>2023-11-06T08:02:23.35Z</text:p>
          </table:table-cell>
          <table:table-cell office:value-type="string">
            <text:p>Examples:<text:line-break/>- diagnose heart conditions<text:line-break/>- diagnose mental disorders - interpret medical images<text:line-break/>- diagnose nursing care<text:line-break/>- assess fish health conditions Excludes:<text:line-break/>- analyse and interpret medical test results.</text:p>
          </table:table-cell>
          <table:table-cell office:value-type="string">
            <text:p>http://data.europa.eu/esco/concept-scheme/skills<text:line-break/>http://data.europa.eu/esco/concept-scheme/skills-hierarchy</text:p>
          </table:table-cell>
          <table:table-cell office:value-type="string">
            <text:p>Examining patients, deceased persons or animals to diagnose physical and mental illnesses, injuries and medical conditions.</text:p>
          </table:table-cell>
          <table:table-cell office:value-type="string">
            <text:p>S2.1.2</text:p>
          </table:table-cell>
        </table:table-row>
        <table:table-row>
          <table:table-cell office:value-type="string">
            <text:p>SkillGroup</text:p>
          </table:table-cell>
          <table:table-cell office:value-type="string">
            <text:p>http://data.europa.eu/esco/skill/d7d2a468-587b-4a03-a305-e0a399ba69e6</text:p>
          </table:table-cell>
          <table:table-cell office:value-type="string">
            <text:p>listening and asking questions</text:p>
          </table:table-cell>
          <table:table-cell table:number-columns-repeated="2"/>
          <table:table-cell office:value-type="string">
            <text:p>released</text:p>
          </table:table-cell>
          <table:table-cell office:value-type="string">
            <text:p>2021-10-05T15:39:39.123Z</text:p>
          </table:table-cell>
          <table:table-cell office:value-type="string">
            <text:p>Examples:<text:line-break/>- use questioning techniques<text:line-break/>- listen actively.</text:p>
          </table:table-cell>
          <table:table-cell office:value-type="string">
            <text:p>http://data.europa.eu/esco/concept-scheme/skills<text:line-break/>http://data.europa.eu/esco/concept-scheme/skills-hierarchy</text:p>
          </table:table-cell>
          <table:table-cell office:value-type="string">
            <text:p>Listen carefully to what other people say, patiently understanding points being made, formulating and asking appropriate questions, without interrupting at inappropriate times.</text:p>
          </table:table-cell>
          <table:table-cell office:value-type="string">
            <text:p>S1.7.3</text:p>
          </table:table-cell>
        </table:table-row>
        <table:table-row>
          <table:table-cell office:value-type="string">
            <text:p>SkillGroup</text:p>
          </table:table-cell>
          <table:table-cell office:value-type="string">
            <text:p>http://data.europa.eu/esco/skill/d94e1143-3a3a-4f6a-a881-df93bf56cf23</text:p>
          </table:table-cell>
          <table:table-cell office:value-type="string">
            <text:p>analysing financial and economic data</text:p>
          </table:table-cell>
          <table:table-cell table:number-columns-repeated="2"/>
          <table:table-cell office:value-type="string">
            <text:p>released</text:p>
          </table:table-cell>
          <table:table-cell office:value-type="string">
            <text:p>2020-12-09T12:11:28.514Z</text:p>
          </table:table-cell>
          <table:table-cell office:value-type="string">
            <text:p>Excludes:<text:line-break/>- Risk analysis<text:line-break/>- Using ICT tools to analyse and process data. Examples:<text:line-break/>- Forecast economic trends<text:line-break/>- Prepare financial projections<text:line-break/>- Consult credit scores.</text:p>
          </table:table-cell>
          <table:table-cell office:value-type="string">
            <text:p>http://data.europa.eu/esco/concept-scheme/skills<text:line-break/>http://data.europa.eu/esco/concept-scheme/skills-hierarchy</text:p>
          </table:table-cell>
          <table:table-cell office:value-type="string">
            <text:p>Analysing and evaluating information and data on finances and on economic and market trends.</text:p>
          </table:table-cell>
          <table:table-cell office:value-type="string">
            <text:p>S2.7.3</text:p>
          </table:table-cell>
        </table:table-row>
        <table:table-row>
          <table:table-cell office:value-type="string">
            <text:p>SkillGroup</text:p>
          </table:table-cell>
          <table:table-cell office:value-type="string">
            <text:p>http://data.europa.eu/esco/skill/d9b1387a-7cad-4b77-8481-7798a3b41714</text:p>
          </table:table-cell>
          <table:table-cell office:value-type="string">
            <text:p>operating aircraft</text:p>
          </table:table-cell>
          <table:table-cell table:number-columns-repeated="2"/>
          <table:table-cell office:value-type="string">
            <text:p>released</text:p>
          </table:table-cell>
          <table:table-cell/>
          <table:table-cell office:value-type="string">
            <text:p>Examples:<text:line-break/>- Perform take-off and landing<text:line-break/>- Drive helicopter under emergency conditions<text:line-break/>- Operate cockpit control panels.</text:p>
          </table:table-cell>
          <table:table-cell office:value-type="string">
            <text:p>http://data.europa.eu/esco/concept-scheme/skills<text:line-break/>http://data.europa.eu/esco/concept-scheme/skills-hierarchy</text:p>
          </table:table-cell>
          <table:table-cell office:value-type="string">
            <text:p>Controlling the movement of aircraft, including fixed wing aircraft, helicopters and drones.</text:p>
          </table:table-cell>
          <table:table-cell office:value-type="string">
            <text:p>S8.9</text:p>
          </table:table-cell>
        </table:table-row>
        <table:table-row>
          <table:table-cell office:value-type="string">
            <text:p>SkillGroup</text:p>
          </table:table-cell>
          <table:table-cell office:value-type="string">
            <text:p>http://data.europa.eu/esco/skill/d9be4ab0-f7d9-4b27-bd01-6cf1d43d1865</text:p>
          </table:table-cell>
          <table:table-cell office:value-type="string">
            <text:p>installing concrete components</text:p>
          </table:table-cell>
          <table:table-cell table:number-columns-repeated="2"/>
          <table:table-cell office:value-type="string">
            <text:p>released</text:p>
          </table:table-cell>
          <table:table-cell/>
          <table:table-cell office:value-type="string">
            <text:p>Examples:<text:line-break/>- Pour concrete<text:line-break/>- Place concrete forms<text:line-break/>- Settle concrete.</text:p>
          </table:table-cell>
          <table:table-cell office:value-type="string">
            <text:p>http://data.europa.eu/esco/concept-scheme/skills<text:line-break/>http://data.europa.eu/esco/concept-scheme/skills-hierarchy</text:p>
          </table:table-cell>
          <table:table-cell office:value-type="string">
            <text:p>Setting concrete forms and pouring concrete for construction of footings, pilings, pillars and walls for buildings, bridges and other structures.</text:p>
          </table:table-cell>
          <table:table-cell office:value-type="string">
            <text:p>S7.1.4</text:p>
          </table:table-cell>
        </table:table-row>
        <table:table-row>
          <table:table-cell office:value-type="string">
            <text:p>SkillGroup</text:p>
          </table:table-cell>
          <table:table-cell office:value-type="string">
            <text:p>http://data.europa.eu/esco/skill/da230865-9d2a-42d9-a42e-37d89753109e</text:p>
          </table:table-cell>
          <table:table-cell office:value-type="string">
            <text:p>applying material to fill gaps in surfaces</text:p>
          </table:table-cell>
          <table:table-cell table:number-columns-repeated="2"/>
          <table:table-cell office:value-type="string">
            <text:p>released</text:p>
          </table:table-cell>
          <table:table-cell/>
          <table:table-cell office:value-type="string">
            <text:p>Examples:<text:line-break/>- Fill nail holes in wood planks<text:line-break/>- Install insulation blocks<text:line-break/>- Grout terrazzo.</text:p>
          </table:table-cell>
          <table:table-cell office:value-type="string">
            <text:p>http://data.europa.eu/esco/concept-scheme/skills<text:line-break/>http://data.europa.eu/esco/concept-scheme/skills-hierarchy</text:p>
          </table:table-cell>
          <table:table-cell office:value-type="string">
            <text:p>Applying various types of material to fill or seal gaps in the surfaces of walls, floors, furnishings vehicles or other items.</text:p>
          </table:table-cell>
          <table:table-cell office:value-type="string">
            <text:p>S7.3.1</text:p>
          </table:table-cell>
        </table:table-row>
        <table:table-row>
          <table:table-cell office:value-type="string">
            <text:p>SkillGroup</text:p>
          </table:table-cell>
          <table:table-cell office:value-type="string">
            <text:p>http://data.europa.eu/esco/skill/da94d48b-5036-48e1-ad96-d85cba6ed29c</text:p>
          </table:table-cell>
          <table:table-cell office:value-type="string">
            <text:p>operating mobile plant</text:p>
          </table:table-cell>
          <table:table-cell office:value-type="string">
            <text:p>mobile plant</text:p>
          </table:table-cell>
          <table:table-cell/>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office:value-type="string">
            <text:p>Controlling the operation of machinery whose mobility is an integral part of its function, such as earthmoving, agricultural, forestry and lifting equipment.</text:p>
          </table:table-cell>
          <table:table-cell office:value-type="string">
            <text:p>S8.1</text:p>
          </table:table-cell>
        </table:table-row>
        <table:table-row>
          <table:table-cell office:value-type="string">
            <text:p>SkillGroup</text:p>
          </table:table-cell>
          <table:table-cell office:value-type="string">
            <text:p>http://data.europa.eu/esco/skill/db54693e-bcb0-4dae-8885-a43d510fb71f</text:p>
          </table:table-cell>
          <table:table-cell office:value-type="string">
            <text:p>developing health programmes</text:p>
          </table:table-cell>
          <table:table-cell table:number-columns-repeated="2"/>
          <table:table-cell office:value-type="string">
            <text:p>released</text:p>
          </table:table-cell>
          <table:table-cell/>
          <table:table-cell office:value-type="string">
            <text:p>Examples:<text:line-break/>- develop advanced health promotion strategies<text:line-break/>- promote sport activities in public health.</text:p>
          </table:table-cell>
          <table:table-cell office:value-type="string">
            <text:p>http://data.europa.eu/esco/concept-scheme/skills<text:line-break/>http://data.europa.eu/esco/concept-scheme/skills-hierarchy</text:p>
          </table:table-cell>
          <table:table-cell office:value-type="string">
            <text:p>Developing plans for the promotion and protection of public and community health and the provision of health services.</text:p>
          </table:table-cell>
          <table:table-cell office:value-type="string">
            <text:p>S4.1.5</text:p>
          </table:table-cell>
        </table:table-row>
        <table:table-row>
          <table:table-cell office:value-type="string">
            <text:p>SkillGroup</text:p>
          </table:table-cell>
          <table:table-cell office:value-type="string">
            <text:p>http://data.europa.eu/esco/skill/dbbbe31a-9b8c-4459-a830-84363648f52c</text:p>
          </table:table-cell>
          <table:table-cell office:value-type="string">
            <text:p>driving light vehicles</text:p>
          </table:table-cell>
          <table:table-cell table:number-columns-repeated="2"/>
          <table:table-cell office:value-type="string">
            <text:p>released</text:p>
          </table:table-cell>
          <table:table-cell/>
          <table:table-cell office:value-type="string">
            <text:p>Light vehicles are those with a total weight not exceeding 3,500 kg. (vehicle + load) Examples:<text:line-break/>- Drive two-wheeled vehicles<text:line-break/>- Drive automatic car.</text:p>
          </table:table-cell>
          <table:table-cell office:value-type="string">
            <text:p>http://data.europa.eu/esco/concept-scheme/skills<text:line-break/>http://data.europa.eu/esco/concept-scheme/skills-hierarchy</text:p>
          </table:table-cell>
          <table:table-cell office:value-type="string">
            <text:p>Controlling the movement of light vehicles such as motorcycles cars, taxis, vans and light trucks.</text:p>
          </table:table-cell>
          <table:table-cell office:value-type="string">
            <text:p>S8.2.2</text:p>
          </table:table-cell>
        </table:table-row>
        <table:table-row>
          <table:table-cell office:value-type="string">
            <text:p>SkillGroup</text:p>
          </table:table-cell>
          <table:table-cell office:value-type="string">
            <text:p>http://data.europa.eu/esco/skill/dc06de9f-dd3a-4f28-b58f-b01b5ae72ab8</text:p>
          </table:table-cell>
          <table:table-cell office:value-type="string">
            <text:p>communication, collaboration and creativity</text:p>
          </table:table-cell>
          <table:table-cell office:value-type="string">
            <text:p>communication and creativity</text:p>
          </table:table-cell>
          <table:table-cell/>
          <table:table-cell office:value-type="string">
            <text:p>released</text:p>
          </table:table-cell>
          <table:table-cell/>
          <table:table-cell office:value-type="string">
            <text:p>Excludes:<text:line-break/>- communication or interaction with animals.</text:p>
          </table:table-cell>
          <table:table-cell office:value-type="string">
            <text:p>http://data.europa.eu/esco/concept-scheme/skills<text:line-break/>http://data.europa.eu/esco/concept-scheme/skills-hierarchy</text:p>
          </table:table-cell>
          <table:table-cell office:value-type="string">
            <text:p>Communicating, collaborating, liaising, and negotiating with other people, developing solutions to problems, creating plans or specifications for the design of objects and systems, composing text or music, performing to entertain an audience, and imparting knowledge to others.</text:p>
          </table:table-cell>
          <table:table-cell office:value-type="string">
            <text:p>S1</text:p>
          </table:table-cell>
        </table:table-row>
        <table:table-row>
          <table:table-cell office:value-type="string">
            <text:p>SkillGroup</text:p>
          </table:table-cell>
          <table:table-cell office:value-type="string">
            <text:p>http://data.europa.eu/esco/skill/dcb9c446-bb08-44de-89b6-851ac2903eaf</text:p>
          </table:table-cell>
          <table:table-cell office:value-type="string">
            <text:p>operating print and photographic production equipment</text:p>
          </table:table-cell>
          <table:table-cell table:number-columns-repeated="2"/>
          <table:table-cell office:value-type="string">
            <text:p>released</text:p>
          </table:table-cell>
          <table:table-cell/>
          <table:table-cell office:value-type="string">
            <text:p>Examples:<text:line-break/>- Operate flexographic printing machine<text:line-break/>- Adjust rotogravure press<text:line-break/>- Operate collating machine.</text:p>
          </table:table-cell>
          <table:table-cell office:value-type="string">
            <text:p>http://data.europa.eu/esco/concept-scheme/skills<text:line-break/>http://data.europa.eu/esco/concept-scheme/skills-hierarchy</text:p>
          </table:table-cell>
          <table:table-cell office:value-type="string">
            <text:p>Operating and tending machinery for printing and photographic reproduction.</text:p>
          </table:table-cell>
          <table:table-cell office:value-type="string">
            <text:p>S8.5.6</text:p>
          </table:table-cell>
        </table:table-row>
        <table:table-row>
          <table:table-cell office:value-type="string">
            <text:p>SkillGroup</text:p>
          </table:table-cell>
          <table:table-cell office:value-type="string">
            <text:p>http://data.europa.eu/esco/skill/dddd229b-61e1-480d-80d6-d9d9ee9b5f54</text:p>
          </table:table-cell>
          <table:table-cell office:value-type="string">
            <text:p>managing information</text:p>
          </table:table-cell>
          <table:table-cell table:number-columns-repeated="2"/>
          <table:table-cell office:value-type="string">
            <text:p>released</text:p>
          </table:table-cell>
          <table:table-cell office:value-type="string">
            <text:p>2022-06-07T12:34:37.336Z</text:p>
          </table:table-cell>
          <table:table-cell office:value-type="string">
            <text:p>Examples:<text:line-break/>- Manage digital archives<text:line-break/>- Oversee record management<text:line-break/>- Organise information.</text:p>
          </table:table-cell>
          <table:table-cell office:value-type="string">
            <text:p>http://data.europa.eu/esco/concept-scheme/skills<text:line-break/>http://data.europa.eu/esco/concept-scheme/skills-hierarchy</text:p>
          </table:table-cell>
          <table:table-cell office:value-type="string">
            <text:p>Setting up and managing manual or electronic systems for storing , selecting, organizing, retrieving, distributing and safeguarding information.</text:p>
          </table:table-cell>
          <table:table-cell office:value-type="string">
            <text:p>S2.3</text:p>
          </table:table-cell>
        </table:table-row>
        <table:table-row>
          <table:table-cell office:value-type="string">
            <text:p>SkillGroup</text:p>
          </table:table-cell>
          <table:table-cell office:value-type="string">
            <text:p>http://data.europa.eu/esco/skill/de884168-32e7-4500-a227-3f0966f962b6</text:p>
          </table:table-cell>
          <table:table-cell office:value-type="string">
            <text:p>presenting information</text:p>
          </table:table-cell>
          <table:table-cell table:number-columns-repeated="2"/>
          <table:table-cell office:value-type="string">
            <text:p>released</text:p>
          </table:table-cell>
          <table:table-cell office:value-type="string">
            <text:p>2022-06-21T09:45:20.179Z</text:p>
          </table:table-cell>
          <table:table-cell/>
          <table:table-cell office:value-type="string">
            <text:p>http://data.europa.eu/esco/concept-scheme/skills<text:line-break/>http://data.europa.eu/esco/concept-scheme/skills-hierarchy</text:p>
          </table:table-cell>
          <table:table-cell office:value-type="string">
            <text:p>Presenting oral or visual material to an audience in order to provide or interpret information.</text:p>
          </table:table-cell>
          <table:table-cell office:value-type="string">
            <text:p>S1.4.0</text:p>
          </table:table-cell>
        </table:table-row>
        <table:table-row>
          <table:table-cell office:value-type="string">
            <text:p>SkillGroup</text:p>
          </table:table-cell>
          <table:table-cell office:value-type="string">
            <text:p>http://data.europa.eu/esco/skill/dfae80db-cf29-41e1-a48c-2bee901afff1</text:p>
          </table:table-cell>
          <table:table-cell office:value-type="string">
            <text:p>building and developing teams</text:p>
          </table:table-cell>
          <table:table-cell office:value-type="string">
            <text:p>managing teams</text:p>
          </table:table-cell>
          <table:table-cell/>
          <table:table-cell office:value-type="string">
            <text:p>released</text:p>
          </table:table-cell>
          <table:table-cell/>
          <table:table-cell office:value-type="string">
            <text:p>Excludes:<text:line-break/>- Training<text:line-break/>- Recruiting and hiring Examples:<text:line-break/>- Facilitate teamwork between students<text:line-break/>- Encourage teambuilding.</text:p>
          </table:table-cell>
          <table:table-cell office:value-type="string">
            <text:p>http://data.europa.eu/esco/concept-scheme/skills<text:line-break/>http://data.europa.eu/esco/concept-scheme/skills-hierarchy</text:p>
          </table:table-cell>
          <table:table-cell office:value-type="string">
            <text:p>Encouraging team members and building a relationship of mutual trust, respect and cooperation. Stimulating teambuilding activities.</text:p>
          </table:table-cell>
          <table:table-cell office:value-type="string">
            <text:p>S4.6.0</text:p>
          </table:table-cell>
        </table:table-row>
        <table:table-row>
          <table:table-cell office:value-type="string">
            <text:p>SkillGroup</text:p>
          </table:table-cell>
          <table:table-cell office:value-type="string">
            <text:p>http://data.europa.eu/esco/skill/e001ce62-78e7-4821-a7df-a08457c295ab</text:p>
          </table:table-cell>
          <table:table-cell office:value-type="string">
            <text:p>performing surgical procedures</text:p>
          </table:table-cell>
          <table:table-cell table:number-columns-repeated="2"/>
          <table:table-cell office:value-type="string">
            <text:p>released</text:p>
          </table:table-cell>
          <table:table-cell/>
          <table:table-cell office:value-type="string">
            <text:p>Examples:<text:line-break/>- dental surgery<text:line-break/>- administer anaesthetics<text:line-break/>- perform paediatric surgery Excludes:<text:line-break/>- veterinary surgery.</text:p>
          </table:table-cell>
          <table:table-cell office:value-type="string">
            <text:p>http://data.europa.eu/esco/concept-scheme/skills<text:line-break/>http://data.europa.eu/esco/concept-scheme/skills-hierarchy</text:p>
          </table:table-cell>
          <table:table-cell office:value-type="string">
            <text:p>Treating injuries and health conditions through provision of various types of surgical intervention.</text:p>
          </table:table-cell>
          <table:table-cell office:value-type="string">
            <text:p>S3.2.2</text:p>
          </table:table-cell>
        </table:table-row>
        <table:table-row>
          <table:table-cell office:value-type="string">
            <text:p>SkillGroup</text:p>
          </table:table-cell>
          <table:table-cell office:value-type="string">
            <text:p>http://data.europa.eu/esco/skill/e06f2d35-a160-46c2-89f1-9cae9c93c8b8</text:p>
          </table:table-cell>
          <table:table-cell office:value-type="string">
            <text:p>selling products or services</text:p>
          </table:table-cell>
          <table:table-cell table:number-columns-repeated="2"/>
          <table:table-cell office:value-type="string">
            <text:p>released</text:p>
          </table:table-cell>
          <table:table-cell office:value-type="string">
            <text:p>2022-06-19T15:23:46.929Z</text:p>
          </table:table-cell>
          <table:table-cell office:value-type="string">
            <text:p>Examples:<text:line-break/>- sell office equipment<text:line-break/>- take room service orders<text:line-break/>- deliver a sales pitch<text:line-break/>- sell products Excludes:<text:line-break/>- perform financial transactions.</text:p>
          </table:table-cell>
          <table:table-cell office:value-type="string">
            <text:p>http://data.europa.eu/esco/concept-scheme/skills<text:line-break/>http://data.europa.eu/esco/concept-scheme/skills-hierarchy</text:p>
          </table:table-cell>
          <table:table-cell office:value-type="string">
            <text:p>Taking orders for and selling goods or services to individuals, households or enterprises.</text:p>
          </table:table-cell>
          <table:table-cell office:value-type="string">
            <text:p>S1.6.1</text:p>
          </table:table-cell>
        </table:table-row>
        <table:table-row>
          <table:table-cell office:value-type="string">
            <text:p>SkillGroup</text:p>
          </table:table-cell>
          <table:table-cell office:value-type="string">
            <text:p>http://data.europa.eu/esco/skill/e173eaf8-c99b-405a-b0ac-0e02ce3c268d</text:p>
          </table:table-cell>
          <table:table-cell office:value-type="string">
            <text:p>calculating and estimating</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office:value-type="string">
            <text:p>Performing mathematical calculations and estimating the results of an action or a series of actions.</text:p>
          </table:table-cell>
          <table:table-cell office:value-type="string">
            <text:p>S2.6</text:p>
          </table:table-cell>
        </table:table-row>
        <table:table-row>
          <table:table-cell office:value-type="string">
            <text:p>SkillGroup</text:p>
          </table:table-cell>
          <table:table-cell office:value-type="string">
            <text:p>http://data.europa.eu/esco/skill/e1746275-6d4e-4b02-b526-eeebf3052b6d</text:p>
          </table:table-cell>
          <table:table-cell office:value-type="string">
            <text:p>providing information and support to the public and clients</text:p>
          </table:table-cell>
          <table:table-cell office:value-type="string">
            <text:p>providing information and support</text:p>
          </table:table-cell>
          <table:table-cell/>
          <table:table-cell office:value-type="string">
            <text:p>released</text:p>
          </table:table-cell>
          <table:table-cell/>
          <table:table-cell office:value-type="string">
            <text:p>Excludes:<text:line-break/>- Provide high quality client service<text:line-break/>- Satisfy customers.</text:p>
          </table:table-cell>
          <table:table-cell office:value-type="string">
            <text:p>http://data.europa.eu/esco/concept-scheme/skills<text:line-break/>http://data.europa.eu/esco/concept-scheme/skills-hierarchy</text:p>
          </table:table-cell>
          <table:table-cell office:value-type="string">
            <text:p>Assisting the public by answering questions, making recommendations, and providing information or support in response to requests.</text:p>
          </table:table-cell>
          <table:table-cell office:value-type="string">
            <text:p>S3.4</text:p>
          </table:table-cell>
        </table:table-row>
        <table:table-row>
          <table:table-cell office:value-type="string">
            <text:p>SkillGroup</text:p>
          </table:table-cell>
          <table:table-cell office:value-type="string">
            <text:p>http://data.europa.eu/esco/skill/e2a5e046-3357-493e-bbdc-8d0ef82005cc</text:p>
          </table:table-cell>
          <table:table-cell office:value-type="string">
            <text:p>monitoring developments in area of expertise</text:p>
          </table:table-cell>
          <table:table-cell table:number-columns-repeated="2"/>
          <table:table-cell office:value-type="string">
            <text:p>released</text:p>
          </table:table-cell>
          <table:table-cell office:value-type="string">
            <text:p>2023-02-21T21:13:00.764Z</text:p>
          </table:table-cell>
          <table:table-cell office:value-type="string">
            <text:p>Examples:<text:line-break/>- Follow trends in sporting equipment<text:line-break/>- Keep up to date with diagnostic innovations<text:line-break/>- Monitor legislation developments<text:line-break/>- Monitor technology trends.</text:p>
          </table:table-cell>
          <table:table-cell office:value-type="string">
            <text:p>http://data.europa.eu/esco/concept-scheme/skills<text:line-break/>http://data.europa.eu/esco/concept-scheme/skills-hierarchy</text:p>
          </table:table-cell>
          <table:table-cell office:value-type="string">
            <text:p>Monitoring and keeping knowledge up-to-date concerning new research, methodologies, regulations, policies technological developments and other significant changes relevant to a particular field of specialisation.</text:p>
          </table:table-cell>
          <table:table-cell office:value-type="string">
            <text:p>S2.9.0</text:p>
          </table:table-cell>
        </table:table-row>
        <table:table-row>
          <table:table-cell office:value-type="string">
            <text:p>SkillGroup</text:p>
          </table:table-cell>
          <table:table-cell office:value-type="string">
            <text:p>http://data.europa.eu/esco/skill/e2bdf081-333a-414f-b8ac-93c76290f167</text:p>
          </table:table-cell>
          <table:table-cell office:value-type="string">
            <text:p>coaching and mentoring</text:p>
          </table:table-cell>
          <table:table-cell table:number-columns-repeated="2"/>
          <table:table-cell office:value-type="string">
            <text:p>released</text:p>
          </table:table-cell>
          <table:table-cell office:value-type="string">
            <text:p>2020-12-08T11:37:17.207Z</text:p>
          </table:table-cell>
          <table:table-cell office:value-type="string">
            <text:p>Examples:<text:line-break/>- Coach during a sports competition<text:line-break/>- Assist clients with personal development<text:line-break/>- Mentor individual employees.</text:p>
          </table:table-cell>
          <table:table-cell office:value-type="string">
            <text:p>http://data.europa.eu/esco/concept-scheme/skills<text:line-break/>http://data.europa.eu/esco/concept-scheme/skills-hierarchy</text:p>
          </table:table-cell>
          <table:table-cell office:value-type="string">
            <text:p>Actively helping individuals or groups to improve their strengths, life skills, performance, learning skills and confidence and to optimise specific methods, skills or abilities.</text:p>
          </table:table-cell>
          <table:table-cell office:value-type="string">
            <text:p>S1.3.5</text:p>
          </table:table-cell>
        </table:table-row>
        <table:table-row>
          <table:table-cell office:value-type="string">
            <text:p>SkillGroup</text:p>
          </table:table-cell>
          <table:table-cell office:value-type="string">
            <text:p>http://data.europa.eu/esco/skill/e35a5936-091d-4e87-bafe-f264e55bd656</text:p>
          </table:table-cell>
          <table:table-cell office:value-type="string">
            <text:p>language skills and knowledge</text:p>
          </table:table-cell>
          <table:table-cell office:value-type="string">
            <text:p>languages</text:p>
          </table:table-cell>
          <table:table-cell/>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table:table-cell office:value-type="string">
            <text:p>L</text:p>
          </table:table-cell>
        </table:table-row>
        <table:table-row>
          <table:table-cell office:value-type="string">
            <text:p>SkillGroup</text:p>
          </table:table-cell>
          <table:table-cell office:value-type="string">
            <text:p>http://data.europa.eu/esco/skill/e434e71a-f068-44ed-8059-d1af9eb592d7</text:p>
          </table:table-cell>
          <table:table-cell office:value-type="string">
            <text:p>classical languages</text:p>
          </table:table-cell>
          <table:table-cell table:number-columns-repeated="2"/>
          <table:table-cell office:value-type="string">
            <text:p>released</text:p>
          </table:table-cell>
          <table:table-cell office:value-type="string">
            <text:p>2024-02-29T08:37:24.188Z</text:p>
          </table:table-cell>
          <table:table-cell office:value-type="string">
            <text:p>Excludes:<text:line-break/>- all languages that are actively used as a mother tongue or lingua franca Latin, Sanskrit, Ancient Greek.</text:p>
          </table:table-cell>
          <table:table-cell office:value-type="string">
            <text:p>http://data.europa.eu/esco/concept-scheme/skills<text:line-break/>http://data.europa.eu/esco/concept-scheme/skills-hierarchy</text:p>
          </table:table-cell>
          <table:table-cell office:value-type="string">
            <text:p>All dead languages, no longer actively used, originating from various periods in history, such as Latin from Antiquity, Middle English from the Middle Ages, Classical Maya from the Pre-colonial Americas, and Renaissance Italian from the Early Modern Period.</text:p>
          </table:table-cell>
          <table:table-cell office:value-type="string">
            <text:p>L2</text:p>
          </table:table-cell>
        </table:table-row>
        <table:table-row>
          <table:table-cell office:value-type="string">
            <text:p>SkillGroup</text:p>
          </table:table-cell>
          <table:table-cell office:value-type="string">
            <text:p>http://data.europa.eu/esco/skill/e4da156d-a6c4-4b29-935b-eff9c9553cf1</text:p>
          </table:table-cell>
          <table:table-cell office:value-type="string">
            <text:p>working in teams</text:p>
          </table:table-cell>
          <table:table-cell table:number-columns-repeated="2"/>
          <table:table-cell office:value-type="string">
            <text:p>released</text:p>
          </table:table-cell>
          <table:table-cell office:value-type="string">
            <text:p>2022-06-21T15:57:17.113Z</text:p>
          </table:table-cell>
          <table:table-cell office:value-type="string">
            <text:p>Examples:<text:line-break/>- work in multidisciplinary teams - work in assembly line teams<text:line-break/>- collaborate with designers<text:line-break/>- cooperate with colleagues<text:line-break/>- work in a forestry team<text:line-break/>- work in shifts Excludes:<text:line-break/>- management, supervision and coordination of teams.</text:p>
          </table:table-cell>
          <table:table-cell office:value-type="string">
            <text:p>http://data.europa.eu/esco/concept-scheme/skills<text:line-break/>http://data.europa.eu/esco/concept-scheme/skills-hierarchy</text:p>
          </table:table-cell>
          <table:table-cell office:value-type="string">
            <text:p>Working confidently within a group with each doing their part in the service of the whole. Understanding and respecting the roles and competencies of other team members.</text:p>
          </table:table-cell>
          <table:table-cell office:value-type="string">
            <text:p>S1.8.1</text:p>
          </table:table-cell>
        </table:table-row>
        <table:table-row>
          <table:table-cell office:value-type="string">
            <text:p>SkillGroup</text:p>
          </table:table-cell>
          <table:table-cell office:value-type="string">
            <text:p>http://data.europa.eu/esco/skill/e52389a2-1a05-45b0-8db3-4bda0f0c0b48</text:p>
          </table:table-cell>
          <table:table-cell office:value-type="string">
            <text:p>responding to physical circumstances</text:p>
          </table:table-cell>
          <table:table-cell office:value-type="string">
            <text:p>demonstrating physical fitness<text:line-break/>demonstrating endurance<text:line-break/>demonstrating physical strength</text:p>
          </table:table-cell>
          <table:table-cell/>
          <table:table-cell office:value-type="string">
            <text:p>released</text:p>
          </table:table-cell>
          <table:table-cell office:value-type="string">
            <text:p>2021-08-30T16:51:10.069Z</text:p>
          </table:table-cell>
          <table:table-cell office:value-type="string">
            <text:p>Excludes coping with mental or psychological adversity.</text:p>
          </table:table-cell>
          <table:table-cell office:value-type="string">
            <text:p>http://data.europa.eu/esco/concept-scheme/skills<text:line-break/>http://data.europa.eu/esco/concept-scheme/skills-hierarchy<text:line-break/>http://data.europa.eu/esco/concept-scheme/skill-transversal-groups</text:p>
          </table:table-cell>
          <table:table-cell office:value-type="string">
            <text:p>React and adapt to changing or hazardous physical conditions.</text:p>
          </table:table-cell>
          <table:table-cell office:value-type="string">
            <text:p>T5.2</text:p>
          </table:table-cell>
        </table:table-row>
        <table:table-row>
          <table:table-cell office:value-type="string">
            <text:p>SkillGroup</text:p>
          </table:table-cell>
          <table:table-cell office:value-type="string">
            <text:p>http://data.europa.eu/esco/skill/e52cd6e7-f8dc-4f6f-b988-5554423f53fb</text:p>
          </table:table-cell>
          <table:table-cell office:value-type="string">
            <text:p>tending and breeding aquatic animals</text:p>
          </table:table-cell>
          <table:table-cell table:number-columns-repeated="2"/>
          <table:table-cell office:value-type="string">
            <text:p>released</text:p>
          </table:table-cell>
          <table:table-cell office:value-type="string">
            <text:p>2024-01-02T09:05:14.088Z</text:p>
          </table:table-cell>
          <table:table-cell office:value-type="string">
            <text:p>Examples:<text:line-break/>- Induce spawning of cultured aquaculture species<text:line-break/>- Handle broodstock<text:line-break/>- Manure aquaculture ponds.</text:p>
          </table:table-cell>
          <table:table-cell office:value-type="string">
            <text:p>http://data.europa.eu/esco/concept-scheme/skills<text:line-break/>http://data.europa.eu/esco/concept-scheme/skills-hierarchy</text:p>
          </table:table-cell>
          <table:table-cell office:value-type="string">
            <text:p>Breeding, raising and harvesting aquatic and aquaculture stock such as fin fish and shellfish.</text:p>
          </table:table-cell>
          <table:table-cell office:value-type="string">
            <text:p>S6.9.2</text:p>
          </table:table-cell>
        </table:table-row>
        <table:table-row>
          <table:table-cell office:value-type="string">
            <text:p>SkillGroup</text:p>
          </table:table-cell>
          <table:table-cell office:value-type="string">
            <text:p>http://data.europa.eu/esco/skill/e5419bb1-38c7-458a-b263-b7e73e02bc7e</text:p>
          </table:table-cell>
          <table:table-cell office:value-type="string">
            <text:p>handling animals</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office:value-type="string">
            <text:p>Handling, moving, feeding and caring for live animals.</text:p>
          </table:table-cell>
          <table:table-cell office:value-type="string">
            <text:p>S6.9</text:p>
          </table:table-cell>
        </table:table-row>
        <table:table-row>
          <table:table-cell office:value-type="string">
            <text:p>SkillGroup</text:p>
          </table:table-cell>
          <table:table-cell office:value-type="string">
            <text:p>http://data.europa.eu/esco/skill/e5e3b8d7-a96d-41f4-acb6-563b0f7f2994</text:p>
          </table:table-cell>
          <table:table-cell office:value-type="string">
            <text:p>sorting and packaging goods and materials</text:p>
          </table:table-cell>
          <table:table-cell office:value-type="string">
            <text:p>sorting and packaging</text:p>
          </table:table-cell>
          <table:table-cell/>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office:value-type="string">
            <text:p>Sorting, packaging, separating or arranging materials, according to established patterns or procedures.</text:p>
          </table:table-cell>
          <table:table-cell office:value-type="string">
            <text:p>S6.1.0</text:p>
          </table:table-cell>
        </table:table-row>
        <table:table-row>
          <table:table-cell office:value-type="string">
            <text:p>SkillGroup</text:p>
          </table:table-cell>
          <table:table-cell office:value-type="string">
            <text:p>http://data.europa.eu/esco/skill/e67fd42d-25f1-4124-b0be-3b1e3bfdd70c</text:p>
          </table:table-cell>
          <table:table-cell office:value-type="string">
            <text:p>verifying identities and documentation</text:p>
          </table:table-cell>
          <table:table-cell table:number-columns-repeated="2"/>
          <table:table-cell office:value-type="string">
            <text:p>released</text:p>
          </table:table-cell>
          <table:table-cell office:value-type="string">
            <text:p>2022-06-21T08:47:39.509Z</text:p>
          </table:table-cell>
          <table:table-cell office:value-type="string">
            <text:p>Examples:<text:line-break/>- check official documents<text:line-break/>- check passenger tickets<text:line-break/>- check tickets at venue entry.</text:p>
          </table:table-cell>
          <table:table-cell office:value-type="string">
            <text:p>http://data.europa.eu/esco/concept-scheme/skills<text:line-break/>http://data.europa.eu/esco/concept-scheme/skills-hierarchy</text:p>
          </table:table-cell>
          <table:table-cell office:value-type="string">
            <text:p>Check an individuals' documentation, such as driver's licenses, official identification documents, travel documents and tickets, to ensure compliance with legal regulations, identify individuals, and assess their right to access services, areas or facilities.</text:p>
          </table:table-cell>
          <table:table-cell office:value-type="string">
            <text:p>S3.3.4</text:p>
          </table:table-cell>
        </table:table-row>
        <table:table-row>
          <table:table-cell office:value-type="string">
            <text:p>SkillGroup</text:p>
          </table:table-cell>
          <table:table-cell office:value-type="string">
            <text:p>http://data.europa.eu/esco/skill/e6e784d0-38a2-4f0c-9fe9-d985a3269fd9</text:p>
          </table:table-cell>
          <table:table-cell office:value-type="string">
            <text:p>appyling textured or masonry coatings</text:p>
          </table:table-cell>
          <table:table-cell table:number-columns-repeated="2"/>
          <table:table-cell office:value-type="string">
            <text:p>released</text:p>
          </table:table-cell>
          <table:table-cell/>
          <table:table-cell office:value-type="string">
            <text:p>Examples:<text:line-break/>- Plaster surfaces<text:line-break/>- Craft ornamental plastering<text:line-break/>- Pour terrazzo.</text:p>
          </table:table-cell>
          <table:table-cell office:value-type="string">
            <text:p>http://data.europa.eu/esco/concept-scheme/skills<text:line-break/>http://data.europa.eu/esco/concept-scheme/skills-hierarchy</text:p>
          </table:table-cell>
          <table:table-cell office:value-type="string">
            <text:p>Applying plaster or similar materials to a surface.</text:p>
          </table:table-cell>
          <table:table-cell office:value-type="string">
            <text:p>S7.3.2</text:p>
          </table:table-cell>
        </table:table-row>
        <table:table-row>
          <table:table-cell office:value-type="string">
            <text:p>SkillGroup</text:p>
          </table:table-cell>
          <table:table-cell office:value-type="string">
            <text:p>http://data.europa.eu/esco/skill/e6eeb84c-ad99-42e2-b883-e6ce338aef59</text:p>
          </table:table-cell>
          <table:table-cell office:value-type="string">
            <text:p>planning production processes</text:p>
          </table:table-cell>
          <table:table-cell table:number-columns-repeated="2"/>
          <table:table-cell office:value-type="string">
            <text:p>released</text:p>
          </table:table-cell>
          <table:table-cell office:value-type="string">
            <text:p>2022-06-21T15:25:51.729Z</text:p>
          </table:table-cell>
          <table:table-cell/>
          <table:table-cell office:value-type="string">
            <text:p>http://data.europa.eu/esco/concept-scheme/skills<text:line-break/>http://data.europa.eu/esco/concept-scheme/skills-hierarchy</text:p>
          </table:table-cell>
          <table:table-cell office:value-type="string">
            <text:p>Preparing production plan for successful manufacture of a product or service.</text:p>
          </table:table-cell>
          <table:table-cell office:value-type="string">
            <text:p>S4.2.5</text:p>
          </table:table-cell>
        </table:table-row>
        <table:table-row>
          <table:table-cell office:value-type="string">
            <text:p>SkillGroup</text:p>
          </table:table-cell>
          <table:table-cell office:value-type="string">
            <text:p>http://data.europa.eu/esco/skill/e7a48651-3f68-4762-bf93-57cc1af47016</text:p>
          </table:table-cell>
          <table:table-cell office:value-type="string">
            <text:p>providing general personal care</text:p>
          </table:table-cell>
          <table:table-cell office:value-type="string">
            <text:p>personal care</text:p>
          </table:table-cell>
          <table:table-cell/>
          <table:table-cell office:value-type="string">
            <text:p>released</text:p>
          </table:table-cell>
          <table:table-cell/>
          <table:table-cell office:value-type="string">
            <text:p>Excludes:<text:line-break/>- Administration of medical treatments and therapies, therapeutic massage.</text:p>
          </table:table-cell>
          <table:table-cell office:value-type="string">
            <text:p>http://data.europa.eu/esco/concept-scheme/skills<text:line-break/>http://data.europa.eu/esco/concept-scheme/skills-hierarchy</text:p>
          </table:table-cell>
          <table:table-cell office:value-type="string">
            <text:p>Responding to the daily and occasional personal care needs of people.</text:p>
          </table:table-cell>
          <table:table-cell office:value-type="string">
            <text:p>S3.6</text:p>
          </table:table-cell>
        </table:table-row>
        <table:table-row>
          <table:table-cell office:value-type="string">
            <text:p>SkillGroup</text:p>
          </table:table-cell>
          <table:table-cell office:value-type="string">
            <text:p>http://data.europa.eu/esco/skill/e84d080a-ff6d-41a7-b7b9-133e97c7bf00</text:p>
          </table:table-cell>
          <table:table-cell office:value-type="string">
            <text:p>thinking creatively and innovatively</text:p>
          </table:table-cell>
          <table:table-cell office:value-type="string">
            <text:p>creating new information, concepts, ideas, products, processes<text:line-break/>carrying out activities in innovative and creative ways</text:p>
          </table:table-cell>
          <table:table-cell office:value-type="string">
            <text:p>creative solutions</text:p>
          </table:table-cell>
          <table:table-cell office:value-type="string">
            <text:p>released</text:p>
          </table:table-cell>
          <table:table-cell office:value-type="string">
            <text:p>2021-08-30T15:44:33.322Z</text:p>
          </table:table-cell>
          <table:table-cell/>
          <table:table-cell office:value-type="string">
            <text:p>http://data.europa.eu/esco/concept-scheme/skills<text:line-break/>http://data.europa.eu/esco/concept-scheme/skills-hierarchy<text:line-break/>http://data.europa.eu/esco/concept-scheme/skill-transversal-groups</text:p>
          </table:table-cell>
          <table:table-cell office:value-type="string">
            <text:p>Generate new ideas or combine existing ones to develop innovative, novel solutions.</text:p>
          </table:table-cell>
          <table:table-cell office:value-type="string">
            <text:p>T2.4</text:p>
          </table:table-cell>
        </table:table-row>
        <table:table-row>
          <table:table-cell office:value-type="string">
            <text:p>SkillGroup</text:p>
          </table:table-cell>
          <table:table-cell office:value-type="string">
            <text:p>http://data.europa.eu/esco/skill/e852a2ed-c32e-4a39-bc4c-65a78ffe6bf2</text:p>
          </table:table-cell>
          <table:table-cell office:value-type="string">
            <text:p>moving or lifting materials, equipment, or supplies</text:p>
          </table:table-cell>
          <table:table-cell table:number-columns-repeated="2"/>
          <table:table-cell office:value-type="string">
            <text:p>released</text:p>
          </table:table-cell>
          <table:table-cell/>
          <table:table-cell office:value-type="string">
            <text:p>Excludes:<text:line-break/>- Operation of machinery other than hand-held equipment Examples:<text:line-break/>- Feed concrete mixer<text:line-break/>- Transfer luggage<text:line-break/>- Lift heavy weights.</text:p>
          </table:table-cell>
          <table:table-cell office:value-type="string">
            <text:p>http://data.europa.eu/esco/concept-scheme/skills<text:line-break/>http://data.europa.eu/esco/concept-scheme/skills-hierarchy</text:p>
          </table:table-cell>
          <table:table-cell office:value-type="string">
            <text:p>Moving or lifting goods, materials supplies or resources, by hand or with the aid of equipment, using actions such as lifting, pushing, carrying or shovelling.</text:p>
          </table:table-cell>
          <table:table-cell office:value-type="string">
            <text:p>S6.2.2</text:p>
          </table:table-cell>
        </table:table-row>
        <table:table-row>
          <table:table-cell office:value-type="string">
            <text:p>SkillGroup</text:p>
          </table:table-cell>
          <table:table-cell office:value-type="string">
            <text:p>http://data.europa.eu/esco/skill/e963cf1f-dc3c-48b2-a0fa-274f5e7f50f6</text:p>
          </table:table-cell>
          <table:table-cell office:value-type="string">
            <text:p>storing goods and materials</text:p>
          </table:table-cell>
          <table:table-cell table:number-columns-repeated="2"/>
          <table:table-cell office:value-type="string">
            <text:p>released</text:p>
          </table:table-cell>
          <table:table-cell office:value-type="string">
            <text:p>2022-06-19T15:45:14.266Z</text:p>
          </table:table-cell>
          <table:table-cell office:value-type="string">
            <text:p>Excludes:<text:line-break/>- Operation of machinery other than hand-held equipment - Storing hazardous material Examples:<text:line-break/>- Stock shelves<text:line-break/>- Store film reels.</text:p>
          </table:table-cell>
          <table:table-cell office:value-type="string">
            <text:p>http://data.europa.eu/esco/concept-scheme/skills<text:line-break/>http://data.europa.eu/esco/concept-scheme/skills-hierarchy</text:p>
          </table:table-cell>
          <table:table-cell office:value-type="string">
            <text:p>Placing goods and materials in storage by hand, or with the aid of hand-held or manually operated equipment.</text:p>
          </table:table-cell>
          <table:table-cell office:value-type="string">
            <text:p>S6.2.3</text:p>
          </table:table-cell>
        </table:table-row>
        <table:table-row>
          <table:table-cell office:value-type="string">
            <text:p>SkillGroup</text:p>
          </table:table-cell>
          <table:table-cell office:value-type="string">
            <text:p>http://data.europa.eu/esco/skill/e9eb9c23-c1f4-4ce9-83c9-2f6a211cc536</text:p>
          </table:table-cell>
          <table:table-cell office:value-type="string">
            <text:p>maintaining and enforcing physical security</text:p>
          </table:table-cell>
          <table:table-cell table:number-columns-repeated="2"/>
          <table:table-cell office:value-type="string">
            <text:p>released</text:p>
          </table:table-cell>
          <table:table-cell office:value-type="string">
            <text:p>2022-06-21T08:58:51.033Z</text:p>
          </table:table-cell>
          <table:table-cell office:value-type="string">
            <text:p>Examples:<text:line-break/>- extinguish fires - conduct security screenings<text:line-break/>- detain offenders<text:line-break/>- rescue bathers.</text:p>
          </table:table-cell>
          <table:table-cell office:value-type="string">
            <text:p>http://data.europa.eu/esco/concept-scheme/skills<text:line-break/>http://data.europa.eu/esco/concept-scheme/skills-hierarchy</text:p>
          </table:table-cell>
          <table:table-cell office:value-type="string">
            <text:p>Ensuring safety and security of persons and property through physical actions.</text:p>
          </table:table-cell>
          <table:table-cell office:value-type="string">
            <text:p>S3.3.5</text:p>
          </table:table-cell>
        </table:table-row>
        <table:table-row>
          <table:table-cell office:value-type="string">
            <text:p>SkillGroup</text:p>
          </table:table-cell>
          <table:table-cell office:value-type="string">
            <text:p>http://data.europa.eu/esco/skill/eb6cc4ba-4bb8-4348-9a3b-dc419558f66a</text:p>
          </table:table-cell>
          <table:table-cell office:value-type="string">
            <text:p>advising on design or use of technologies</text:p>
          </table:table-cell>
          <table:table-cell table:number-columns-repeated="2"/>
          <table:table-cell office:value-type="string">
            <text:p>released</text:p>
          </table:table-cell>
          <table:table-cell/>
          <table:table-cell office:value-type="string">
            <text:p>Examples:<text:line-break/>- advise client on technical possibilities<text:line-break/>- provide ICT consulting advice.</text:p>
          </table:table-cell>
          <table:table-cell office:value-type="string">
            <text:p>http://data.europa.eu/esco/concept-scheme/skills<text:line-break/>http://data.europa.eu/esco/concept-scheme/skills-hierarchy</text:p>
          </table:table-cell>
          <table:table-cell office:value-type="string">
            <text:p>Providing information and advice on technological possibilities, developments and on the uses of technology.</text:p>
          </table:table-cell>
          <table:table-cell office:value-type="string">
            <text:p>S1.5.6</text:p>
          </table:table-cell>
        </table:table-row>
        <table:table-row>
          <table:table-cell office:value-type="string">
            <text:p>SkillGroup</text:p>
          </table:table-cell>
          <table:table-cell office:value-type="string">
            <text:p>http://data.europa.eu/esco/skill/ec0401f1-f690-46be-934b-f6f5611085f5</text:p>
          </table:table-cell>
          <table:table-cell office:value-type="string">
            <text:p>maintaining electrical, electronic and precision equipment</text:p>
          </table:table-cell>
          <table:table-cell table:number-columns-repeated="2"/>
          <table:table-cell office:value-type="string">
            <text:p>released</text:p>
          </table:table-cell>
          <table:table-cell office:value-type="string">
            <text:p>2021-03-16T14:31:22.011Z</text:p>
          </table:table-cell>
          <table:table-cell office:value-type="string">
            <text:p>Examples:<text:line-break/>- Adjust voltage<text:line-break/>- Maintain automated lighting equipment<text:line-break/>- Maintain medical devices.</text:p>
          </table:table-cell>
          <table:table-cell office:value-type="string">
            <text:p>http://data.europa.eu/esco/concept-scheme/skills<text:line-break/>http://data.europa.eu/esco/concept-scheme/skills-hierarchy</text:p>
          </table:table-cell>
          <table:table-cell office:value-type="string">
            <text:p>Maintaining electrical and electronic and mechatronic equipment, control systems, scientific and medical devices, instrumentation and precision equipment to ensure continued or optimal functioning.</text:p>
          </table:table-cell>
          <table:table-cell office:value-type="string">
            <text:p>S8.8.2</text:p>
          </table:table-cell>
        </table:table-row>
        <table:table-row>
          <table:table-cell office:value-type="string">
            <text:p>SkillGroup</text:p>
          </table:table-cell>
          <table:table-cell office:value-type="string">
            <text:p>http://data.europa.eu/esco/skill/ec528c47-65f4-4187-9dc1-5a8889f84a06</text:p>
          </table:table-cell>
          <table:table-cell office:value-type="string">
            <text:p>analysing business operations</text:p>
          </table:table-cell>
          <table:table-cell table:number-columns-repeated="2"/>
          <table:table-cell office:value-type="string">
            <text:p>released</text:p>
          </table:table-cell>
          <table:table-cell office:value-type="string">
            <text:p>2023-01-25T20:36:32.417Z</text:p>
          </table:table-cell>
          <table:table-cell office:value-type="string">
            <text:p>Excludes:<text:line-break/>- Using ICT tools to analyse and process data. Examples:<text:line-break/>- Perform business analysis<text:line-break/>- Conduct feasibility studies.</text:p>
          </table:table-cell>
          <table:table-cell office:value-type="string">
            <text:p>http://data.europa.eu/esco/concept-scheme/skills<text:line-break/>http://data.europa.eu/esco/concept-scheme/skills-hierarchy</text:p>
          </table:table-cell>
          <table:table-cell office:value-type="string">
            <text:p>Analysing and evaluating information and data on production and business operations.</text:p>
          </table:table-cell>
          <table:table-cell office:value-type="string">
            <text:p>S2.7.4</text:p>
          </table:table-cell>
        </table:table-row>
        <table:table-row>
          <table:table-cell office:value-type="string">
            <text:p>SkillGroup</text:p>
          </table:table-cell>
          <table:table-cell office:value-type="string">
            <text:p>http://data.europa.eu/esco/skill/edc72cfe-78a8-4531-b00f-92992a0bb8cb</text:p>
          </table:table-cell>
          <table:table-cell office:value-type="string">
            <text:p>working with numbers and measures</text:p>
          </table:table-cell>
          <table:table-cell office:value-type="string">
            <text:p>carrying out measurements<text:line-break/>numeracy and mathematics<text:line-break/>ability to understand and work with numbers</text:p>
          </table:table-cell>
          <table:table-cell office:value-type="string">
            <text:p>mathematics<text:line-break/>calculations<text:line-break/>affinity for numbers<text:line-break/>basic mathematical knowledge</text:p>
          </table:table-cell>
          <table:table-cell office:value-type="string">
            <text:p>released</text:p>
          </table:table-cell>
          <table:table-cell office:value-type="string">
            <text:p>2021-08-30T13:51:58.932Z</text:p>
          </table:table-cell>
          <table:table-cell/>
          <table:table-cell office:value-type="string">
            <text:p>http://data.europa.eu/esco/concept-scheme/skills<text:line-break/>http://data.europa.eu/esco/concept-scheme/skills-hierarchy<text:line-break/>http://data.europa.eu/esco/concept-scheme/skill-transversal-groups</text:p>
          </table:table-cell>
          <table:table-cell office:value-type="string">
            <text:p>Apply numerical and mathematical content, information, ideas and processes to meet basic demands of learning and work. This includes an understanding of numbers, patterns, shape and space, the mathematical language, symbols and procedures, and ways of thinking used to achieve concrete goals.</text:p>
          </table:table-cell>
          <table:table-cell office:value-type="string">
            <text:p>T1.2</text:p>
          </table:table-cell>
        </table:table-row>
        <table:table-row>
          <table:table-cell office:value-type="string">
            <text:p>SkillGroup</text:p>
          </table:table-cell>
          <table:table-cell office:value-type="string">
            <text:p>http://data.europa.eu/esco/skill/edcfd6ef-1a42-4e0a-97e2-2a2d61cac181</text:p>
          </table:table-cell>
          <table:table-cell office:value-type="string">
            <text:p>tending and breeding animals</text:p>
          </table:table-cell>
          <table:table-cell table:number-columns-repeated="2"/>
          <table:table-cell office:value-type="string">
            <text:p>released</text:p>
          </table:table-cell>
          <table:table-cell office:value-type="string">
            <text:p>2021-09-15T10:08:50.441Z</text:p>
          </table:table-cell>
          <table:table-cell office:value-type="string">
            <text:p>Excludes:<text:line-break/>- Perform artificial insemination Examples:<text:line-break/>- Milk animals<text:line-break/>- Breed stock<text:line-break/>- Care for juvenile animals<text:line-break/>- Manage animal hygiene<text:line-break/>- Provide dog walking services.</text:p>
          </table:table-cell>
          <table:table-cell office:value-type="string">
            <text:p>http://data.europa.eu/esco/concept-scheme/skills<text:line-break/>http://data.europa.eu/esco/concept-scheme/skills-hierarchy</text:p>
          </table:table-cell>
          <table:table-cell office:value-type="string">
            <text:p>Breeding, raising and tending non-aquatic livestock such as cattle, poultry, and honeybees.</text:p>
          </table:table-cell>
          <table:table-cell office:value-type="string">
            <text:p>S6.9.1</text:p>
          </table:table-cell>
        </table:table-row>
        <table:table-row>
          <table:table-cell office:value-type="string">
            <text:p>SkillGroup</text:p>
          </table:table-cell>
          <table:table-cell office:value-type="string">
            <text:p>http://data.europa.eu/esco/skill/ee2576c0-1af5-44b5-8c0c-2002541d1ccc</text:p>
          </table:table-cell>
          <table:table-cell office:value-type="string">
            <text:p>training on health or medical topics</text:p>
          </table:table-cell>
          <table:table-cell table:number-columns-repeated="2"/>
          <table:table-cell office:value-type="string">
            <text:p>released</text:p>
          </table:table-cell>
          <table:table-cell office:value-type="string">
            <text:p>2020-12-10T09:59:32.486Z</text:p>
          </table:table-cell>
          <table:table-cell office:value-type="string">
            <text:p>Examples:<text:line-break/>- teach first aid principles<text:line-break/>- train medical staff on nutrition<text:line-break/>- educate patient's relations on care Excludes:<text:line-break/>- teaching medicine or nursing as part of a formal education programme.</text:p>
          </table:table-cell>
          <table:table-cell office:value-type="string">
            <text:p>http://data.europa.eu/esco/concept-scheme/skills<text:line-break/>http://data.europa.eu/esco/concept-scheme/skills-hierarchy</text:p>
          </table:table-cell>
          <table:table-cell office:value-type="string">
            <text:p>Training patients, health providers, or carers on health or hygiene practices, medical procedures or physcial fitness.</text:p>
          </table:table-cell>
          <table:table-cell office:value-type="string">
            <text:p>S1.3.4</text:p>
          </table:table-cell>
        </table:table-row>
        <table:table-row>
          <table:table-cell office:value-type="string">
            <text:p>SkillGroup</text:p>
          </table:table-cell>
          <table:table-cell office:value-type="string">
            <text:p>http://data.europa.eu/esco/skill/efb60300-0d55-4b2c-8038-8409587a4727</text:p>
          </table:table-cell>
          <table:table-cell office:value-type="string">
            <text:p>promoting products, services, or programs</text:p>
          </table:table-cell>
          <table:table-cell table:number-columns-repeated="2"/>
          <table:table-cell office:value-type="string">
            <text:p>released</text:p>
          </table:table-cell>
          <table:table-cell office:value-type="string">
            <text:p>2023-10-26T09:07:51.421Z</text:p>
          </table:table-cell>
          <table:table-cell office:value-type="string">
            <text:p>Examples:<text:line-break/>- perform public relations<text:line-break/>- advertise new book releases<text:line-break/>- conduct mobile marketing<text:line-break/>- offer free samples<text:line-break/>- promote education programmes.</text:p>
          </table:table-cell>
          <table:table-cell office:value-type="string">
            <text:p>http://data.europa.eu/esco/concept-scheme/skills<text:line-break/>http://data.europa.eu/esco/concept-scheme/skills-hierarchy</text:p>
          </table:table-cell>
          <table:table-cell office:value-type="string">
            <text:p>Promoting, advertising and marketing goods, services, programs or policies.</text:p>
          </table:table-cell>
          <table:table-cell office:value-type="string">
            <text:p>S1.6.2</text:p>
          </table:table-cell>
        </table:table-row>
        <table:table-row>
          <table:table-cell office:value-type="string">
            <text:p>SkillGroup</text:p>
          </table:table-cell>
          <table:table-cell office:value-type="string">
            <text:p>http://data.europa.eu/esco/skill/efbb3d3b-a41c-4e0a-90a8-8e611eb1db9f</text:p>
          </table:table-cell>
          <table:table-cell office:value-type="string">
            <text:p>advising on legal, regulatory or procedural matters</text:p>
          </table:table-cell>
          <table:table-cell table:number-columns-repeated="2"/>
          <table:table-cell office:value-type="string">
            <text:p>released</text:p>
          </table:table-cell>
          <table:table-cell office:value-type="string">
            <text:p>2022-06-19T14:55:09.783Z</text:p>
          </table:table-cell>
          <table:table-cell office:value-type="string">
            <text:p>Examples:<text:line-break/>- advise on social service process<text:line-break/>- provide legal advice.</text:p>
          </table:table-cell>
          <table:table-cell office:value-type="string">
            <text:p>http://data.europa.eu/esco/concept-scheme/skills<text:line-break/>http://data.europa.eu/esco/concept-scheme/skills-hierarchy</text:p>
          </table:table-cell>
          <table:table-cell office:value-type="string">
            <text:p>Discussing legal matters with clients, disputants, or legal professionals or staff. Explaining and providing advice to others on legal matters, regulations, policies or procedures.</text:p>
          </table:table-cell>
          <table:table-cell office:value-type="string">
            <text:p>S1.5.1</text:p>
          </table:table-cell>
        </table:table-row>
        <table:table-row>
          <table:table-cell office:value-type="string">
            <text:p>SkillGroup</text:p>
          </table:table-cell>
          <table:table-cell office:value-type="string">
            <text:p>http://data.europa.eu/esco/skill/f0f8ceea-304e-42e8-80cf-ff1535eb7068</text:p>
          </table:table-cell>
          <table:table-cell office:value-type="string">
            <text:p>moving and herding animals</text:p>
          </table:table-cell>
          <table:table-cell table:number-columns-repeated="2"/>
          <table:table-cell office:value-type="string">
            <text:p>released</text:p>
          </table:table-cell>
          <table:table-cell/>
          <table:table-cell office:value-type="string">
            <text:p>Examples:<text:line-break/>- Load animals for transportation<text:line-break/>- Control animal movement.</text:p>
          </table:table-cell>
          <table:table-cell office:value-type="string">
            <text:p>http://data.europa.eu/esco/concept-scheme/skills<text:line-break/>http://data.europa.eu/esco/concept-scheme/skills-hierarchy</text:p>
          </table:table-cell>
          <table:table-cell office:value-type="string">
            <text:p>Directing, controlling or restraining the movement of live animals to move them into vehicles pens, feeding areas and other enclosed spaces, or to facilitate grooming, veterinary procedures or slaughter.</text:p>
          </table:table-cell>
          <table:table-cell office:value-type="string">
            <text:p>S6.9.3</text:p>
          </table:table-cell>
        </table:table-row>
        <table:table-row>
          <table:table-cell office:value-type="string">
            <text:p>SkillGroup</text:p>
          </table:table-cell>
          <table:table-cell office:value-type="string">
            <text:p>http://data.europa.eu/esco/skill/f1612d7a-0338-4b0f-a2a4-86b5168e2596</text:p>
          </table:table-cell>
          <table:table-cell office:value-type="string">
            <text:p>collecting and preparing specimens or materials for testing</text:p>
          </table:table-cell>
          <table:table-cell table:number-columns-repeated="2"/>
          <table:table-cell office:value-type="string">
            <text:p>released</text:p>
          </table:table-cell>
          <table:table-cell/>
          <table:table-cell office:value-type="string">
            <text:p>Examples:<text:line-break/>- Prepare chemical samples<text:line-break/>- Collect samples for analysis.</text:p>
          </table:table-cell>
          <table:table-cell office:value-type="string">
            <text:p>http://data.europa.eu/esco/concept-scheme/skills<text:line-break/>http://data.europa.eu/esco/concept-scheme/skills-hierarchy</text:p>
          </table:table-cell>
          <table:table-cell office:value-type="string">
            <text:p>Taking, preparing or preserving as required samples or specimens of products, liquids chemicals or organic materials in order for them to be ready for testing and analysis.</text:p>
          </table:table-cell>
          <table:table-cell office:value-type="string">
            <text:p>S6.3.6</text:p>
          </table:table-cell>
        </table:table-row>
        <table:table-row>
          <table:table-cell office:value-type="string">
            <text:p>SkillGroup</text:p>
          </table:table-cell>
          <table:table-cell office:value-type="string">
            <text:p>http://data.europa.eu/esco/skill/f2840c73-9693-4cc0-8dc1-c44942263d5d</text:p>
          </table:table-cell>
          <table:table-cell office:value-type="string">
            <text:p>sorting and packaging goods and materials</text:p>
          </table:table-cell>
          <table:table-cell office:value-type="string">
            <text:p>sorting and packaging</text:p>
          </table:table-cell>
          <table:table-cell/>
          <table:table-cell office:value-type="string">
            <text:p>released</text:p>
          </table:table-cell>
          <table:table-cell office:value-type="string">
            <text:p>2022-06-22T14:13:00.023Z</text:p>
          </table:table-cell>
          <table:table-cell/>
          <table:table-cell office:value-type="string">
            <text:p>http://data.europa.eu/esco/concept-scheme/skills<text:line-break/>http://data.europa.eu/esco/concept-scheme/skills-hierarchy</text:p>
          </table:table-cell>
          <table:table-cell office:value-type="string">
            <text:p>Sorting, packaging, separating or arranging materials, according to established patterns or procedures.</text:p>
          </table:table-cell>
          <table:table-cell office:value-type="string">
            <text:p>S6.1</text:p>
          </table:table-cell>
        </table:table-row>
        <table:table-row>
          <table:table-cell office:value-type="string">
            <text:p>SkillGroup</text:p>
          </table:table-cell>
          <table:table-cell office:value-type="string">
            <text:p>http://data.europa.eu/esco/skill/f289347f-a76d-4d03-a648-74b53ed1e636</text:p>
          </table:table-cell>
          <table:table-cell office:value-type="string">
            <text:p>fabricating food and related products</text:p>
          </table:table-cell>
          <table:table-cell table:number-columns-repeated="2"/>
          <table:table-cell office:value-type="string">
            <text:p>released</text:p>
          </table:table-cell>
          <table:table-cell/>
          <table:table-cell office:value-type="string">
            <text:p>Excludes:<text:line-break/>- Operation of machinery<text:line-break/>- Preparing and cooking food and drinks for immediate consumption Examples:<text:line-break/>- Prepare specialised meat products<text:line-break/>- Extract juices<text:line-break/>- Perform curd processing of cheese.</text:p>
          </table:table-cell>
          <table:table-cell office:value-type="string">
            <text:p>http://data.europa.eu/esco/concept-scheme/skills<text:line-break/>http://data.europa.eu/esco/concept-scheme/skills-hierarchy</text:p>
          </table:table-cell>
          <table:table-cell office:value-type="string">
            <text:p>Fabricating food, drink and related products by hand or using hand-held tools and equipment.</text:p>
          </table:table-cell>
          <table:table-cell office:value-type="string">
            <text:p>S6.5.7</text:p>
          </table:table-cell>
        </table:table-row>
        <table:table-row>
          <table:table-cell office:value-type="string">
            <text:p>SkillGroup</text:p>
          </table:table-cell>
          <table:table-cell office:value-type="string">
            <text:p>http://data.europa.eu/esco/skill/f2cf57fe-d4cb-4b4a-831d-73171cc73909</text:p>
          </table:table-cell>
          <table:table-cell office:value-type="string">
            <text:p>evaluating systems, programmes, equipment and products</text:p>
          </table:table-cell>
          <table:table-cell table:number-columns-repeated="2"/>
          <table:table-cell office:value-type="string">
            <text:p>released</text:p>
          </table:table-cell>
          <table:table-cell office:value-type="string">
            <text:p>2023-02-20T20:14:09.976Z</text:p>
          </table:table-cell>
          <table:table-cell office:value-type="string">
            <text:p>Excludes:<text:line-break/>- Using ICT tools to analyse and process data.<text:line-break/>- Testing equipment and products Examples:<text:line-break/>- Evaluate education programmes<text:line-break/>- Evaluate nursing care<text:line-break/>- Execute ICT audits.</text:p>
          </table:table-cell>
          <table:table-cell office:value-type="string">
            <text:p>http://data.europa.eu/esco/concept-scheme/skills<text:line-break/>http://data.europa.eu/esco/concept-scheme/skills-hierarchy</text:p>
          </table:table-cell>
          <table:table-cell office:value-type="string">
            <text:p>Evaluating and analysing information on the performance of systems, processes, practices, programmes, equipment or products.</text:p>
          </table:table-cell>
          <table:table-cell office:value-type="string">
            <text:p>S2.7.6</text:p>
          </table:table-cell>
        </table:table-row>
        <table:table-row>
          <table:table-cell office:value-type="string">
            <text:p>SkillGroup</text:p>
          </table:table-cell>
          <table:table-cell office:value-type="string">
            <text:p>http://data.europa.eu/esco/skill/f306bf2a-271d-4059-ba7b-e83849cb8960</text:p>
          </table:table-cell>
          <table:table-cell office:value-type="string">
            <text:p>performing administrative activities</text:p>
          </table:table-cell>
          <table:table-cell office:value-type="string">
            <text:p>administration</text:p>
          </table:table-cell>
          <table:table-cell/>
          <table:table-cell office:value-type="string">
            <text:p>released</text:p>
          </table:table-cell>
          <table:table-cell/>
          <table:table-cell office:value-type="string">
            <text:p>Excludes:<text:line-break/>- Record and process information.</text:p>
          </table:table-cell>
          <table:table-cell office:value-type="string">
            <text:p>http://data.europa.eu/esco/concept-scheme/skills<text:line-break/>http://data.europa.eu/esco/concept-scheme/skills-hierarchy</text:p>
          </table:table-cell>
          <table:table-cell office:value-type="string">
            <text:p>Performing administrative tasks such as typing up reports, ordering supplies, maintaining mail correspondence, and ensuring administrative systems, processes and databases are efficient.</text:p>
          </table:table-cell>
          <table:table-cell office:value-type="string">
            <text:p>S4.4</text:p>
          </table:table-cell>
        </table:table-row>
        <table:table-row>
          <table:table-cell office:value-type="string">
            <text:p>SkillGroup</text:p>
          </table:table-cell>
          <table:table-cell office:value-type="string">
            <text:p>http://data.europa.eu/esco/skill/f4346da3-f6b2-4389-8a67-7c443b7e1609</text:p>
          </table:table-cell>
          <table:table-cell office:value-type="string">
            <text:p>practising sports</text:p>
          </table:table-cell>
          <table:table-cell table:number-columns-repeated="2"/>
          <table:table-cell office:value-type="string">
            <text:p>released</text:p>
          </table:table-cell>
          <table:table-cell office:value-type="string">
            <text:p>2021-08-06T11:15:38.673Z</text:p>
          </table:table-cell>
          <table:table-cell office:value-type="string">
            <text:p>Examples:<text:line-break/>- participate in athletic events<text:line-break/>- perform stunts<text:line-break/>- participate in physical training.</text:p>
          </table:table-cell>
          <table:table-cell office:value-type="string">
            <text:p>http://data.europa.eu/esco/concept-scheme/skills<text:line-break/>http://data.europa.eu/esco/concept-scheme/skills-hierarchy</text:p>
          </table:table-cell>
          <table:table-cell office:value-type="string">
            <text:p>Performing and practising athletic activities for fitness, competition, or artistic purposes.</text:p>
          </table:table-cell>
          <table:table-cell office:value-type="string">
            <text:p>S1.14.1</text:p>
          </table:table-cell>
        </table:table-row>
        <table:table-row>
          <table:table-cell office:value-type="string">
            <text:p>SkillGroup</text:p>
          </table:table-cell>
          <table:table-cell office:value-type="string">
            <text:p>http://data.europa.eu/esco/skill/f5328159-dfe9-4f25-b8e7-a03fb0d3a991</text:p>
          </table:table-cell>
          <table:table-cell office:value-type="string">
            <text:p>working with computers</text:p>
          </table:table-cell>
          <table:table-cell office:value-type="string">
            <text:p>digital skills</text:p>
          </table:table-cell>
          <table:table-cell/>
          <table:table-cell office:value-type="string">
            <text:p>released</text:p>
          </table:table-cell>
          <table:table-cell office:value-type="string">
            <text:p>2022-08-02T10:45:01.039Z</text:p>
          </table:table-cell>
          <table:table-cell office:value-type="string">
            <text:p>Excludes:<text:line-break/>- Systems analysis<text:line-break/>- Installing, maintaining and repairing computer hardware.</text:p>
          </table:table-cell>
          <table:table-cell office:value-type="string">
            <text:p>http://data.europa.eu/esco/concept-scheme/skills<text:line-break/>http://data.europa.eu/esco/concept-scheme/skills-hierarchy</text:p>
          </table:table-cell>
          <table:table-cell office:value-type="string">
            <text:p>Using computers and other digital tools to develop, install and maintain ICT software and infrastructure and to browse, search, filter, organise, store, retrieve, and analyse data, to collaborate and communicate with others, to create and edit new content.</text:p>
          </table:table-cell>
          <table:table-cell office:value-type="string">
            <text:p>S5.0</text:p>
          </table:table-cell>
        </table:table-row>
        <table:table-row>
          <table:table-cell office:value-type="string">
            <text:p>SkillGroup</text:p>
          </table:table-cell>
          <table:table-cell office:value-type="string">
            <text:p>http://data.europa.eu/esco/skill/f55fac09-92a2-4a88-9a96-ee9fb5b18519</text:p>
          </table:table-cell>
          <table:table-cell office:value-type="string">
            <text:p>determining values of goods or services</text:p>
          </table:table-cell>
          <table:table-cell table:number-columns-repeated="2"/>
          <table:table-cell office:value-type="string">
            <text:p>released</text:p>
          </table:table-cell>
          <table:table-cell/>
          <table:table-cell office:value-type="string">
            <text:p>Examples:<text:line-break/>- estimate value of used goods.</text:p>
          </table:table-cell>
          <table:table-cell office:value-type="string">
            <text:p>http://data.europa.eu/esco/concept-scheme/skills<text:line-break/>http://data.europa.eu/esco/concept-scheme/skills-hierarchy</text:p>
          </table:table-cell>
          <table:table-cell office:value-type="string">
            <text:p>Determining or estimating values or prices of goods or services.</text:p>
          </table:table-cell>
          <table:table-cell office:value-type="string">
            <text:p>S2.6.2</text:p>
          </table:table-cell>
        </table:table-row>
        <table:table-row>
          <table:table-cell office:value-type="string">
            <text:p>SkillGroup</text:p>
          </table:table-cell>
          <table:table-cell office:value-type="string">
            <text:p>http://data.europa.eu/esco/skill/f5c9eef3-0495-4747-9519-d71a58d252bd</text:p>
          </table:table-cell>
          <table:table-cell office:value-type="string">
            <text:p>demonstrating willingness to learn</text:p>
          </table:table-cell>
          <table:table-cell office:value-type="string">
            <text:p>demonstrating self-management and self-reflection</text:p>
          </table:table-cell>
          <table:table-cell/>
          <table:table-cell office:value-type="string">
            <text:p>released</text:p>
          </table:table-cell>
          <table:table-cell office:value-type="string">
            <text:p>2021-09-13T13:32:34.13Z</text:p>
          </table:table-cell>
          <table:table-cell/>
          <table:table-cell office:value-type="string">
            <text:p>http://data.europa.eu/esco/concept-scheme/skills<text:line-break/>http://data.europa.eu/esco/concept-scheme/skills-hierarchy<text:line-break/>http://data.europa.eu/esco/concept-scheme/skill-transversal-groups</text:p>
          </table:table-cell>
          <table:table-cell office:value-type="string">
            <text:p>Show a positive attitude towards new and challenging demands and take steps to learn from difficulties.</text:p>
          </table:table-cell>
          <table:table-cell office:value-type="string">
            <text:p>T3.4</text:p>
          </table:table-cell>
        </table:table-row>
        <table:table-row>
          <table:table-cell office:value-type="string">
            <text:p>SkillGroup</text:p>
          </table:table-cell>
          <table:table-cell office:value-type="string">
            <text:p>http://data.europa.eu/esco/skill/f5f15f9c-6334-4728-8dc5-3a20a00dfc37</text:p>
          </table:table-cell>
          <table:table-cell office:value-type="string">
            <text:p>performing calculations</text:p>
          </table:table-cell>
          <table:table-cell table:number-columns-repeated="2"/>
          <table:table-cell office:value-type="string">
            <text:p>released</text:p>
          </table:table-cell>
          <table:table-cell office:value-type="string">
            <text:p>2021-12-17T12:46:53.307Z</text:p>
          </table:table-cell>
          <table:table-cell office:value-type="string">
            <text:p>Examples:<text:line-break/>- calculate dividends<text:line-break/>- calculate wages<text:line-break/>- estimate consumption of water.</text:p>
          </table:table-cell>
          <table:table-cell office:value-type="string">
            <text:p>http://data.europa.eu/esco/concept-scheme/skills<text:line-break/>http://data.europa.eu/esco/concept-scheme/skills-hierarchy</text:p>
          </table:table-cell>
          <table:table-cell office:value-type="string">
            <text:p>Performing mathematical calculations on financial, spatial, scientific or other data with or without the used of electronic tools.</text:p>
          </table:table-cell>
          <table:table-cell office:value-type="string">
            <text:p>S2.6.1</text:p>
          </table:table-cell>
        </table:table-row>
        <table:table-row>
          <table:table-cell office:value-type="string">
            <text:p>SkillGroup</text:p>
          </table:table-cell>
          <table:table-cell office:value-type="string">
            <text:p>http://data.europa.eu/esco/skill/f73c2c9e-b097-4fcb-95d1-659ea0bd54a3</text:p>
          </table:table-cell>
          <table:table-cell office:value-type="string">
            <text:p>allocating and controlling physical resources</text:p>
          </table:table-cell>
          <table:table-cell table:number-columns-repeated="2"/>
          <table:table-cell office:value-type="string">
            <text:p>released</text:p>
          </table:table-cell>
          <table:table-cell office:value-type="string">
            <text:p>2022-06-19T15:45:14.266Z</text:p>
          </table:table-cell>
          <table:table-cell office:value-type="string">
            <text:p>Examples:<text:line-break/>- manage rail yard resources<text:line-break/>- ensure equipment availability<text:line-break/>- manage space utilisation.</text:p>
          </table:table-cell>
          <table:table-cell office:value-type="string">
            <text:p>http://data.europa.eu/esco/concept-scheme/skills<text:line-break/>http://data.europa.eu/esco/concept-scheme/skills-hierarchy</text:p>
          </table:table-cell>
          <table:table-cell office:value-type="string">
            <text:p>Determining and controlling the distribution and availability of physical assets such as tools and equipment.</text:p>
          </table:table-cell>
          <table:table-cell office:value-type="string">
            <text:p>S4.3.3</text:p>
          </table:table-cell>
        </table:table-row>
        <table:table-row>
          <table:table-cell office:value-type="string">
            <text:p>SkillGroup</text:p>
          </table:table-cell>
          <table:table-cell office:value-type="string">
            <text:p>http://data.europa.eu/esco/skill/f774131e-8f2d-43b6-8c20-7fe35fa0f0bd</text:p>
          </table:table-cell>
          <table:table-cell office:value-type="string">
            <text:p>using digital tools for collaboration, content creation and problem solving</text:p>
          </table:table-cell>
          <table:table-cell office:value-type="string">
            <text:p>using digital tools for collaboration and creativity</text:p>
          </table:table-cell>
          <table:table-cell/>
          <table:table-cell office:value-type="string">
            <text:p>released</text:p>
          </table:table-cell>
          <table:table-cell/>
          <table:table-cell office:value-type="string">
            <text:p>Excludes:<text:line-break/>- Computer programming<text:line-break/>- Resolving computer problems.</text:p>
          </table:table-cell>
          <table:table-cell office:value-type="string">
            <text:p>http://data.europa.eu/esco/concept-scheme/skills<text:line-break/>http://data.europa.eu/esco/concept-scheme/skills-hierarchy</text:p>
          </table:table-cell>
          <table:table-cell office:value-type="string">
            <text:p>Using ICT software and hardware to collaborate and communicate with others, creating and editing new content (from word processing to images and video) and solving conceptual, technical and practical problems.</text:p>
          </table:table-cell>
          <table:table-cell office:value-type="string">
            <text:p>S5.6.0</text:p>
          </table:table-cell>
        </table:table-row>
        <table:table-row>
          <table:table-cell office:value-type="string">
            <text:p>SkillGroup</text:p>
          </table:table-cell>
          <table:table-cell office:value-type="string">
            <text:p>http://data.europa.eu/esco/skill/f7c70392-a261-42e9-86a6-fccf3709ac81</text:p>
          </table:table-cell>
          <table:table-cell office:value-type="string">
            <text:p>driving vehicles</text:p>
          </table:table-cell>
          <table:table-cell table:number-columns-repeated="2"/>
          <table:table-cell office:value-type="string">
            <text:p>released</text:p>
          </table:table-cell>
          <table:table-cell/>
          <table:table-cell office:value-type="string">
            <text:p>Includes driving vehicles on and off road capabilities whose purpose is the transportation of goods or people Examples:<text:line-break/>- Drive at high speed.</text:p>
          </table:table-cell>
          <table:table-cell office:value-type="string">
            <text:p>http://data.europa.eu/esco/concept-scheme/skills<text:line-break/>http://data.europa.eu/esco/concept-scheme/skills-hierarchy</text:p>
          </table:table-cell>
          <table:table-cell office:value-type="string">
            <text:p>Driving vehicles on or off road, such as motorcycles, cars, vans, trucks and buses, for the transportation of goods or people by road.</text:p>
          </table:table-cell>
          <table:table-cell office:value-type="string">
            <text:p>S8.2.0</text:p>
          </table:table-cell>
        </table:table-row>
        <table:table-row>
          <table:table-cell office:value-type="string">
            <text:p>SkillGroup</text:p>
          </table:table-cell>
          <table:table-cell office:value-type="string">
            <text:p>http://data.europa.eu/esco/skill/f7fc7bf8-f41d-44af-81e3-09b88e9779e6</text:p>
          </table:table-cell>
          <table:table-cell office:value-type="string">
            <text:p>testing electrical and mechanical systems or equipment</text:p>
          </table:table-cell>
          <table:table-cell table:number-columns-repeated="2"/>
          <table:table-cell office:value-type="string">
            <text:p>released</text:p>
          </table:table-cell>
          <table:table-cell office:value-type="string">
            <text:p>2023-03-16T15:33:21.623Z</text:p>
          </table:table-cell>
          <table:table-cell office:value-type="string">
            <text:p>Examples:<text:line-break/>- Perform test run Excludes:<text:line-break/>- Testing and analysing substances<text:line-break/>- Test vehicles<text:line-break/>- Inspect cargo.</text:p>
          </table:table-cell>
          <table:table-cell office:value-type="string">
            <text:p>http://data.europa.eu/esco/concept-scheme/skills<text:line-break/>http://data.europa.eu/esco/concept-scheme/skills-hierarchy</text:p>
          </table:table-cell>
          <table:table-cell office:value-type="string">
            <text:p>Inspecting and monitoring functionality of electrical and mechanic systems and equipment.</text:p>
          </table:table-cell>
          <table:table-cell office:value-type="string">
            <text:p>S2.8.1</text:p>
          </table:table-cell>
        </table:table-row>
        <table:table-row>
          <table:table-cell office:value-type="string">
            <text:p>SkillGroup</text:p>
          </table:table-cell>
          <table:table-cell office:value-type="string">
            <text:p>http://data.europa.eu/esco/skill/f839b1da-78b6-4466-86f4-a5798821ea20</text:p>
          </table:table-cell>
          <table:table-cell office:value-type="string">
            <text:p>setting up computer systems</text:p>
          </table:table-cell>
          <table:table-cell table:number-columns-repeated="2"/>
          <table:table-cell office:value-type="string">
            <text:p>released</text:p>
          </table:table-cell>
          <table:table-cell office:value-type="string">
            <text:p>2023-07-06T10:33:34.176Z</text:p>
          </table:table-cell>
          <table:table-cell office:value-type="string">
            <text:p>Excludes:<text:line-break/>- Installing, maintaining and repairing computer hardware Examples:<text:line-break/>- Align software with system architectures<text:line-break/>- Install software<text:line-break/>- Install operating system.</text:p>
          </table:table-cell>
          <table:table-cell office:value-type="string">
            <text:p>http://data.europa.eu/esco/concept-scheme/skills<text:line-break/>http://data.europa.eu/esco/concept-scheme/skills-hierarchy</text:p>
          </table:table-cell>
          <table:table-cell office:value-type="string">
            <text:p>Setting up computers, networks, or similar information systems. Installing computer software, and configuring computer networks.</text:p>
          </table:table-cell>
          <table:table-cell office:value-type="string">
            <text:p>S5.2.1</text:p>
          </table:table-cell>
        </table:table-row>
        <table:table-row>
          <table:table-cell office:value-type="string">
            <text:p>SkillGroup</text:p>
          </table:table-cell>
          <table:table-cell office:value-type="string">
            <text:p>http://data.europa.eu/esco/skill/f8c676de-c871-424f-9a65-77059d07910a</text:p>
          </table:table-cell>
          <table:table-cell office:value-type="string">
            <text:p>handling and disposing of waste and hazardous materials</text:p>
          </table:table-cell>
          <table:table-cell office:value-type="string">
            <text:p>handling waste and hazardous materials</text:p>
          </table:table-cell>
          <table:table-cell/>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office:value-type="string">
            <text:p>Collecting, storing and disposing of unwanted materials or hazardous, according to established waste management procedures.</text:p>
          </table:table-cell>
          <table:table-cell office:value-type="string">
            <text:p>S6.13.0</text:p>
          </table:table-cell>
        </table:table-row>
        <table:table-row>
          <table:table-cell office:value-type="string">
            <text:p>SkillGroup</text:p>
          </table:table-cell>
          <table:table-cell office:value-type="string">
            <text:p>http://data.europa.eu/esco/skill/f9db77be-eb63-4937-a0d0-b581733e7d2a</text:p>
          </table:table-cell>
          <table:table-cell office:value-type="string">
            <text:p>providing support to resolve problems</text:p>
          </table:table-cell>
          <table:table-cell table:number-columns-repeated="2"/>
          <table:table-cell office:value-type="string">
            <text:p>released</text:p>
          </table:table-cell>
          <table:table-cell office:value-type="string">
            <text:p>2022-08-24T13:39:08.535Z</text:p>
          </table:table-cell>
          <table:table-cell office:value-type="string">
            <text:p>Examples:<text:line-break/>- assist families in crisis situations<text:line-break/>- provide victim assistance.</text:p>
          </table:table-cell>
          <table:table-cell office:value-type="string">
            <text:p>http://data.europa.eu/esco/concept-scheme/skills<text:line-break/>http://data.europa.eu/esco/concept-scheme/skills-hierarchy</text:p>
          </table:table-cell>
          <table:table-cell office:value-type="string">
            <text:p>Providing appropriate support or interventions to others to assist them to resolve their personal, family or social problems.</text:p>
          </table:table-cell>
          <table:table-cell office:value-type="string">
            <text:p>S3.1.2</text:p>
          </table:table-cell>
        </table:table-row>
        <table:table-row>
          <table:table-cell office:value-type="string">
            <text:p>SkillGroup</text:p>
          </table:table-cell>
          <table:table-cell office:value-type="string">
            <text:p>http://data.europa.eu/esco/skill/fb01d224-882a-4346-99e2-bfd56f52d09c</text:p>
          </table:table-cell>
          <table:table-cell office:value-type="string">
            <text:p>promoting, selling and purchasing</text:p>
          </table:table-cell>
          <table:table-cell table:number-columns-repeated="2"/>
          <table:table-cell office:value-type="string">
            <text:p>released</text:p>
          </table:table-cell>
          <table:table-cell/>
          <table:table-cell office:value-type="string">
            <text:p>Excludes:<text:line-break/>- Trading and other skills involving buying and selling.</text:p>
          </table:table-cell>
          <table:table-cell office:value-type="string">
            <text:p>http://data.europa.eu/esco/concept-scheme/skills<text:line-break/>http://data.europa.eu/esco/concept-scheme/skills-hierarchy</text:p>
          </table:table-cell>
          <table:table-cell office:value-type="string">
            <text:p>Using communication strategies or techniques to encourage acceptance of goods, services, or ideas, and to sell or buy and goods or services.</text:p>
          </table:table-cell>
          <table:table-cell office:value-type="string">
            <text:p>S1.6.0</text:p>
          </table:table-cell>
        </table:table-row>
        <table:table-row>
          <table:table-cell office:value-type="string">
            <text:p>SkillGroup</text:p>
          </table:table-cell>
          <table:table-cell office:value-type="string">
            <text:p>http://data.europa.eu/esco/skill/fbb861f7-2386-4d17-84f7-6e340a8e6cd9</text:p>
          </table:table-cell>
          <table:table-cell office:value-type="string">
            <text:p>providing personal care</text:p>
          </table:table-cell>
          <table:table-cell office:value-type="string">
            <text:p>personal care</text:p>
          </table:table-cell>
          <table:table-cell/>
          <table:table-cell office:value-type="string">
            <text:p>released</text:p>
          </table:table-cell>
          <table:table-cell/>
          <table:table-cell office:value-type="string">
            <text:p>Excludes:<text:line-break/>- Administration of medical treatments and therapies, therapeutic massage.</text:p>
          </table:table-cell>
          <table:table-cell office:value-type="string">
            <text:p>http://data.europa.eu/esco/concept-scheme/skills<text:line-break/>http://data.europa.eu/esco/concept-scheme/skills-hierarchy</text:p>
          </table:table-cell>
          <table:table-cell office:value-type="string">
            <text:p>Responding to the daily and occasional personal care needs of people.</text:p>
          </table:table-cell>
          <table:table-cell office:value-type="string">
            <text:p>S3.6.0</text:p>
          </table:table-cell>
        </table:table-row>
        <table:table-row>
          <table:table-cell office:value-type="string">
            <text:p>SkillGroup</text:p>
          </table:table-cell>
          <table:table-cell office:value-type="string">
            <text:p>http://data.europa.eu/esco/skill/fe317a4c-e4e0-45ee-8b0d-204a68014f9e</text:p>
          </table:table-cell>
          <table:table-cell office:value-type="string">
            <text:p>protecting and enforcing</text:p>
          </table:table-cell>
          <table:table-cell table:number-columns-repeated="2"/>
          <table:table-cell office:value-type="string">
            <text:p>released</text:p>
          </table:table-cell>
          <table:table-cell table:number-columns-repeated="2"/>
          <table:table-cell office:value-type="string">
            <text:p>http://data.europa.eu/esco/concept-scheme/skills<text:line-break/>http://data.europa.eu/esco/concept-scheme/skills-hierarchy</text:p>
          </table:table-cell>
          <table:table-cell office:value-type="string">
            <text:p>Responding to public and personal safety and security needs and ensuring compliance to rules, standards, guidelines or laws.</text:p>
          </table:table-cell>
          <table:table-cell office:value-type="string">
            <text:p>S3.3.0</text:p>
          </table:table-cell>
        </table:table-row>
        <table:table-row>
          <table:table-cell office:value-type="string">
            <text:p>SkillGroup</text:p>
          </table:table-cell>
          <table:table-cell office:value-type="string">
            <text:p>http://data.europa.eu/esco/skill/fe5eabaa-63f6-4c44-b405-fc3ded8d56cb</text:p>
          </table:table-cell>
          <table:table-cell office:value-type="string">
            <text:p>leading others</text:p>
          </table:table-cell>
          <table:table-cell office:value-type="string">
            <text:p>demonstrating leadership</text:p>
          </table:table-cell>
          <table:table-cell office:value-type="string">
            <text:p>leadership</text:p>
          </table:table-cell>
          <table:table-cell office:value-type="string">
            <text:p>released</text:p>
          </table:table-cell>
          <table:table-cell office:value-type="string">
            <text:p>2021-08-30T16:33:15.592Z</text:p>
          </table:table-cell>
          <table:table-cell/>
          <table:table-cell office:value-type="string">
            <text:p>http://data.europa.eu/esco/concept-scheme/skills<text:line-break/>http://data.europa.eu/esco/concept-scheme/skills-hierarchy<text:line-break/>http://data.europa.eu/esco/concept-scheme/skill-transversal-groups</text:p>
          </table:table-cell>
          <table:table-cell office:value-type="string">
            <text:p>Guide, direct and motivate others.</text:p>
          </table:table-cell>
          <table:table-cell office:value-type="string">
            <text:p>T4.4</text:p>
          </table:table-cell>
        </table:table-row>
        <table:table-row>
          <table:table-cell office:value-type="string">
            <text:p>SkillGroup</text:p>
          </table:table-cell>
          <table:table-cell office:value-type="string">
            <text:p>http://data.europa.eu/esco/skill/ff565308-8f29-4f1d-a342-9a29bd8b7446</text:p>
          </table:table-cell>
          <table:table-cell office:value-type="string">
            <text:p>handling and moving</text:p>
          </table:table-cell>
          <table:table-cell office:value-type="string">
            <text:p>handling goods or animals</text:p>
          </table:table-cell>
          <table:table-cell/>
          <table:table-cell office:value-type="string">
            <text:p>released</text:p>
          </table:table-cell>
          <table:table-cell/>
          <table:table-cell office:value-type="string">
            <text:p>Excludes:<text:line-break/>- Specific skills involving interaction with people.</text:p>
          </table:table-cell>
          <table:table-cell office:value-type="string">
            <text:p>http://data.europa.eu/esco/concept-scheme/skills<text:line-break/>http://data.europa.eu/esco/concept-scheme/skills-hierarchy</text:p>
          </table:table-cell>
          <table:table-cell office:value-type="string">
            <text:p>Sorting, arranging, moving, transforming, fabricating and cleaning goods and materials by hand or using handheld tools and equipment. Tending plants, crops and animals.</text:p>
          </table:table-cell>
          <table:table-cell office:value-type="string">
            <text:p>S6.0</text:p>
          </table:table-cell>
        </table:table-row>
        <table:table-row>
          <table:table-cell office:value-type="string">
            <text:p>SkillGroup</text:p>
          </table:table-cell>
          <table:table-cell office:value-type="string">
            <text:p>http://data.europa.eu/esco/skill/fff1d675-c36a-4c12-9cd4-407f21ccd06a</text:p>
          </table:table-cell>
          <table:table-cell office:value-type="string">
            <text:p>processing information, ideas and concepts</text:p>
          </table:table-cell>
          <table:table-cell office:value-type="string">
            <text:p>processing of information<text:line-break/>processing qualitative information<text:line-break/>analysing and interpreting information<text:line-break/>processing quantitative information</text:p>
          </table:table-cell>
          <table:table-cell office:value-type="string">
            <text:p>using knowledge and information</text:p>
          </table:table-cell>
          <table:table-cell office:value-type="string">
            <text:p>released</text:p>
          </table:table-cell>
          <table:table-cell office:value-type="string">
            <text:p>2021-08-30T13:39:50.945Z</text:p>
          </table:table-cell>
          <table:table-cell/>
          <table:table-cell office:value-type="string">
            <text:p>http://data.europa.eu/esco/concept-scheme/skills<text:line-break/>http://data.europa.eu/esco/concept-scheme/skills-hierarchy<text:line-break/>http://data.europa.eu/esco/concept-scheme/skill-transversal-groups</text:p>
          </table:table-cell>
          <table:table-cell office:value-type="string">
            <text:p>Evaluate, input, record, transcribe and update data using electronic or manual information systems.</text:p>
          </table:table-cell>
          <table:table-cell office:value-type="string">
            <text:p>T2.1</text:p>
          </table:table-cell>
        </table:table-row>
      </table:table>
    </office:spreadsheet>
  </office:body>
</office:document-content>
</file>

<file path=styles.xml><?xml version="1.0" encoding="utf-8"?>
<office:document-styles xmlns:office="urn:oasis:names:tc:opendocument:xmlns:office:1.0" xmlns:svg="urn:oasis:names:tc:opendocument:xmlns:svg-compatible:1.0" xmlns:fo="urn:oasis:names:tc:opendocument:xmlns:xsl-fo-compatible:1.0" xmlns:draw="urn:oasis:names:tc:opendocument:xmlns:drawing:1.0" xmlns:script="urn:oasis:names:tc:opendocument:xmlns:script:1.0" xmlns:ooo="http://openoffice.org/2004/office" xmlns:number="urn:oasis:names:tc:opendocument:xmlns:datastyle:1.0" xmlns:form="urn:oasis:names:tc:opendocument:xmlns:form:1.0" xmlns:meta="urn:oasis:names:tc:opendocument:xmlns:meta:1.0" xmlns:style="urn:oasis:names:tc:opendocument:xmlns:style:1.0" xmlns:text="urn:oasis:names:tc:opendocument:xmlns:text:1.0" xmlns:config="urn:oasis:names:tc:opendocument:xmlns:config:1.0" xmlns:table="urn:oasis:names:tc:opendocument:xmlns:table:1.0" xmlns:xlink="http://www.w3.org/1999/xlink" xmlns:dc="http://purl.org/dc/elements/1.1/" office:version="1.2">
  <office:styles/>
  <office:automatic-styles/>
  <office:master-styles/>
</office:document-styles>
</file>

<file path=meta.xml><?xml version="1.0" encoding="utf-8"?>
<office:document-meta xmlns:office="urn:oasis:names:tc:opendocument:xmlns:office:1.0" xmlns:svg="urn:oasis:names:tc:opendocument:xmlns:svg-compatible:1.0" xmlns:fo="urn:oasis:names:tc:opendocument:xmlns:xsl-fo-compatible:1.0" xmlns:draw="urn:oasis:names:tc:opendocument:xmlns:drawing:1.0" xmlns:script="urn:oasis:names:tc:opendocument:xmlns:script:1.0" xmlns:ooo="http://openoffice.org/2004/office" xmlns:number="urn:oasis:names:tc:opendocument:xmlns:datastyle:1.0" xmlns:form="urn:oasis:names:tc:opendocument:xmlns:form:1.0" xmlns:meta="urn:oasis:names:tc:opendocument:xmlns:meta:1.0" xmlns:style="urn:oasis:names:tc:opendocument:xmlns:style:1.0" xmlns:text="urn:oasis:names:tc:opendocument:xmlns:text:1.0" xmlns:config="urn:oasis:names:tc:opendocument:xmlns:config:1.0" xmlns:table="urn:oasis:names:tc:opendocument:xmlns:table:1.0" xmlns:xlink="http://www.w3.org/1999/xlink" xmlns:dc="http://purl.org/dc/elements/1.1/" office:version="1.2">
  <office:meta>
    <meta:generator>jOpenDocument/1.3</meta:generator>
  </office:meta>
</office:document-meta>
</file>